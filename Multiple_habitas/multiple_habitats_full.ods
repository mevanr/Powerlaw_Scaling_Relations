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1.9193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2866in"/>
    </style:style>
    <style:style style:name="co7" style:family="table-column">
      <style:table-column-properties fo:break-before="auto" style:column-width="0.8484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5016in"/>
    </style:style>
    <style:style style:name="co10" style:family="table-column">
      <style:table-column-properties fo:break-before="auto" style:column-width="1.5799in"/>
    </style:style>
    <style:style style:name="co11" style:family="table-column">
      <style:table-column-properties fo:break-before="auto" style:column-width="1.4236in"/>
    </style:style>
    <style:style style:name="co12" style:family="table-column">
      <style:table-column-properties fo:break-before="auto" style:column-width="0.548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thod_key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beta_true</text:p>
          </table:table-cell>
          <table:table-cell table:style-name="ce1" office:value-type="string" calcext:value-type="string">
            <text:p>x_error</text:p>
          </table:table-cell>
          <table:table-cell table:style-name="ce1" office:value-type="string" calcext:value-type="string">
            <text:p>y_erro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_habitats</text:p>
          </table:table-cell>
          <table:table-cell table:style-name="ce1" office:value-type="string" calcext:value-type="string">
            <text:p>mean_bias</text:p>
          </table:table-cell>
          <table:table-cell table:style-name="ce1" office:value-type="string" calcext:value-type="string">
            <text:p>sd_bias</text:p>
          </table:table-cell>
          <table:table-cell table:style-name="ce1" office:value-type="string" calcext:value-type="string">
            <text:p>bias_s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d_rmse</text:p>
          </table:table-cell>
          <table:table-cell table:style-name="ce1" office:value-type="string" calcext:value-type="string">
            <text:p>rmse_se</text:p>
          </table:table-cell>
          <table:table-cell table:style-name="ce1" office:value-type="string" calcext:value-type="string">
            <text:p>n_sim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70510953579721" calcext:value-type="float">
            <text:p>1.70510953579721</text:p>
          </table:table-cell>
          <table:table-cell office:value-type="float" office:value="1.16065656802823" calcext:value-type="float">
            <text:p>1.16065656802823</text:p>
          </table:table-cell>
          <table:table-cell office:value-type="float" office:value="0.116065656802823" calcext:value-type="float">
            <text:p>0.116065656802823</text:p>
          </table:table-cell>
          <table:table-cell office:value-type="float" office:value="1.70510953579721" calcext:value-type="float">
            <text:p>1.70510953579721</text:p>
          </table:table-cell>
          <table:table-cell office:value-type="float" office:value="1.16065656802823" calcext:value-type="float">
            <text:p>1.16065656802823</text:p>
          </table:table-cell>
          <table:table-cell office:value-type="float" office:value="0.116065656802823" calcext:value-type="float">
            <text:p>0.1160656568028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963663661504039" calcext:value-type="float">
            <text:p>0.963663661504039</text:p>
          </table:table-cell>
          <table:table-cell office:value-type="float" office:value="0.379055241529978" calcext:value-type="float">
            <text:p>0.379055241529978</text:p>
          </table:table-cell>
          <table:table-cell office:value-type="float" office:value="0.0379055241529978" calcext:value-type="float">
            <text:p>0.0379055241529978</text:p>
          </table:table-cell>
          <table:table-cell office:value-type="float" office:value="0.963663661504039" calcext:value-type="float">
            <text:p>0.963663661504039</text:p>
          </table:table-cell>
          <table:table-cell office:value-type="float" office:value="0.379055241529978" calcext:value-type="float">
            <text:p>0.379055241529978</text:p>
          </table:table-cell>
          <table:table-cell office:value-type="float" office:value="0.0379055241529978" calcext:value-type="float">
            <text:p>0.03790552415299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716473743802389" calcext:value-type="float">
            <text:p>0.716473743802389</text:p>
          </table:table-cell>
          <table:table-cell office:value-type="float" office:value="0.244789468396852" calcext:value-type="float">
            <text:p>0.244789468396852</text:p>
          </table:table-cell>
          <table:table-cell office:value-type="float" office:value="0.0244789468396852" calcext:value-type="float">
            <text:p>0.0244789468396852</text:p>
          </table:table-cell>
          <table:table-cell office:value-type="float" office:value="0.716473743802389" calcext:value-type="float">
            <text:p>0.716473743802389</text:p>
          </table:table-cell>
          <table:table-cell office:value-type="float" office:value="0.244789468396852" calcext:value-type="float">
            <text:p>0.244789468396852</text:p>
          </table:table-cell>
          <table:table-cell office:value-type="float" office:value="0.0244789468396852" calcext:value-type="float">
            <text:p>0.02447894683968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989472143335825" calcext:value-type="float">
            <text:p>0.989472143335825</text:p>
          </table:table-cell>
          <table:table-cell office:value-type="float" office:value="4.01728362401457" calcext:value-type="float">
            <text:p>4.01728362401457</text:p>
          </table:table-cell>
          <table:table-cell office:value-type="float" office:value="0.401728362401457" calcext:value-type="float">
            <text:p>0.401728362401457</text:p>
          </table:table-cell>
          <table:table-cell office:value-type="float" office:value="1.77834018108924" calcext:value-type="float">
            <text:p>1.77834018108924</text:p>
          </table:table-cell>
          <table:table-cell office:value-type="float" office:value="3.73270332365205" calcext:value-type="float">
            <text:p>3.73270332365205</text:p>
          </table:table-cell>
          <table:table-cell office:value-type="float" office:value="0.373270332365205" calcext:value-type="float">
            <text:p>0.373270332365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715237179259174" calcext:value-type="float">
            <text:p>0.715237179259174</text:p>
          </table:table-cell>
          <table:table-cell office:value-type="float" office:value="0.333152176854656" calcext:value-type="float">
            <text:p>0.333152176854656</text:p>
          </table:table-cell>
          <table:table-cell office:value-type="float" office:value="0.0333152176854656" calcext:value-type="float">
            <text:p>0.0333152176854656</text:p>
          </table:table-cell>
          <table:table-cell office:value-type="float" office:value="0.715237179259174" calcext:value-type="float">
            <text:p>0.715237179259174</text:p>
          </table:table-cell>
          <table:table-cell office:value-type="float" office:value="0.333152176854656" calcext:value-type="float">
            <text:p>0.333152176854656</text:p>
          </table:table-cell>
          <table:table-cell office:value-type="float" office:value="0.0333152176854656" calcext:value-type="float">
            <text:p>0.03331521768546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531590513485516" calcext:value-type="float">
            <text:p>0.531590513485516</text:p>
          </table:table-cell>
          <table:table-cell office:value-type="float" office:value="0.286534122512381" calcext:value-type="float">
            <text:p>0.286534122512381</text:p>
          </table:table-cell>
          <table:table-cell office:value-type="float" office:value="0.0286534122512381" calcext:value-type="float">
            <text:p>0.0286534122512381</text:p>
          </table:table-cell>
          <table:table-cell office:value-type="float" office:value="0.533635323303261" calcext:value-type="float">
            <text:p>0.533635323303261</text:p>
          </table:table-cell>
          <table:table-cell office:value-type="float" office:value="0.282668741203651" calcext:value-type="float">
            <text:p>0.282668741203651</text:p>
          </table:table-cell>
          <table:table-cell office:value-type="float" office:value="0.0282668741203651" calcext:value-type="float">
            <text:p>0.028266874120365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.63650033401974" calcext:value-type="float">
            <text:p>1.63650033401974</text:p>
          </table:table-cell>
          <table:table-cell office:value-type="float" office:value="0.764344899117627" calcext:value-type="float">
            <text:p>0.764344899117627</text:p>
          </table:table-cell>
          <table:table-cell office:value-type="float" office:value="0.0764344899117627" calcext:value-type="float">
            <text:p>0.0764344899117627</text:p>
          </table:table-cell>
          <table:table-cell office:value-type="float" office:value="1.63650033401974" calcext:value-type="float">
            <text:p>1.63650033401974</text:p>
          </table:table-cell>
          <table:table-cell office:value-type="float" office:value="0.764344899117627" calcext:value-type="float">
            <text:p>0.764344899117627</text:p>
          </table:table-cell>
          <table:table-cell office:value-type="float" office:value="0.0764344899117627" calcext:value-type="float">
            <text:p>0.076434489911762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924168536995878" calcext:value-type="float">
            <text:p>0.924168536995878</text:p>
          </table:table-cell>
          <table:table-cell office:value-type="float" office:value="0.313449754082522" calcext:value-type="float">
            <text:p>0.313449754082522</text:p>
          </table:table-cell>
          <table:table-cell office:value-type="float" office:value="0.0313449754082522" calcext:value-type="float">
            <text:p>0.0313449754082522</text:p>
          </table:table-cell>
          <table:table-cell office:value-type="float" office:value="0.924168536995878" calcext:value-type="float">
            <text:p>0.924168536995878</text:p>
          </table:table-cell>
          <table:table-cell office:value-type="float" office:value="0.313449754082522" calcext:value-type="float">
            <text:p>0.313449754082522</text:p>
          </table:table-cell>
          <table:table-cell office:value-type="float" office:value="0.0313449754082522" calcext:value-type="float">
            <text:p>0.03134497540825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695493581915305" calcext:value-type="float">
            <text:p>0.695493581915305</text:p>
          </table:table-cell>
          <table:table-cell office:value-type="float" office:value="0.252075072135317" calcext:value-type="float">
            <text:p>0.252075072135317</text:p>
          </table:table-cell>
          <table:table-cell office:value-type="float" office:value="0.0252075072135317" calcext:value-type="float">
            <text:p>0.0252075072135317</text:p>
          </table:table-cell>
          <table:table-cell office:value-type="float" office:value="0.695493581915305" calcext:value-type="float">
            <text:p>0.695493581915305</text:p>
          </table:table-cell>
          <table:table-cell office:value-type="float" office:value="0.252075072135317" calcext:value-type="float">
            <text:p>0.252075072135317</text:p>
          </table:table-cell>
          <table:table-cell office:value-type="float" office:value="0.0252075072135317" calcext:value-type="float">
            <text:p>0.025207507213531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.13543052835994" calcext:value-type="float">
            <text:p>1.13543052835994</text:p>
          </table:table-cell>
          <table:table-cell office:value-type="float" office:value="1.97460293955562" calcext:value-type="float">
            <text:p>1.97460293955562</text:p>
          </table:table-cell>
          <table:table-cell office:value-type="float" office:value="0.197460293955562" calcext:value-type="float">
            <text:p>0.197460293955562</text:p>
          </table:table-cell>
          <table:table-cell office:value-type="float" office:value="1.42571055086417" calcext:value-type="float">
            <text:p>1.42571055086417</text:p>
          </table:table-cell>
          <table:table-cell office:value-type="float" office:value="1.77428833680442" calcext:value-type="float">
            <text:p>1.77428833680442</text:p>
          </table:table-cell>
          <table:table-cell office:value-type="float" office:value="0.177428833680442" calcext:value-type="float">
            <text:p>0.17742883368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718168076815368" calcext:value-type="float">
            <text:p>0.718168076815368</text:p>
          </table:table-cell>
          <table:table-cell office:value-type="float" office:value="0.388580471999405" calcext:value-type="float">
            <text:p>0.388580471999405</text:p>
          </table:table-cell>
          <table:table-cell office:value-type="float" office:value="0.0388580471999405" calcext:value-type="float">
            <text:p>0.0388580471999405</text:p>
          </table:table-cell>
          <table:table-cell office:value-type="float" office:value="0.718168076815368" calcext:value-type="float">
            <text:p>0.718168076815368</text:p>
          </table:table-cell>
          <table:table-cell office:value-type="float" office:value="0.388580471999405" calcext:value-type="float">
            <text:p>0.388580471999405</text:p>
          </table:table-cell>
          <table:table-cell office:value-type="float" office:value="0.0388580471999405" calcext:value-type="float">
            <text:p>0.03885804719994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528599015838069" calcext:value-type="float">
            <text:p>0.528599015838069</text:p>
          </table:table-cell>
          <table:table-cell office:value-type="float" office:value="0.27222889083998" calcext:value-type="float">
            <text:p>0.27222889083998</text:p>
          </table:table-cell>
          <table:table-cell office:value-type="float" office:value="0.027222889083998" calcext:value-type="float">
            <text:p>0.027222889083998</text:p>
          </table:table-cell>
          <table:table-cell office:value-type="float" office:value="0.528599015838069" calcext:value-type="float">
            <text:p>0.528599015838069</text:p>
          </table:table-cell>
          <table:table-cell office:value-type="float" office:value="0.27222889083998" calcext:value-type="float">
            <text:p>0.27222889083998</text:p>
          </table:table-cell>
          <table:table-cell office:value-type="float" office:value="0.027222889083998" calcext:value-type="float">
            <text:p>0.0272228890839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27344658341305" calcext:value-type="float">
            <text:p>0.527344658341305</text:p>
          </table:table-cell>
          <table:table-cell office:value-type="float" office:value="0.364761839577426" calcext:value-type="float">
            <text:p>0.364761839577426</text:p>
          </table:table-cell>
          <table:table-cell office:value-type="float" office:value="0.0364761839577426" calcext:value-type="float">
            <text:p>0.0364761839577426</text:p>
          </table:table-cell>
          <table:table-cell office:value-type="float" office:value="0.551028877999476" calcext:value-type="float">
            <text:p>0.551028877999476</text:p>
          </table:table-cell>
          <table:table-cell office:value-type="float" office:value="0.327494701796198" calcext:value-type="float">
            <text:p>0.327494701796198</text:p>
          </table:table-cell>
          <table:table-cell office:value-type="float" office:value="0.0327494701796198" calcext:value-type="float">
            <text:p>0.03274947017961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11047693060898" calcext:value-type="float">
            <text:p>0.511047693060898</text:p>
          </table:table-cell>
          <table:table-cell office:value-type="float" office:value="0.316628199771095" calcext:value-type="float">
            <text:p>0.316628199771095</text:p>
          </table:table-cell>
          <table:table-cell office:value-type="float" office:value="0.0316628199771095" calcext:value-type="float">
            <text:p>0.0316628199771095</text:p>
          </table:table-cell>
          <table:table-cell office:value-type="float" office:value="0.516672758043877" calcext:value-type="float">
            <text:p>0.516672758043877</text:p>
          </table:table-cell>
          <table:table-cell office:value-type="float" office:value="0.307268658809265" calcext:value-type="float">
            <text:p>0.307268658809265</text:p>
          </table:table-cell>
          <table:table-cell office:value-type="float" office:value="0.0307268658809265" calcext:value-type="float">
            <text:p>0.03072686588092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68945532360133" calcext:value-type="float">
            <text:p>0.368945532360133</text:p>
          </table:table-cell>
          <table:table-cell office:value-type="float" office:value="0.264742860022136" calcext:value-type="float">
            <text:p>0.264742860022136</text:p>
          </table:table-cell>
          <table:table-cell office:value-type="float" office:value="0.0264742860022136" calcext:value-type="float">
            <text:p>0.0264742860022136</text:p>
          </table:table-cell>
          <table:table-cell office:value-type="float" office:value="0.380031803273103" calcext:value-type="float">
            <text:p>0.380031803273103</text:p>
          </table:table-cell>
          <table:table-cell office:value-type="float" office:value="0.248397954705523" calcext:value-type="float">
            <text:p>0.248397954705523</text:p>
          </table:table-cell>
          <table:table-cell office:value-type="float" office:value="0.0248397954705523" calcext:value-type="float">
            <text:p>0.02483979547055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70474578134704" calcext:value-type="float">
            <text:p>0.470474578134704</text:p>
          </table:table-cell>
          <table:table-cell office:value-type="float" office:value="0.796354768822895" calcext:value-type="float">
            <text:p>0.796354768822895</text:p>
          </table:table-cell>
          <table:table-cell office:value-type="float" office:value="0.0796354768822895" calcext:value-type="float">
            <text:p>0.0796354768822895</text:p>
          </table:table-cell>
          <table:table-cell office:value-type="float" office:value="0.556716075339967" calcext:value-type="float">
            <text:p>0.556716075339967</text:p>
          </table:table-cell>
          <table:table-cell office:value-type="float" office:value="0.7380376990575" calcext:value-type="float">
            <text:p>0.7380376990575</text:p>
          </table:table-cell>
          <table:table-cell office:value-type="float" office:value="0.07380376990575" calcext:value-type="float">
            <text:p>0.073803769905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05748963673838" calcext:value-type="float">
            <text:p>0.305748963673838</text:p>
          </table:table-cell>
          <table:table-cell office:value-type="float" office:value="0.251853821245804" calcext:value-type="float">
            <text:p>0.251853821245804</text:p>
          </table:table-cell>
          <table:table-cell office:value-type="float" office:value="0.0251853821245804" calcext:value-type="float">
            <text:p>0.0251853821245804</text:p>
          </table:table-cell>
          <table:table-cell office:value-type="float" office:value="0.337560132550806" calcext:value-type="float">
            <text:p>0.337560132550806</text:p>
          </table:table-cell>
          <table:table-cell office:value-type="float" office:value="0.206783030542802" calcext:value-type="float">
            <text:p>0.206783030542802</text:p>
          </table:table-cell>
          <table:table-cell office:value-type="float" office:value="0.0206783030542802" calcext:value-type="float">
            <text:p>0.02067830305428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85506464558544" calcext:value-type="float">
            <text:p>0.285506464558544</text:p>
          </table:table-cell>
          <table:table-cell office:value-type="float" office:value="0.356341547394561" calcext:value-type="float">
            <text:p>0.356341547394561</text:p>
          </table:table-cell>
          <table:table-cell office:value-type="float" office:value="0.0356341547394561" calcext:value-type="float">
            <text:p>0.0356341547394561</text:p>
          </table:table-cell>
          <table:table-cell office:value-type="float" office:value="0.341260777288699" calcext:value-type="float">
            <text:p>0.341260777288699</text:p>
          </table:table-cell>
          <table:table-cell office:value-type="float" office:value="0.302789269996206" calcext:value-type="float">
            <text:p>0.302789269996206</text:p>
          </table:table-cell>
          <table:table-cell office:value-type="float" office:value="0.0302789269996206" calcext:value-type="float">
            <text:p>0.03027892699962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3891026011182" calcext:value-type="float">
            <text:p>0.53891026011182</text:p>
          </table:table-cell>
          <table:table-cell office:value-type="float" office:value="0.412045895818215" calcext:value-type="float">
            <text:p>0.412045895818215</text:p>
          </table:table-cell>
          <table:table-cell office:value-type="float" office:value="0.0412045895818215" calcext:value-type="float">
            <text:p>0.0412045895818215</text:p>
          </table:table-cell>
          <table:table-cell office:value-type="float" office:value="0.548063077787157" calcext:value-type="float">
            <text:p>0.548063077787157</text:p>
          </table:table-cell>
          <table:table-cell office:value-type="float" office:value="0.399665432401721" calcext:value-type="float">
            <text:p>0.399665432401721</text:p>
          </table:table-cell>
          <table:table-cell office:value-type="float" office:value="0.0399665432401721" calcext:value-type="float">
            <text:p>0.03996654324017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99640096115142" calcext:value-type="float">
            <text:p>0.499640096115142</text:p>
          </table:table-cell>
          <table:table-cell office:value-type="float" office:value="0.29412792817803" calcext:value-type="float">
            <text:p>0.29412792817803</text:p>
          </table:table-cell>
          <table:table-cell office:value-type="float" office:value="0.029412792817803" calcext:value-type="float">
            <text:p>0.029412792817803</text:p>
          </table:table-cell>
          <table:table-cell office:value-type="float" office:value="0.499640096115142" calcext:value-type="float">
            <text:p>0.499640096115142</text:p>
          </table:table-cell>
          <table:table-cell office:value-type="float" office:value="0.29412792817803" calcext:value-type="float">
            <text:p>0.29412792817803</text:p>
          </table:table-cell>
          <table:table-cell office:value-type="float" office:value="0.029412792817803" calcext:value-type="float">
            <text:p>0.0294127928178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08972212713543" calcext:value-type="float">
            <text:p>0.408972212713543</text:p>
          </table:table-cell>
          <table:table-cell office:value-type="float" office:value="0.273236884340359" calcext:value-type="float">
            <text:p>0.273236884340359</text:p>
          </table:table-cell>
          <table:table-cell office:value-type="float" office:value="0.0273236884340359" calcext:value-type="float">
            <text:p>0.0273236884340359</text:p>
          </table:table-cell>
          <table:table-cell office:value-type="float" office:value="0.415641456445744" calcext:value-type="float">
            <text:p>0.415641456445744</text:p>
          </table:table-cell>
          <table:table-cell office:value-type="float" office:value="0.262875054757956" calcext:value-type="float">
            <text:p>0.262875054757956</text:p>
          </table:table-cell>
          <table:table-cell office:value-type="float" office:value="0.0262875054757956" calcext:value-type="float">
            <text:p>0.02628750547579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5472736289322" calcext:value-type="float">
            <text:p>0.45472736289322</text:p>
          </table:table-cell>
          <table:table-cell office:value-type="float" office:value="1.44899292616165" calcext:value-type="float">
            <text:p>1.44899292616165</text:p>
          </table:table-cell>
          <table:table-cell office:value-type="float" office:value="0.144899292616165" calcext:value-type="float">
            <text:p>0.144899292616165</text:p>
          </table:table-cell>
          <table:table-cell office:value-type="float" office:value="0.559917605597528" calcext:value-type="float">
            <text:p>0.559917605597528</text:p>
          </table:table-cell>
          <table:table-cell office:value-type="float" office:value="1.41130140692321" calcext:value-type="float">
            <text:p>1.41130140692321</text:p>
          </table:table-cell>
          <table:table-cell office:value-type="float" office:value="0.141130140692321" calcext:value-type="float">
            <text:p>0.1411301406923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06801677448702" calcext:value-type="float">
            <text:p>0.306801677448702</text:p>
          </table:table-cell>
          <table:table-cell office:value-type="float" office:value="0.323668207908531" calcext:value-type="float">
            <text:p>0.323668207908531</text:p>
          </table:table-cell>
          <table:table-cell office:value-type="float" office:value="0.0323668207908531" calcext:value-type="float">
            <text:p>0.0323668207908531</text:p>
          </table:table-cell>
          <table:table-cell office:value-type="float" office:value="0.363935611243336" calcext:value-type="float">
            <text:p>0.363935611243336</text:p>
          </table:table-cell>
          <table:table-cell office:value-type="float" office:value="0.257006146758411" calcext:value-type="float">
            <text:p>0.257006146758411</text:p>
          </table:table-cell>
          <table:table-cell office:value-type="float" office:value="0.0257006146758411" calcext:value-type="float">
            <text:p>0.02570061467584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86103883948925" calcext:value-type="float">
            <text:p>0.286103883948925</text:p>
          </table:table-cell>
          <table:table-cell office:value-type="float" office:value="0.285480713921303" calcext:value-type="float">
            <text:p>0.285480713921303</text:p>
          </table:table-cell>
          <table:table-cell office:value-type="float" office:value="0.0285480713921303" calcext:value-type="float">
            <text:p>0.0285480713921303</text:p>
          </table:table-cell>
          <table:table-cell office:value-type="float" office:value="0.316211124100315" calcext:value-type="float">
            <text:p>0.316211124100315</text:p>
          </table:table-cell>
          <table:table-cell office:value-type="float" office:value="0.251360345479307" calcext:value-type="float">
            <text:p>0.251360345479307</text:p>
          </table:table-cell>
          <table:table-cell office:value-type="float" office:value="0.0251360345479307" calcext:value-type="float">
            <text:p>0.02513603454793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435718207360347" calcext:value-type="float">
            <text:p>-0.0435718207360347</text:p>
          </table:table-cell>
          <table:table-cell office:value-type="float" office:value="0.193829255534729" calcext:value-type="float">
            <text:p>0.193829255534729</text:p>
          </table:table-cell>
          <table:table-cell office:value-type="float" office:value="0.0193829255534729" calcext:value-type="float">
            <text:p>0.0193829255534729</text:p>
          </table:table-cell>
          <table:table-cell office:value-type="float" office:value="0.165121166802723" calcext:value-type="float">
            <text:p>0.165121166802723</text:p>
          </table:table-cell>
          <table:table-cell office:value-type="float" office:value="0.109302593304677" calcext:value-type="float">
            <text:p>0.109302593304677</text:p>
          </table:table-cell>
          <table:table-cell office:value-type="float" office:value="0.0109302593304677" calcext:value-type="float">
            <text:p>0.010930259330467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0681002585821078" calcext:value-type="float">
            <text:p>-0.00681002585821078</text:p>
          </table:table-cell>
          <table:table-cell office:value-type="float" office:value="0.184580771246188" calcext:value-type="float">
            <text:p>0.184580771246188</text:p>
          </table:table-cell>
          <table:table-cell office:value-type="float" office:value="0.0184580771246188" calcext:value-type="float">
            <text:p>0.0184580771246188</text:p>
          </table:table-cell>
          <table:table-cell office:value-type="float" office:value="0.146171102087494" calcext:value-type="float">
            <text:p>0.146171102087494</text:p>
          </table:table-cell>
          <table:table-cell office:value-type="float" office:value="0.111960246685125" calcext:value-type="float">
            <text:p>0.111960246685125</text:p>
          </table:table-cell>
          <table:table-cell office:value-type="float" office:value="0.0111960246685125" calcext:value-type="float">
            <text:p>0.011196024668512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71608158181029" calcext:value-type="float">
            <text:p>-0.071608158181029</text:p>
          </table:table-cell>
          <table:table-cell office:value-type="float" office:value="0.217431729754784" calcext:value-type="float">
            <text:p>0.217431729754784</text:p>
          </table:table-cell>
          <table:table-cell office:value-type="float" office:value="0.0217431729754784" calcext:value-type="float">
            <text:p>0.0217431729754784</text:p>
          </table:table-cell>
          <table:table-cell office:value-type="float" office:value="0.183169669257851" calcext:value-type="float">
            <text:p>0.183169669257851</text:p>
          </table:table-cell>
          <table:table-cell office:value-type="float" office:value="0.13625730307613" calcext:value-type="float">
            <text:p>0.13625730307613</text:p>
          </table:table-cell>
          <table:table-cell office:value-type="float" office:value="0.013625730307613" calcext:value-type="float">
            <text:p>0.0136257303076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181218769291611" calcext:value-type="float">
            <text:p>0.0181218769291611</text:p>
          </table:table-cell>
          <table:table-cell office:value-type="float" office:value="0.246144638157197" calcext:value-type="float">
            <text:p>0.246144638157197</text:p>
          </table:table-cell>
          <table:table-cell office:value-type="float" office:value="0.0246144638157197" calcext:value-type="float">
            <text:p>0.0246144638157197</text:p>
          </table:table-cell>
          <table:table-cell office:value-type="float" office:value="0.197025901022302" calcext:value-type="float">
            <text:p>0.197025901022302</text:p>
          </table:table-cell>
          <table:table-cell office:value-type="float" office:value="0.147334936966412" calcext:value-type="float">
            <text:p>0.147334936966412</text:p>
          </table:table-cell>
          <table:table-cell office:value-type="float" office:value="0.0147334936966412" calcext:value-type="float">
            <text:p>0.01473349369664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432883380777164" calcext:value-type="float">
            <text:p>-0.0432883380777164</text:p>
          </table:table-cell>
          <table:table-cell office:value-type="float" office:value="0.257492331663518" calcext:value-type="float">
            <text:p>0.257492331663518</text:p>
          </table:table-cell>
          <table:table-cell office:value-type="float" office:value="0.0257492331663518" calcext:value-type="float">
            <text:p>0.0257492331663518</text:p>
          </table:table-cell>
          <table:table-cell office:value-type="float" office:value="0.216522875517664" calcext:value-type="float">
            <text:p>0.216522875517664</text:p>
          </table:table-cell>
          <table:table-cell office:value-type="float" office:value="0.144358568890363" calcext:value-type="float">
            <text:p>0.144358568890363</text:p>
          </table:table-cell>
          <table:table-cell office:value-type="float" office:value="0.0144358568890363" calcext:value-type="float">
            <text:p>0.014435856889036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347103251318663" calcext:value-type="float">
            <text:p>-0.0347103251318663</text:p>
          </table:table-cell>
          <table:table-cell office:value-type="float" office:value="0.324869614056007" calcext:value-type="float">
            <text:p>0.324869614056007</text:p>
          </table:table-cell>
          <table:table-cell office:value-type="float" office:value="0.0324869614056007" calcext:value-type="float">
            <text:p>0.0324869614056007</text:p>
          </table:table-cell>
          <table:table-cell office:value-type="float" office:value="0.247550858198106" calcext:value-type="float">
            <text:p>0.247550858198106</text:p>
          </table:table-cell>
          <table:table-cell office:value-type="float" office:value="0.21179426540932" calcext:value-type="float">
            <text:p>0.21179426540932</text:p>
          </table:table-cell>
          <table:table-cell office:value-type="float" office:value="0.021179426540932" calcext:value-type="float">
            <text:p>0.0211794265409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344540227480138" calcext:value-type="float">
            <text:p>-0.0344540227480138</text:p>
          </table:table-cell>
          <table:table-cell office:value-type="float" office:value="0.191171028826898" calcext:value-type="float">
            <text:p>0.191171028826898</text:p>
          </table:table-cell>
          <table:table-cell office:value-type="float" office:value="0.0191171028826898" calcext:value-type="float">
            <text:p>0.0191171028826898</text:p>
          </table:table-cell>
          <table:table-cell office:value-type="float" office:value="0.153913926040423" calcext:value-type="float">
            <text:p>0.153913926040423</text:p>
          </table:table-cell>
          <table:table-cell office:value-type="float" office:value="0.11754423923023" calcext:value-type="float">
            <text:p>0.11754423923023</text:p>
          </table:table-cell>
          <table:table-cell office:value-type="float" office:value="0.011754423923023" calcext:value-type="float">
            <text:p>0.0117544239230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523030557421112" calcext:value-type="float">
            <text:p>-0.0523030557421112</text:p>
          </table:table-cell>
          <table:table-cell office:value-type="float" office:value="0.193699397352792" calcext:value-type="float">
            <text:p>0.193699397352792</text:p>
          </table:table-cell>
          <table:table-cell office:value-type="float" office:value="0.0193699397352792" calcext:value-type="float">
            <text:p>0.0193699397352792</text:p>
          </table:table-cell>
          <table:table-cell office:value-type="float" office:value="0.161807672939153" calcext:value-type="float">
            <text:p>0.161807672939153</text:p>
          </table:table-cell>
          <table:table-cell office:value-type="float" office:value="0.117628711311108" calcext:value-type="float">
            <text:p>0.117628711311108</text:p>
          </table:table-cell>
          <table:table-cell office:value-type="float" office:value="0.0117628711311108" calcext:value-type="float">
            <text:p>0.01176287113111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193332332060551" calcext:value-type="float">
            <text:p>-0.0193332332060551</text:p>
          </table:table-cell>
          <table:table-cell office:value-type="float" office:value="0.189752464274619" calcext:value-type="float">
            <text:p>0.189752464274619</text:p>
          </table:table-cell>
          <table:table-cell office:value-type="float" office:value="0.0189752464274619" calcext:value-type="float">
            <text:p>0.0189752464274619</text:p>
          </table:table-cell>
          <table:table-cell office:value-type="float" office:value="0.144959615444327" calcext:value-type="float">
            <text:p>0.144959615444327</text:p>
          </table:table-cell>
          <table:table-cell office:value-type="float" office:value="0.123117835966489" calcext:value-type="float">
            <text:p>0.123117835966489</text:p>
          </table:table-cell>
          <table:table-cell office:value-type="float" office:value="0.0123117835966489" calcext:value-type="float">
            <text:p>0.01231178359664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372731487514254" calcext:value-type="float">
            <text:p>-0.0372731487514254</text:p>
          </table:table-cell>
          <table:table-cell office:value-type="float" office:value="0.27108089573521" calcext:value-type="float">
            <text:p>0.27108089573521</text:p>
          </table:table-cell>
          <table:table-cell office:value-type="float" office:value="0.027108089573521" calcext:value-type="float">
            <text:p>0.027108089573521</text:p>
          </table:table-cell>
          <table:table-cell office:value-type="float" office:value="0.214359711836772" calcext:value-type="float">
            <text:p>0.214359711836772</text:p>
          </table:table-cell>
          <table:table-cell office:value-type="float" office:value="0.168742242833693" calcext:value-type="float">
            <text:p>0.168742242833693</text:p>
          </table:table-cell>
          <table:table-cell office:value-type="float" office:value="0.0168742242833693" calcext:value-type="float">
            <text:p>0.01687422428336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40008267190949" calcext:value-type="float">
            <text:p>-0.040008267190949</text:p>
          </table:table-cell>
          <table:table-cell office:value-type="float" office:value="0.241071881874991" calcext:value-type="float">
            <text:p>0.241071881874991</text:p>
          </table:table-cell>
          <table:table-cell office:value-type="float" office:value="0.0241071881874991" calcext:value-type="float">
            <text:p>0.0241071881874991</text:p>
          </table:table-cell>
          <table:table-cell office:value-type="float" office:value="0.195708401218508" calcext:value-type="float">
            <text:p>0.195708401218508</text:p>
          </table:table-cell>
          <table:table-cell office:value-type="float" office:value="0.14506487174608" calcext:value-type="float">
            <text:p>0.14506487174608</text:p>
          </table:table-cell>
          <table:table-cell office:value-type="float" office:value="0.014506487174608" calcext:value-type="float">
            <text:p>0.0145064871746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MCR)</text:p>
          </table:table-cell>
          <table:table-cell office:value-type="string" calcext:value-type="string">
            <text:p>deming_mcr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333329030285716" calcext:value-type="float">
            <text:p>-0.0333329030285716</text:p>
          </table:table-cell>
          <table:table-cell office:value-type="float" office:value="0.271618062684683" calcext:value-type="float">
            <text:p>0.271618062684683</text:p>
          </table:table-cell>
          <table:table-cell office:value-type="float" office:value="0.0271618062684683" calcext:value-type="float">
            <text:p>0.0271618062684683</text:p>
          </table:table-cell>
          <table:table-cell office:value-type="float" office:value="0.208477560982944" calcext:value-type="float">
            <text:p>0.208477560982944</text:p>
          </table:table-cell>
          <table:table-cell office:value-type="float" office:value="0.17605898130086" calcext:value-type="float">
            <text:p>0.17605898130086</text:p>
          </table:table-cell>
          <table:table-cell office:value-type="float" office:value="0.017605898130086" calcext:value-type="float">
            <text:p>0.0176058981300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02918279281369" calcext:value-type="float">
            <text:p>0.102918279281369</text:p>
          </table:table-cell>
          <table:table-cell office:value-type="float" office:value="0.253825678943007" calcext:value-type="float">
            <text:p>0.253825678943007</text:p>
          </table:table-cell>
          <table:table-cell office:value-type="float" office:value="0.0253825678943007" calcext:value-type="float">
            <text:p>0.0253825678943007</text:p>
          </table:table-cell>
          <table:table-cell office:value-type="float" office:value="0.21817685568113" calcext:value-type="float">
            <text:p>0.21817685568113</text:p>
          </table:table-cell>
          <table:table-cell office:value-type="float" office:value="0.164452665485101" calcext:value-type="float">
            <text:p>0.164452665485101</text:p>
          </table:table-cell>
          <table:table-cell office:value-type="float" office:value="0.0164452665485101" calcext:value-type="float">
            <text:p>0.016445266548510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39278277130425" calcext:value-type="float">
            <text:p>0.139278277130425</text:p>
          </table:table-cell>
          <table:table-cell office:value-type="float" office:value="0.210376428836507" calcext:value-type="float">
            <text:p>0.210376428836507</text:p>
          </table:table-cell>
          <table:table-cell office:value-type="float" office:value="0.0210376428836507" calcext:value-type="float">
            <text:p>0.0210376428836507</text:p>
          </table:table-cell>
          <table:table-cell office:value-type="float" office:value="0.203414067471711" calcext:value-type="float">
            <text:p>0.203414067471711</text:p>
          </table:table-cell>
          <table:table-cell office:value-type="float" office:value="0.148517301739887" calcext:value-type="float">
            <text:p>0.148517301739887</text:p>
          </table:table-cell>
          <table:table-cell office:value-type="float" office:value="0.0148517301739887" calcext:value-type="float">
            <text:p>0.014851730173988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16592210260953" calcext:value-type="float">
            <text:p>0.216592210260953</text:p>
          </table:table-cell>
          <table:table-cell office:value-type="float" office:value="0.212251127518385" calcext:value-type="float">
            <text:p>0.212251127518385</text:p>
          </table:table-cell>
          <table:table-cell office:value-type="float" office:value="0.0212251127518385" calcext:value-type="float">
            <text:p>0.0212251127518385</text:p>
          </table:table-cell>
          <table:table-cell office:value-type="float" office:value="0.237618470780159" calcext:value-type="float">
            <text:p>0.237618470780159</text:p>
          </table:table-cell>
          <table:table-cell office:value-type="float" office:value="0.188158764928759" calcext:value-type="float">
            <text:p>0.188158764928759</text:p>
          </table:table-cell>
          <table:table-cell office:value-type="float" office:value="0.0188158764928759" calcext:value-type="float">
            <text:p>0.01881587649287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580724121986632" calcext:value-type="float">
            <text:p>0.0580724121986632</text:p>
          </table:table-cell>
          <table:table-cell office:value-type="float" office:value="0.324916778509779" calcext:value-type="float">
            <text:p>0.324916778509779</text:p>
          </table:table-cell>
          <table:table-cell office:value-type="float" office:value="0.0324916778509779" calcext:value-type="float">
            <text:p>0.0324916778509779</text:p>
          </table:table-cell>
          <table:table-cell office:value-type="float" office:value="0.262068838736192" calcext:value-type="float">
            <text:p>0.262068838736192</text:p>
          </table:table-cell>
          <table:table-cell office:value-type="float" office:value="0.199006452993278" calcext:value-type="float">
            <text:p>0.199006452993278</text:p>
          </table:table-cell>
          <table:table-cell office:value-type="float" office:value="0.0199006452993278" calcext:value-type="float">
            <text:p>0.01990064529932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93871627532385" calcext:value-type="float">
            <text:p>0.093871627532385</text:p>
          </table:table-cell>
          <table:table-cell office:value-type="float" office:value="0.26854246430587" calcext:value-type="float">
            <text:p>0.26854246430587</text:p>
          </table:table-cell>
          <table:table-cell office:value-type="float" office:value="0.026854246430587" calcext:value-type="float">
            <text:p>0.026854246430587</text:p>
          </table:table-cell>
          <table:table-cell office:value-type="float" office:value="0.224789686648344" calcext:value-type="float">
            <text:p>0.224789686648344</text:p>
          </table:table-cell>
          <table:table-cell office:value-type="float" office:value="0.173133287290203" calcext:value-type="float">
            <text:p>0.173133287290203</text:p>
          </table:table-cell>
          <table:table-cell office:value-type="float" office:value="0.0173133287290203" calcext:value-type="float">
            <text:p>0.01731332872902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06802597182821" calcext:value-type="float">
            <text:p>0.106802597182821</text:p>
          </table:table-cell>
          <table:table-cell office:value-type="float" office:value="0.254675275112254" calcext:value-type="float">
            <text:p>0.254675275112254</text:p>
          </table:table-cell>
          <table:table-cell office:value-type="float" office:value="0.0254675275112254" calcext:value-type="float">
            <text:p>0.0254675275112254</text:p>
          </table:table-cell>
          <table:table-cell office:value-type="float" office:value="0.211386263641758" calcext:value-type="float">
            <text:p>0.211386263641758</text:p>
          </table:table-cell>
          <table:table-cell office:value-type="float" office:value="0.176765390096306" calcext:value-type="float">
            <text:p>0.176765390096306</text:p>
          </table:table-cell>
          <table:table-cell office:value-type="float" office:value="0.0176765390096306" calcext:value-type="float">
            <text:p>0.01767653900963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60830953625726" calcext:value-type="float">
            <text:p>0.160830953625726</text:p>
          </table:table-cell>
          <table:table-cell office:value-type="float" office:value="0.224197213747905" calcext:value-type="float">
            <text:p>0.224197213747905</text:p>
          </table:table-cell>
          <table:table-cell office:value-type="float" office:value="0.0224197213747905" calcext:value-type="float">
            <text:p>0.0224197213747905</text:p>
          </table:table-cell>
          <table:table-cell office:value-type="float" office:value="0.229764260687948" calcext:value-type="float">
            <text:p>0.229764260687948</text:p>
          </table:table-cell>
          <table:table-cell office:value-type="float" office:value="0.151879560539191" calcext:value-type="float">
            <text:p>0.151879560539191</text:p>
          </table:table-cell>
          <table:table-cell office:value-type="float" office:value="0.0151879560539191" calcext:value-type="float">
            <text:p>0.01518795605391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7535906194813" calcext:value-type="float">
            <text:p>0.17535906194813</text:p>
          </table:table-cell>
          <table:table-cell office:value-type="float" office:value="0.227115145839835" calcext:value-type="float">
            <text:p>0.227115145839835</text:p>
          </table:table-cell>
          <table:table-cell office:value-type="float" office:value="0.0227115145839835" calcext:value-type="float">
            <text:p>0.0227115145839835</text:p>
          </table:table-cell>
          <table:table-cell office:value-type="float" office:value="0.230697735330918" calcext:value-type="float">
            <text:p>0.230697735330918</text:p>
          </table:table-cell>
          <table:table-cell office:value-type="float" office:value="0.169951960222586" calcext:value-type="float">
            <text:p>0.169951960222586</text:p>
          </table:table-cell>
          <table:table-cell office:value-type="float" office:value="0.0169951960222586" calcext:value-type="float">
            <text:p>0.01699519602225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221154583592431" calcext:value-type="float">
            <text:p>0.221154583592431</text:p>
          </table:table-cell>
          <table:table-cell office:value-type="float" office:value="0.243662541549142" calcext:value-type="float">
            <text:p>0.243662541549142</text:p>
          </table:table-cell>
          <table:table-cell office:value-type="float" office:value="0.0243662541549142" calcext:value-type="float">
            <text:p>0.0243662541549142</text:p>
          </table:table-cell>
          <table:table-cell office:value-type="float" office:value="0.267904398786959" calcext:value-type="float">
            <text:p>0.267904398786959</text:p>
          </table:table-cell>
          <table:table-cell office:value-type="float" office:value="0.190465412876477" calcext:value-type="float">
            <text:p>0.190465412876477</text:p>
          </table:table-cell>
          <table:table-cell office:value-type="float" office:value="0.0190465412876477" calcext:value-type="float">
            <text:p>0.019046541287647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11965762149796" calcext:value-type="float">
            <text:p>0.111965762149796</text:p>
          </table:table-cell>
          <table:table-cell office:value-type="float" office:value="0.331006439272051" calcext:value-type="float">
            <text:p>0.331006439272051</text:p>
          </table:table-cell>
          <table:table-cell office:value-type="float" office:value="0.0331006439272051" calcext:value-type="float">
            <text:p>0.0331006439272051</text:p>
          </table:table-cell>
          <table:table-cell office:value-type="float" office:value="0.273260608366822" calcext:value-type="float">
            <text:p>0.273260608366822</text:p>
          </table:table-cell>
          <table:table-cell office:value-type="float" office:value="0.216339104419323" calcext:value-type="float">
            <text:p>0.216339104419323</text:p>
          </table:table-cell>
          <table:table-cell office:value-type="float" office:value="0.0216339104419323" calcext:value-type="float">
            <text:p>0.02163391044193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35594662614189" calcext:value-type="float">
            <text:p>0.135594662614189</text:p>
          </table:table-cell>
          <table:table-cell office:value-type="float" office:value="0.277982121398135" calcext:value-type="float">
            <text:p>0.277982121398135</text:p>
          </table:table-cell>
          <table:table-cell office:value-type="float" office:value="0.0277982121398135" calcext:value-type="float">
            <text:p>0.0277982121398135</text:p>
          </table:table-cell>
          <table:table-cell office:value-type="float" office:value="0.238651412265832" calcext:value-type="float">
            <text:p>0.238651412265832</text:p>
          </table:table-cell>
          <table:table-cell office:value-type="float" office:value="0.195744461257392" calcext:value-type="float">
            <text:p>0.195744461257392</text:p>
          </table:table-cell>
          <table:table-cell office:value-type="float" office:value="0.0195744461257392" calcext:value-type="float">
            <text:p>0.01957444612573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60470006656378" calcext:value-type="float">
            <text:p>0.160470006656378</text:p>
          </table:table-cell>
          <table:table-cell office:value-type="float" office:value="0.277981886359899" calcext:value-type="float">
            <text:p>0.277981886359899</text:p>
          </table:table-cell>
          <table:table-cell office:value-type="float" office:value="0.0277981886359899" calcext:value-type="float">
            <text:p>0.0277981886359899</text:p>
          </table:table-cell>
          <table:table-cell office:value-type="float" office:value="0.240547082488257" calcext:value-type="float">
            <text:p>0.240547082488257</text:p>
          </table:table-cell>
          <table:table-cell office:value-type="float" office:value="0.211748168502333" calcext:value-type="float">
            <text:p>0.211748168502333</text:p>
          </table:table-cell>
          <table:table-cell office:value-type="float" office:value="0.0211748168502333" calcext:value-type="float">
            <text:p>0.02117481685023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27344833363321" calcext:value-type="float">
            <text:p>0.527344833363321</text:p>
          </table:table-cell>
          <table:table-cell office:value-type="float" office:value="0.364761324571409" calcext:value-type="float">
            <text:p>0.364761324571409</text:p>
          </table:table-cell>
          <table:table-cell office:value-type="float" office:value="0.0364761324571409" calcext:value-type="float">
            <text:p>0.0364761324571409</text:p>
          </table:table-cell>
          <table:table-cell office:value-type="float" office:value="0.551029020582277" calcext:value-type="float">
            <text:p>0.551029020582277</text:p>
          </table:table-cell>
          <table:table-cell office:value-type="float" office:value="0.3274941705321" calcext:value-type="float">
            <text:p>0.3274941705321</text:p>
          </table:table-cell>
          <table:table-cell office:value-type="float" office:value="0.03274941705321" calcext:value-type="float">
            <text:p>0.032749417053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11047695243738" calcext:value-type="float">
            <text:p>0.511047695243738</text:p>
          </table:table-cell>
          <table:table-cell office:value-type="float" office:value="0.316627064931682" calcext:value-type="float">
            <text:p>0.316627064931682</text:p>
          </table:table-cell>
          <table:table-cell office:value-type="float" office:value="0.0316627064931682" calcext:value-type="float">
            <text:p>0.0316627064931682</text:p>
          </table:table-cell>
          <table:table-cell office:value-type="float" office:value="0.516673126420995" calcext:value-type="float">
            <text:p>0.516673126420995</text:p>
          </table:table-cell>
          <table:table-cell office:value-type="float" office:value="0.307266867382379" calcext:value-type="float">
            <text:p>0.307266867382379</text:p>
          </table:table-cell>
          <table:table-cell office:value-type="float" office:value="0.0307266867382379" calcext:value-type="float">
            <text:p>0.03072668673823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68946347725469" calcext:value-type="float">
            <text:p>0.368946347725469</text:p>
          </table:table-cell>
          <table:table-cell office:value-type="float" office:value="0.264744742828766" calcext:value-type="float">
            <text:p>0.264744742828766</text:p>
          </table:table-cell>
          <table:table-cell office:value-type="float" office:value="0.0264744742828766" calcext:value-type="float">
            <text:p>0.0264744742828766</text:p>
          </table:table-cell>
          <table:table-cell office:value-type="float" office:value="0.380032751488638" calcext:value-type="float">
            <text:p>0.380032751488638</text:p>
          </table:table-cell>
          <table:table-cell office:value-type="float" office:value="0.248399719340699" calcext:value-type="float">
            <text:p>0.248399719340699</text:p>
          </table:table-cell>
          <table:table-cell office:value-type="float" office:value="0.0248399719340699" calcext:value-type="float">
            <text:p>0.02483997193406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70475339215456" calcext:value-type="float">
            <text:p>0.470475339215456</text:p>
          </table:table-cell>
          <table:table-cell office:value-type="float" office:value="0.796351386664668" calcext:value-type="float">
            <text:p>0.796351386664668</text:p>
          </table:table-cell>
          <table:table-cell office:value-type="float" office:value="0.0796351386664668" calcext:value-type="float">
            <text:p>0.0796351386664668</text:p>
          </table:table-cell>
          <table:table-cell office:value-type="float" office:value="0.556716631977782" calcext:value-type="float">
            <text:p>0.556716631977782</text:p>
          </table:table-cell>
          <table:table-cell office:value-type="float" office:value="0.73803411559312" calcext:value-type="float">
            <text:p>0.73803411559312</text:p>
          </table:table-cell>
          <table:table-cell office:value-type="float" office:value="0.0738034115593119" calcext:value-type="float">
            <text:p>0.07380341155931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05747836594477" calcext:value-type="float">
            <text:p>0.305747836594477</text:p>
          </table:table-cell>
          <table:table-cell office:value-type="float" office:value="0.251853071049161" calcext:value-type="float">
            <text:p>0.251853071049161</text:p>
          </table:table-cell>
          <table:table-cell office:value-type="float" office:value="0.0251853071049161" calcext:value-type="float">
            <text:p>0.0251853071049161</text:p>
          </table:table-cell>
          <table:table-cell office:value-type="float" office:value="0.337558394738162" calcext:value-type="float">
            <text:p>0.337558394738162</text:p>
          </table:table-cell>
          <table:table-cell office:value-type="float" office:value="0.20678329902211" calcext:value-type="float">
            <text:p>0.20678329902211</text:p>
          </table:table-cell>
          <table:table-cell office:value-type="float" office:value="0.020678329902211" calcext:value-type="float">
            <text:p>0.0206783299022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85509173436188" calcext:value-type="float">
            <text:p>0.285509173436188</text:p>
          </table:table-cell>
          <table:table-cell office:value-type="float" office:value="0.356341604077172" calcext:value-type="float">
            <text:p>0.356341604077172</text:p>
          </table:table-cell>
          <table:table-cell office:value-type="float" office:value="0.0356341604077172" calcext:value-type="float">
            <text:p>0.0356341604077172</text:p>
          </table:table-cell>
          <table:table-cell office:value-type="float" office:value="0.341263268689081" calcext:value-type="float">
            <text:p>0.341263268689081</text:p>
          </table:table-cell>
          <table:table-cell office:value-type="float" office:value="0.302789080451384" calcext:value-type="float">
            <text:p>0.302789080451384</text:p>
          </table:table-cell>
          <table:table-cell office:value-type="float" office:value="0.0302789080451384" calcext:value-type="float">
            <text:p>0.03027890804513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38911112603009" calcext:value-type="float">
            <text:p>0.538911112603009</text:p>
          </table:table-cell>
          <table:table-cell office:value-type="float" office:value="0.412044601279802" calcext:value-type="float">
            <text:p>0.412044601279802</text:p>
          </table:table-cell>
          <table:table-cell office:value-type="float" office:value="0.0412044601279802" calcext:value-type="float">
            <text:p>0.0412044601279802</text:p>
          </table:table-cell>
          <table:table-cell office:value-type="float" office:value="0.548064533570729" calcext:value-type="float">
            <text:p>0.548064533570729</text:p>
          </table:table-cell>
          <table:table-cell office:value-type="float" office:value="0.399663242382157" calcext:value-type="float">
            <text:p>0.399663242382157</text:p>
          </table:table-cell>
          <table:table-cell office:value-type="float" office:value="0.0399663242382157" calcext:value-type="float">
            <text:p>0.03996632423821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99640762836695" calcext:value-type="float">
            <text:p>0.499640762836695</text:p>
          </table:table-cell>
          <table:table-cell office:value-type="float" office:value="0.294125375379056" calcext:value-type="float">
            <text:p>0.294125375379056</text:p>
          </table:table-cell>
          <table:table-cell office:value-type="float" office:value="0.0294125375379056" calcext:value-type="float">
            <text:p>0.0294125375379056</text:p>
          </table:table-cell>
          <table:table-cell office:value-type="float" office:value="0.499640762836695" calcext:value-type="float">
            <text:p>0.499640762836695</text:p>
          </table:table-cell>
          <table:table-cell office:value-type="float" office:value="0.294125375379056" calcext:value-type="float">
            <text:p>0.294125375379056</text:p>
          </table:table-cell>
          <table:table-cell office:value-type="float" office:value="0.0294125375379056" calcext:value-type="float">
            <text:p>0.02941253753790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08973801332189" calcext:value-type="float">
            <text:p>0.408973801332189</text:p>
          </table:table-cell>
          <table:table-cell office:value-type="float" office:value="0.273239050039945" calcext:value-type="float">
            <text:p>0.273239050039945</text:p>
          </table:table-cell>
          <table:table-cell office:value-type="float" office:value="0.0273239050039945" calcext:value-type="float">
            <text:p>0.0273239050039945</text:p>
          </table:table-cell>
          <table:table-cell office:value-type="float" office:value="0.415642967206456" calcext:value-type="float">
            <text:p>0.415642967206456</text:p>
          </table:table-cell>
          <table:table-cell office:value-type="float" office:value="0.262877389459168" calcext:value-type="float">
            <text:p>0.262877389459168</text:p>
          </table:table-cell>
          <table:table-cell office:value-type="float" office:value="0.0262877389459168" calcext:value-type="float">
            <text:p>0.02628773894591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54727363255015" calcext:value-type="float">
            <text:p>0.454727363255015</text:p>
          </table:table-cell>
          <table:table-cell office:value-type="float" office:value="1.44899260619695" calcext:value-type="float">
            <text:p>1.44899260619695</text:p>
          </table:table-cell>
          <table:table-cell office:value-type="float" office:value="0.144899260619695" calcext:value-type="float">
            <text:p>0.144899260619695</text:p>
          </table:table-cell>
          <table:table-cell office:value-type="float" office:value="0.559916751093722" calcext:value-type="float">
            <text:p>0.559916751093722</text:p>
          </table:table-cell>
          <table:table-cell office:value-type="float" office:value="1.41130142096971" calcext:value-type="float">
            <text:p>1.41130142096971</text:p>
          </table:table-cell>
          <table:table-cell office:value-type="float" office:value="0.141130142096971" calcext:value-type="float">
            <text:p>0.1411301420969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06803620291711" calcext:value-type="float">
            <text:p>0.306803620291711</text:p>
          </table:table-cell>
          <table:table-cell office:value-type="float" office:value="0.323667357648782" calcext:value-type="float">
            <text:p>0.323667357648782</text:p>
          </table:table-cell>
          <table:table-cell office:value-type="float" office:value="0.0323667357648782" calcext:value-type="float">
            <text:p>0.0323667357648782</text:p>
          </table:table-cell>
          <table:table-cell office:value-type="float" office:value="0.363936126367903" calcext:value-type="float">
            <text:p>0.363936126367903</text:p>
          </table:table-cell>
          <table:table-cell office:value-type="float" office:value="0.257006681852567" calcext:value-type="float">
            <text:p>0.257006681852567</text:p>
          </table:table-cell>
          <table:table-cell office:value-type="float" office:value="0.0257006681852567" calcext:value-type="float">
            <text:p>0.025700668185256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86106856327137" calcext:value-type="float">
            <text:p>0.286106856327137</text:p>
          </table:table-cell>
          <table:table-cell office:value-type="float" office:value="0.28548082410052" calcext:value-type="float">
            <text:p>0.28548082410052</text:p>
          </table:table-cell>
          <table:table-cell office:value-type="float" office:value="0.028548082410052" calcext:value-type="float">
            <text:p>0.028548082410052</text:p>
          </table:table-cell>
          <table:table-cell office:value-type="float" office:value="0.316213704283577" calcext:value-type="float">
            <text:p>0.316213704283577</text:p>
          </table:table-cell>
          <table:table-cell office:value-type="float" office:value="0.251360609364068" calcext:value-type="float">
            <text:p>0.251360609364068</text:p>
          </table:table-cell>
          <table:table-cell office:value-type="float" office:value="0.0251360609364068" calcext:value-type="float">
            <text:p>0.025136060936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12348115088127" calcext:value-type="float">
            <text:p>1.12348115088127</text:p>
          </table:table-cell>
          <table:table-cell office:value-type="float" office:value="0.568904281237988" calcext:value-type="float">
            <text:p>0.568904281237988</text:p>
          </table:table-cell>
          <table:table-cell office:value-type="float" office:value="0.0568904281237988" calcext:value-type="float">
            <text:p>0.0568904281237988</text:p>
          </table:table-cell>
          <table:table-cell office:value-type="float" office:value="1.12348115088127" calcext:value-type="float">
            <text:p>1.12348115088127</text:p>
          </table:table-cell>
          <table:table-cell office:value-type="float" office:value="0.568904281237988" calcext:value-type="float">
            <text:p>0.568904281237988</text:p>
          </table:table-cell>
          <table:table-cell office:value-type="float" office:value="0.0568904281237988" calcext:value-type="float">
            <text:p>0.05689042812379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694583885944338" calcext:value-type="float">
            <text:p>0.694583885944338</text:p>
          </table:table-cell>
          <table:table-cell office:value-type="float" office:value="0.283518174271651" calcext:value-type="float">
            <text:p>0.283518174271651</text:p>
          </table:table-cell>
          <table:table-cell office:value-type="float" office:value="0.0283518174271651" calcext:value-type="float">
            <text:p>0.0283518174271651</text:p>
          </table:table-cell>
          <table:table-cell office:value-type="float" office:value="0.694583885944338" calcext:value-type="float">
            <text:p>0.694583885944338</text:p>
          </table:table-cell>
          <table:table-cell office:value-type="float" office:value="0.283518174271651" calcext:value-type="float">
            <text:p>0.283518174271651</text:p>
          </table:table-cell>
          <table:table-cell office:value-type="float" office:value="0.0283518174271651" calcext:value-type="float">
            <text:p>0.028351817427165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499951066400928" calcext:value-type="float">
            <text:p>0.499951066400928</text:p>
          </table:table-cell>
          <table:table-cell office:value-type="float" office:value="0.28230356218319" calcext:value-type="float">
            <text:p>0.28230356218319</text:p>
          </table:table-cell>
          <table:table-cell office:value-type="float" office:value="0.028230356218319" calcext:value-type="float">
            <text:p>0.028230356218319</text:p>
          </table:table-cell>
          <table:table-cell office:value-type="float" office:value="0.501016822451896" calcext:value-type="float">
            <text:p>0.501016822451896</text:p>
          </table:table-cell>
          <table:table-cell office:value-type="float" office:value="0.28038854827682" calcext:value-type="float">
            <text:p>0.28038854827682</text:p>
          </table:table-cell>
          <table:table-cell office:value-type="float" office:value="0.028038854827682" calcext:value-type="float">
            <text:p>0.0280388548276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854820484770367" calcext:value-type="float">
            <text:p>0.854820484770367</text:p>
          </table:table-cell>
          <table:table-cell office:value-type="float" office:value="0.927274237178583" calcext:value-type="float">
            <text:p>0.927274237178583</text:p>
          </table:table-cell>
          <table:table-cell office:value-type="float" office:value="0.0927274237178583" calcext:value-type="float">
            <text:p>0.0927274237178583</text:p>
          </table:table-cell>
          <table:table-cell office:value-type="float" office:value="0.979630373429659" calcext:value-type="float">
            <text:p>0.979630373429659</text:p>
          </table:table-cell>
          <table:table-cell office:value-type="float" office:value="0.792822300687588" calcext:value-type="float">
            <text:p>0.792822300687588</text:p>
          </table:table-cell>
          <table:table-cell office:value-type="float" office:value="0.0792822300687588" calcext:value-type="float">
            <text:p>0.07928223006875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576006582995993" calcext:value-type="float">
            <text:p>0.576006582995993</text:p>
          </table:table-cell>
          <table:table-cell office:value-type="float" office:value="0.419810054124297" calcext:value-type="float">
            <text:p>0.419810054124297</text:p>
          </table:table-cell>
          <table:table-cell office:value-type="float" office:value="0.0419810054124297" calcext:value-type="float">
            <text:p>0.0419810054124297</text:p>
          </table:table-cell>
          <table:table-cell office:value-type="float" office:value="0.577823594426802" calcext:value-type="float">
            <text:p>0.577823594426802</text:p>
          </table:table-cell>
          <table:table-cell office:value-type="float" office:value="0.417280219907531" calcext:value-type="float">
            <text:p>0.417280219907531</text:p>
          </table:table-cell>
          <table:table-cell office:value-type="float" office:value="0.0417280219907531" calcext:value-type="float">
            <text:p>0.04172802199075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19393327163751" calcext:value-type="float">
            <text:p>0.419393327163751</text:p>
          </table:table-cell>
          <table:table-cell office:value-type="float" office:value="0.395859883680482" calcext:value-type="float">
            <text:p>0.395859883680482</text:p>
          </table:table-cell>
          <table:table-cell office:value-type="float" office:value="0.0395859883680482" calcext:value-type="float">
            <text:p>0.0395859883680482</text:p>
          </table:table-cell>
          <table:table-cell office:value-type="float" office:value="0.446025880130037" calcext:value-type="float">
            <text:p>0.446025880130037</text:p>
          </table:table-cell>
          <table:table-cell office:value-type="float" office:value="0.365272382324543" calcext:value-type="float">
            <text:p>0.365272382324543</text:p>
          </table:table-cell>
          <table:table-cell office:value-type="float" office:value="0.0365272382324543" calcext:value-type="float">
            <text:p>0.03652723823245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.51224079746956" calcext:value-type="float">
            <text:p>1.51224079746956</text:p>
          </table:table-cell>
          <table:table-cell office:value-type="float" office:value="2.64419573255902" calcext:value-type="float">
            <text:p>2.64419573255902</text:p>
          </table:table-cell>
          <table:table-cell office:value-type="float" office:value="0.264419573255902" calcext:value-type="float">
            <text:p>0.264419573255902</text:p>
          </table:table-cell>
          <table:table-cell office:value-type="float" office:value="1.51224079746956" calcext:value-type="float">
            <text:p>1.51224079746956</text:p>
          </table:table-cell>
          <table:table-cell office:value-type="float" office:value="2.64419573255902" calcext:value-type="float">
            <text:p>2.64419573255902</text:p>
          </table:table-cell>
          <table:table-cell office:value-type="float" office:value="0.264419573255902" calcext:value-type="float">
            <text:p>0.2644195732559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707841084140061" calcext:value-type="float">
            <text:p>0.707841084140061</text:p>
          </table:table-cell>
          <table:table-cell office:value-type="float" office:value="0.319140291423241" calcext:value-type="float">
            <text:p>0.319140291423241</text:p>
          </table:table-cell>
          <table:table-cell office:value-type="float" office:value="0.0319140291423241" calcext:value-type="float">
            <text:p>0.0319140291423241</text:p>
          </table:table-cell>
          <table:table-cell office:value-type="float" office:value="0.707841084140061" calcext:value-type="float">
            <text:p>0.707841084140061</text:p>
          </table:table-cell>
          <table:table-cell office:value-type="float" office:value="0.319140291423241" calcext:value-type="float">
            <text:p>0.319140291423241</text:p>
          </table:table-cell>
          <table:table-cell office:value-type="float" office:value="0.0319140291423241" calcext:value-type="float">
            <text:p>0.0319140291423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83979191055547" calcext:value-type="float">
            <text:p>0.583979191055547</text:p>
          </table:table-cell>
          <table:table-cell office:value-type="float" office:value="0.260058188729151" calcext:value-type="float">
            <text:p>0.260058188729151</text:p>
          </table:table-cell>
          <table:table-cell office:value-type="float" office:value="0.0260058188729151" calcext:value-type="float">
            <text:p>0.0260058188729151</text:p>
          </table:table-cell>
          <table:table-cell office:value-type="float" office:value="0.584967556228739" calcext:value-type="float">
            <text:p>0.584967556228739</text:p>
          </table:table-cell>
          <table:table-cell office:value-type="float" office:value="0.257804664633071" calcext:value-type="float">
            <text:p>0.257804664633071</text:p>
          </table:table-cell>
          <table:table-cell office:value-type="float" office:value="0.0257804664633071" calcext:value-type="float">
            <text:p>0.02578046646330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20006553605552" calcext:value-type="float">
            <text:p>0.320006553605552</text:p>
          </table:table-cell>
          <table:table-cell office:value-type="float" office:value="6.01322346580246" calcext:value-type="float">
            <text:p>6.01322346580246</text:p>
          </table:table-cell>
          <table:table-cell office:value-type="float" office:value="0.601322346580246" calcext:value-type="float">
            <text:p>0.601322346580246</text:p>
          </table:table-cell>
          <table:table-cell office:value-type="float" office:value="1.83550958739188" calcext:value-type="float">
            <text:p>1.83550958739188</text:p>
          </table:table-cell>
          <table:table-cell office:value-type="float" office:value="5.73229171599776" calcext:value-type="float">
            <text:p>5.73229171599776</text:p>
          </table:table-cell>
          <table:table-cell office:value-type="float" office:value="0.573229171599776" calcext:value-type="float">
            <text:p>0.5732291715997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85269127614314" calcext:value-type="float">
            <text:p>0.485269127614314</text:p>
          </table:table-cell>
          <table:table-cell office:value-type="float" office:value="0.30540672970475" calcext:value-type="float">
            <text:p>0.30540672970475</text:p>
          </table:table-cell>
          <table:table-cell office:value-type="float" office:value="0.030540672970475" calcext:value-type="float">
            <text:p>0.030540672970475</text:p>
          </table:table-cell>
          <table:table-cell office:value-type="float" office:value="0.489562516349993" calcext:value-type="float">
            <text:p>0.489562516349993</text:p>
          </table:table-cell>
          <table:table-cell office:value-type="float" office:value="0.298405199815368" calcext:value-type="float">
            <text:p>0.298405199815368</text:p>
          </table:table-cell>
          <table:table-cell office:value-type="float" office:value="0.0298405199815368" calcext:value-type="float">
            <text:p>0.02984051998153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Std)</text:p>
          </table:table-cell>
          <table:table-cell office:value-type="string" calcext:value-type="string">
            <text:p>deming_s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1982066807187" calcext:value-type="float">
            <text:p>0.41982066807187</text:p>
          </table:table-cell>
          <table:table-cell office:value-type="float" office:value="0.305086698496892" calcext:value-type="float">
            <text:p>0.305086698496892</text:p>
          </table:table-cell>
          <table:table-cell office:value-type="float" office:value="0.0305086698496892" calcext:value-type="float">
            <text:p>0.0305086698496892</text:p>
          </table:table-cell>
          <table:table-cell office:value-type="float" office:value="0.431184166190242" calcext:value-type="float">
            <text:p>0.431184166190242</text:p>
          </table:table-cell>
          <table:table-cell office:value-type="float" office:value="0.288634407237402" calcext:value-type="float">
            <text:p>0.288634407237402</text:p>
          </table:table-cell>
          <table:table-cell office:value-type="float" office:value="0.0288634407237402" calcext:value-type="float">
            <text:p>0.02886344072374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02918279281369" calcext:value-type="float">
            <text:p>0.102918279281369</text:p>
          </table:table-cell>
          <table:table-cell office:value-type="float" office:value="0.253825678943007" calcext:value-type="float">
            <text:p>0.253825678943007</text:p>
          </table:table-cell>
          <table:table-cell office:value-type="float" office:value="0.0253825678943007" calcext:value-type="float">
            <text:p>0.0253825678943007</text:p>
          </table:table-cell>
          <table:table-cell office:value-type="float" office:value="0.21817685568113" calcext:value-type="float">
            <text:p>0.21817685568113</text:p>
          </table:table-cell>
          <table:table-cell office:value-type="float" office:value="0.164452665485101" calcext:value-type="float">
            <text:p>0.164452665485101</text:p>
          </table:table-cell>
          <table:table-cell office:value-type="float" office:value="0.0164452665485101" calcext:value-type="float">
            <text:p>0.016445266548510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39278277130425" calcext:value-type="float">
            <text:p>0.139278277130425</text:p>
          </table:table-cell>
          <table:table-cell office:value-type="float" office:value="0.210376428836507" calcext:value-type="float">
            <text:p>0.210376428836507</text:p>
          </table:table-cell>
          <table:table-cell office:value-type="float" office:value="0.0210376428836507" calcext:value-type="float">
            <text:p>0.0210376428836507</text:p>
          </table:table-cell>
          <table:table-cell office:value-type="float" office:value="0.203414067471711" calcext:value-type="float">
            <text:p>0.203414067471711</text:p>
          </table:table-cell>
          <table:table-cell office:value-type="float" office:value="0.148517301739887" calcext:value-type="float">
            <text:p>0.148517301739887</text:p>
          </table:table-cell>
          <table:table-cell office:value-type="float" office:value="0.0148517301739887" calcext:value-type="float">
            <text:p>0.014851730173988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16592210260953" calcext:value-type="float">
            <text:p>0.216592210260953</text:p>
          </table:table-cell>
          <table:table-cell office:value-type="float" office:value="0.212251127518385" calcext:value-type="float">
            <text:p>0.212251127518385</text:p>
          </table:table-cell>
          <table:table-cell office:value-type="float" office:value="0.0212251127518385" calcext:value-type="float">
            <text:p>0.0212251127518385</text:p>
          </table:table-cell>
          <table:table-cell office:value-type="float" office:value="0.237618470780159" calcext:value-type="float">
            <text:p>0.237618470780159</text:p>
          </table:table-cell>
          <table:table-cell office:value-type="float" office:value="0.188158764928759" calcext:value-type="float">
            <text:p>0.188158764928759</text:p>
          </table:table-cell>
          <table:table-cell office:value-type="float" office:value="0.0188158764928759" calcext:value-type="float">
            <text:p>0.01881587649287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580724121986632" calcext:value-type="float">
            <text:p>0.0580724121986632</text:p>
          </table:table-cell>
          <table:table-cell office:value-type="float" office:value="0.324916778509779" calcext:value-type="float">
            <text:p>0.324916778509779</text:p>
          </table:table-cell>
          <table:table-cell office:value-type="float" office:value="0.0324916778509779" calcext:value-type="float">
            <text:p>0.0324916778509779</text:p>
          </table:table-cell>
          <table:table-cell office:value-type="float" office:value="0.262068838736192" calcext:value-type="float">
            <text:p>0.262068838736192</text:p>
          </table:table-cell>
          <table:table-cell office:value-type="float" office:value="0.199006452993278" calcext:value-type="float">
            <text:p>0.199006452993278</text:p>
          </table:table-cell>
          <table:table-cell office:value-type="float" office:value="0.0199006452993278" calcext:value-type="float">
            <text:p>0.01990064529932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93871627532385" calcext:value-type="float">
            <text:p>0.093871627532385</text:p>
          </table:table-cell>
          <table:table-cell office:value-type="float" office:value="0.26854246430587" calcext:value-type="float">
            <text:p>0.26854246430587</text:p>
          </table:table-cell>
          <table:table-cell office:value-type="float" office:value="0.026854246430587" calcext:value-type="float">
            <text:p>0.026854246430587</text:p>
          </table:table-cell>
          <table:table-cell office:value-type="float" office:value="0.224789686648344" calcext:value-type="float">
            <text:p>0.224789686648344</text:p>
          </table:table-cell>
          <table:table-cell office:value-type="float" office:value="0.173133287290203" calcext:value-type="float">
            <text:p>0.173133287290203</text:p>
          </table:table-cell>
          <table:table-cell office:value-type="float" office:value="0.0173133287290203" calcext:value-type="float">
            <text:p>0.01731332872902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06802597182821" calcext:value-type="float">
            <text:p>0.106802597182821</text:p>
          </table:table-cell>
          <table:table-cell office:value-type="float" office:value="0.254675275112254" calcext:value-type="float">
            <text:p>0.254675275112254</text:p>
          </table:table-cell>
          <table:table-cell office:value-type="float" office:value="0.0254675275112254" calcext:value-type="float">
            <text:p>0.0254675275112254</text:p>
          </table:table-cell>
          <table:table-cell office:value-type="float" office:value="0.211386263641758" calcext:value-type="float">
            <text:p>0.211386263641758</text:p>
          </table:table-cell>
          <table:table-cell office:value-type="float" office:value="0.176765390096306" calcext:value-type="float">
            <text:p>0.176765390096306</text:p>
          </table:table-cell>
          <table:table-cell office:value-type="float" office:value="0.0176765390096306" calcext:value-type="float">
            <text:p>0.01767653900963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60830953625726" calcext:value-type="float">
            <text:p>0.160830953625726</text:p>
          </table:table-cell>
          <table:table-cell office:value-type="float" office:value="0.224197213747905" calcext:value-type="float">
            <text:p>0.224197213747905</text:p>
          </table:table-cell>
          <table:table-cell office:value-type="float" office:value="0.0224197213747905" calcext:value-type="float">
            <text:p>0.0224197213747905</text:p>
          </table:table-cell>
          <table:table-cell office:value-type="float" office:value="0.229764260687948" calcext:value-type="float">
            <text:p>0.229764260687948</text:p>
          </table:table-cell>
          <table:table-cell office:value-type="float" office:value="0.151879560539191" calcext:value-type="float">
            <text:p>0.151879560539191</text:p>
          </table:table-cell>
          <table:table-cell office:value-type="float" office:value="0.0151879560539191" calcext:value-type="float">
            <text:p>0.01518795605391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7535906194813" calcext:value-type="float">
            <text:p>0.17535906194813</text:p>
          </table:table-cell>
          <table:table-cell office:value-type="float" office:value="0.227115145839835" calcext:value-type="float">
            <text:p>0.227115145839835</text:p>
          </table:table-cell>
          <table:table-cell office:value-type="float" office:value="0.0227115145839835" calcext:value-type="float">
            <text:p>0.0227115145839835</text:p>
          </table:table-cell>
          <table:table-cell office:value-type="float" office:value="0.230697735330918" calcext:value-type="float">
            <text:p>0.230697735330918</text:p>
          </table:table-cell>
          <table:table-cell office:value-type="float" office:value="0.169951960222586" calcext:value-type="float">
            <text:p>0.169951960222586</text:p>
          </table:table-cell>
          <table:table-cell office:value-type="float" office:value="0.0169951960222586" calcext:value-type="float">
            <text:p>0.01699519602225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221154583592431" calcext:value-type="float">
            <text:p>0.221154583592431</text:p>
          </table:table-cell>
          <table:table-cell office:value-type="float" office:value="0.243662541549142" calcext:value-type="float">
            <text:p>0.243662541549142</text:p>
          </table:table-cell>
          <table:table-cell office:value-type="float" office:value="0.0243662541549142" calcext:value-type="float">
            <text:p>0.0243662541549142</text:p>
          </table:table-cell>
          <table:table-cell office:value-type="float" office:value="0.267904398786959" calcext:value-type="float">
            <text:p>0.267904398786959</text:p>
          </table:table-cell>
          <table:table-cell office:value-type="float" office:value="0.190465412876477" calcext:value-type="float">
            <text:p>0.190465412876477</text:p>
          </table:table-cell>
          <table:table-cell office:value-type="float" office:value="0.0190465412876477" calcext:value-type="float">
            <text:p>0.019046541287647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11965762149796" calcext:value-type="float">
            <text:p>0.111965762149796</text:p>
          </table:table-cell>
          <table:table-cell office:value-type="float" office:value="0.331006439272051" calcext:value-type="float">
            <text:p>0.331006439272051</text:p>
          </table:table-cell>
          <table:table-cell office:value-type="float" office:value="0.0331006439272051" calcext:value-type="float">
            <text:p>0.0331006439272051</text:p>
          </table:table-cell>
          <table:table-cell office:value-type="float" office:value="0.273260608366822" calcext:value-type="float">
            <text:p>0.273260608366822</text:p>
          </table:table-cell>
          <table:table-cell office:value-type="float" office:value="0.216339104419323" calcext:value-type="float">
            <text:p>0.216339104419323</text:p>
          </table:table-cell>
          <table:table-cell office:value-type="float" office:value="0.0216339104419323" calcext:value-type="float">
            <text:p>0.02163391044193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35594662614189" calcext:value-type="float">
            <text:p>0.135594662614189</text:p>
          </table:table-cell>
          <table:table-cell office:value-type="float" office:value="0.277982121398135" calcext:value-type="float">
            <text:p>0.277982121398135</text:p>
          </table:table-cell>
          <table:table-cell office:value-type="float" office:value="0.0277982121398135" calcext:value-type="float">
            <text:p>0.0277982121398135</text:p>
          </table:table-cell>
          <table:table-cell office:value-type="float" office:value="0.238651412265832" calcext:value-type="float">
            <text:p>0.238651412265832</text:p>
          </table:table-cell>
          <table:table-cell office:value-type="float" office:value="0.195744461257392" calcext:value-type="float">
            <text:p>0.195744461257392</text:p>
          </table:table-cell>
          <table:table-cell office:value-type="float" office:value="0.0195744461257392" calcext:value-type="float">
            <text:p>0.01957444612573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60470006656378" calcext:value-type="float">
            <text:p>0.160470006656378</text:p>
          </table:table-cell>
          <table:table-cell office:value-type="float" office:value="0.277981886359899" calcext:value-type="float">
            <text:p>0.277981886359899</text:p>
          </table:table-cell>
          <table:table-cell office:value-type="float" office:value="0.0277981886359899" calcext:value-type="float">
            <text:p>0.0277981886359899</text:p>
          </table:table-cell>
          <table:table-cell office:value-type="float" office:value="0.240547082488257" calcext:value-type="float">
            <text:p>0.240547082488257</text:p>
          </table:table-cell>
          <table:table-cell office:value-type="float" office:value="0.211748168502333" calcext:value-type="float">
            <text:p>0.211748168502333</text:p>
          </table:table-cell>
          <table:table-cell office:value-type="float" office:value="0.0211748168502333" calcext:value-type="float">
            <text:p>0.02117481685023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27344833363321" calcext:value-type="float">
            <text:p>0.527344833363321</text:p>
          </table:table-cell>
          <table:table-cell office:value-type="float" office:value="0.364761324571409" calcext:value-type="float">
            <text:p>0.364761324571409</text:p>
          </table:table-cell>
          <table:table-cell office:value-type="float" office:value="0.0364761324571409" calcext:value-type="float">
            <text:p>0.0364761324571409</text:p>
          </table:table-cell>
          <table:table-cell office:value-type="float" office:value="0.551029020582277" calcext:value-type="float">
            <text:p>0.551029020582277</text:p>
          </table:table-cell>
          <table:table-cell office:value-type="float" office:value="0.3274941705321" calcext:value-type="float">
            <text:p>0.3274941705321</text:p>
          </table:table-cell>
          <table:table-cell office:value-type="float" office:value="0.03274941705321" calcext:value-type="float">
            <text:p>0.032749417053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11047695243738" calcext:value-type="float">
            <text:p>0.511047695243738</text:p>
          </table:table-cell>
          <table:table-cell office:value-type="float" office:value="0.316627064931682" calcext:value-type="float">
            <text:p>0.316627064931682</text:p>
          </table:table-cell>
          <table:table-cell office:value-type="float" office:value="0.0316627064931682" calcext:value-type="float">
            <text:p>0.0316627064931682</text:p>
          </table:table-cell>
          <table:table-cell office:value-type="float" office:value="0.516673126420995" calcext:value-type="float">
            <text:p>0.516673126420995</text:p>
          </table:table-cell>
          <table:table-cell office:value-type="float" office:value="0.307266867382379" calcext:value-type="float">
            <text:p>0.307266867382379</text:p>
          </table:table-cell>
          <table:table-cell office:value-type="float" office:value="0.0307266867382379" calcext:value-type="float">
            <text:p>0.03072668673823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68946347725469" calcext:value-type="float">
            <text:p>0.368946347725469</text:p>
          </table:table-cell>
          <table:table-cell office:value-type="float" office:value="0.264744742828766" calcext:value-type="float">
            <text:p>0.264744742828766</text:p>
          </table:table-cell>
          <table:table-cell office:value-type="float" office:value="0.0264744742828766" calcext:value-type="float">
            <text:p>0.0264744742828766</text:p>
          </table:table-cell>
          <table:table-cell office:value-type="float" office:value="0.380032751488638" calcext:value-type="float">
            <text:p>0.380032751488638</text:p>
          </table:table-cell>
          <table:table-cell office:value-type="float" office:value="0.248399719340699" calcext:value-type="float">
            <text:p>0.248399719340699</text:p>
          </table:table-cell>
          <table:table-cell office:value-type="float" office:value="0.0248399719340699" calcext:value-type="float">
            <text:p>0.02483997193406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70475339215456" calcext:value-type="float">
            <text:p>0.470475339215456</text:p>
          </table:table-cell>
          <table:table-cell office:value-type="float" office:value="0.796351386664668" calcext:value-type="float">
            <text:p>0.796351386664668</text:p>
          </table:table-cell>
          <table:table-cell office:value-type="float" office:value="0.0796351386664668" calcext:value-type="float">
            <text:p>0.0796351386664668</text:p>
          </table:table-cell>
          <table:table-cell office:value-type="float" office:value="0.556716631977782" calcext:value-type="float">
            <text:p>0.556716631977782</text:p>
          </table:table-cell>
          <table:table-cell office:value-type="float" office:value="0.73803411559312" calcext:value-type="float">
            <text:p>0.73803411559312</text:p>
          </table:table-cell>
          <table:table-cell office:value-type="float" office:value="0.0738034115593119" calcext:value-type="float">
            <text:p>0.07380341155931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05747836594477" calcext:value-type="float">
            <text:p>0.305747836594477</text:p>
          </table:table-cell>
          <table:table-cell office:value-type="float" office:value="0.251853071049161" calcext:value-type="float">
            <text:p>0.251853071049161</text:p>
          </table:table-cell>
          <table:table-cell office:value-type="float" office:value="0.0251853071049161" calcext:value-type="float">
            <text:p>0.0251853071049161</text:p>
          </table:table-cell>
          <table:table-cell office:value-type="float" office:value="0.337558394738162" calcext:value-type="float">
            <text:p>0.337558394738162</text:p>
          </table:table-cell>
          <table:table-cell office:value-type="float" office:value="0.20678329902211" calcext:value-type="float">
            <text:p>0.20678329902211</text:p>
          </table:table-cell>
          <table:table-cell office:value-type="float" office:value="0.020678329902211" calcext:value-type="float">
            <text:p>0.0206783299022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85509173436188" calcext:value-type="float">
            <text:p>0.285509173436188</text:p>
          </table:table-cell>
          <table:table-cell office:value-type="float" office:value="0.356341604077172" calcext:value-type="float">
            <text:p>0.356341604077172</text:p>
          </table:table-cell>
          <table:table-cell office:value-type="float" office:value="0.0356341604077172" calcext:value-type="float">
            <text:p>0.0356341604077172</text:p>
          </table:table-cell>
          <table:table-cell office:value-type="float" office:value="0.341263268689081" calcext:value-type="float">
            <text:p>0.341263268689081</text:p>
          </table:table-cell>
          <table:table-cell office:value-type="float" office:value="0.302789080451384" calcext:value-type="float">
            <text:p>0.302789080451384</text:p>
          </table:table-cell>
          <table:table-cell office:value-type="float" office:value="0.0302789080451384" calcext:value-type="float">
            <text:p>0.03027890804513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38911112603009" calcext:value-type="float">
            <text:p>0.538911112603009</text:p>
          </table:table-cell>
          <table:table-cell office:value-type="float" office:value="0.412044601279802" calcext:value-type="float">
            <text:p>0.412044601279802</text:p>
          </table:table-cell>
          <table:table-cell office:value-type="float" office:value="0.0412044601279802" calcext:value-type="float">
            <text:p>0.0412044601279802</text:p>
          </table:table-cell>
          <table:table-cell office:value-type="float" office:value="0.548064533570729" calcext:value-type="float">
            <text:p>0.548064533570729</text:p>
          </table:table-cell>
          <table:table-cell office:value-type="float" office:value="0.399663242382157" calcext:value-type="float">
            <text:p>0.399663242382157</text:p>
          </table:table-cell>
          <table:table-cell office:value-type="float" office:value="0.0399663242382157" calcext:value-type="float">
            <text:p>0.03996632423821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99640762836695" calcext:value-type="float">
            <text:p>0.499640762836695</text:p>
          </table:table-cell>
          <table:table-cell office:value-type="float" office:value="0.294125375379056" calcext:value-type="float">
            <text:p>0.294125375379056</text:p>
          </table:table-cell>
          <table:table-cell office:value-type="float" office:value="0.0294125375379056" calcext:value-type="float">
            <text:p>0.0294125375379056</text:p>
          </table:table-cell>
          <table:table-cell office:value-type="float" office:value="0.499640762836695" calcext:value-type="float">
            <text:p>0.499640762836695</text:p>
          </table:table-cell>
          <table:table-cell office:value-type="float" office:value="0.294125375379056" calcext:value-type="float">
            <text:p>0.294125375379056</text:p>
          </table:table-cell>
          <table:table-cell office:value-type="float" office:value="0.0294125375379056" calcext:value-type="float">
            <text:p>0.02941253753790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08973801332189" calcext:value-type="float">
            <text:p>0.408973801332189</text:p>
          </table:table-cell>
          <table:table-cell office:value-type="float" office:value="0.273239050039945" calcext:value-type="float">
            <text:p>0.273239050039945</text:p>
          </table:table-cell>
          <table:table-cell office:value-type="float" office:value="0.0273239050039945" calcext:value-type="float">
            <text:p>0.0273239050039945</text:p>
          </table:table-cell>
          <table:table-cell office:value-type="float" office:value="0.415642967206456" calcext:value-type="float">
            <text:p>0.415642967206456</text:p>
          </table:table-cell>
          <table:table-cell office:value-type="float" office:value="0.262877389459168" calcext:value-type="float">
            <text:p>0.262877389459168</text:p>
          </table:table-cell>
          <table:table-cell office:value-type="float" office:value="0.0262877389459168" calcext:value-type="float">
            <text:p>0.02628773894591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54727363255015" calcext:value-type="float">
            <text:p>0.454727363255015</text:p>
          </table:table-cell>
          <table:table-cell office:value-type="float" office:value="1.44899260619695" calcext:value-type="float">
            <text:p>1.44899260619695</text:p>
          </table:table-cell>
          <table:table-cell office:value-type="float" office:value="0.144899260619695" calcext:value-type="float">
            <text:p>0.144899260619695</text:p>
          </table:table-cell>
          <table:table-cell office:value-type="float" office:value="0.559916751093722" calcext:value-type="float">
            <text:p>0.559916751093722</text:p>
          </table:table-cell>
          <table:table-cell office:value-type="float" office:value="1.41130142096971" calcext:value-type="float">
            <text:p>1.41130142096971</text:p>
          </table:table-cell>
          <table:table-cell office:value-type="float" office:value="0.141130142096971" calcext:value-type="float">
            <text:p>0.1411301420969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06803620291711" calcext:value-type="float">
            <text:p>0.306803620291711</text:p>
          </table:table-cell>
          <table:table-cell office:value-type="float" office:value="0.323667357648782" calcext:value-type="float">
            <text:p>0.323667357648782</text:p>
          </table:table-cell>
          <table:table-cell office:value-type="float" office:value="0.0323667357648782" calcext:value-type="float">
            <text:p>0.0323667357648782</text:p>
          </table:table-cell>
          <table:table-cell office:value-type="float" office:value="0.363936126367903" calcext:value-type="float">
            <text:p>0.363936126367903</text:p>
          </table:table-cell>
          <table:table-cell office:value-type="float" office:value="0.257006681852567" calcext:value-type="float">
            <text:p>0.257006681852567</text:p>
          </table:table-cell>
          <table:table-cell office:value-type="float" office:value="0.0257006681852567" calcext:value-type="float">
            <text:p>0.025700668185256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86106856327137" calcext:value-type="float">
            <text:p>0.286106856327137</text:p>
          </table:table-cell>
          <table:table-cell office:value-type="float" office:value="0.28548082410052" calcext:value-type="float">
            <text:p>0.28548082410052</text:p>
          </table:table-cell>
          <table:table-cell office:value-type="float" office:value="0.028548082410052" calcext:value-type="float">
            <text:p>0.028548082410052</text:p>
          </table:table-cell>
          <table:table-cell office:value-type="float" office:value="0.316213704283577" calcext:value-type="float">
            <text:p>0.316213704283577</text:p>
          </table:table-cell>
          <table:table-cell office:value-type="float" office:value="0.251360609364068" calcext:value-type="float">
            <text:p>0.251360609364068</text:p>
          </table:table-cell>
          <table:table-cell office:value-type="float" office:value="0.0251360609364068" calcext:value-type="float">
            <text:p>0.025136060936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12348115088127" calcext:value-type="float">
            <text:p>1.12348115088127</text:p>
          </table:table-cell>
          <table:table-cell office:value-type="float" office:value="0.568904281237988" calcext:value-type="float">
            <text:p>0.568904281237988</text:p>
          </table:table-cell>
          <table:table-cell office:value-type="float" office:value="0.0568904281237988" calcext:value-type="float">
            <text:p>0.0568904281237988</text:p>
          </table:table-cell>
          <table:table-cell office:value-type="float" office:value="1.12348115088127" calcext:value-type="float">
            <text:p>1.12348115088127</text:p>
          </table:table-cell>
          <table:table-cell office:value-type="float" office:value="0.568904281237988" calcext:value-type="float">
            <text:p>0.568904281237988</text:p>
          </table:table-cell>
          <table:table-cell office:value-type="float" office:value="0.0568904281237988" calcext:value-type="float">
            <text:p>0.05689042812379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694583885944338" calcext:value-type="float">
            <text:p>0.694583885944338</text:p>
          </table:table-cell>
          <table:table-cell office:value-type="float" office:value="0.283518174271651" calcext:value-type="float">
            <text:p>0.283518174271651</text:p>
          </table:table-cell>
          <table:table-cell office:value-type="float" office:value="0.0283518174271651" calcext:value-type="float">
            <text:p>0.0283518174271651</text:p>
          </table:table-cell>
          <table:table-cell office:value-type="float" office:value="0.694583885944338" calcext:value-type="float">
            <text:p>0.694583885944338</text:p>
          </table:table-cell>
          <table:table-cell office:value-type="float" office:value="0.283518174271651" calcext:value-type="float">
            <text:p>0.283518174271651</text:p>
          </table:table-cell>
          <table:table-cell office:value-type="float" office:value="0.0283518174271651" calcext:value-type="float">
            <text:p>0.028351817427165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499951066400928" calcext:value-type="float">
            <text:p>0.499951066400928</text:p>
          </table:table-cell>
          <table:table-cell office:value-type="float" office:value="0.28230356218319" calcext:value-type="float">
            <text:p>0.28230356218319</text:p>
          </table:table-cell>
          <table:table-cell office:value-type="float" office:value="0.028230356218319" calcext:value-type="float">
            <text:p>0.028230356218319</text:p>
          </table:table-cell>
          <table:table-cell office:value-type="float" office:value="0.501016822451896" calcext:value-type="float">
            <text:p>0.501016822451896</text:p>
          </table:table-cell>
          <table:table-cell office:value-type="float" office:value="0.28038854827682" calcext:value-type="float">
            <text:p>0.28038854827682</text:p>
          </table:table-cell>
          <table:table-cell office:value-type="float" office:value="0.028038854827682" calcext:value-type="float">
            <text:p>0.0280388548276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854820484770367" calcext:value-type="float">
            <text:p>0.854820484770367</text:p>
          </table:table-cell>
          <table:table-cell office:value-type="float" office:value="0.927274237178583" calcext:value-type="float">
            <text:p>0.927274237178583</text:p>
          </table:table-cell>
          <table:table-cell office:value-type="float" office:value="0.0927274237178583" calcext:value-type="float">
            <text:p>0.0927274237178583</text:p>
          </table:table-cell>
          <table:table-cell office:value-type="float" office:value="0.979630373429659" calcext:value-type="float">
            <text:p>0.979630373429659</text:p>
          </table:table-cell>
          <table:table-cell office:value-type="float" office:value="0.792822300687588" calcext:value-type="float">
            <text:p>0.792822300687588</text:p>
          </table:table-cell>
          <table:table-cell office:value-type="float" office:value="0.0792822300687588" calcext:value-type="float">
            <text:p>0.07928223006875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576006582995993" calcext:value-type="float">
            <text:p>0.576006582995993</text:p>
          </table:table-cell>
          <table:table-cell office:value-type="float" office:value="0.419810054124297" calcext:value-type="float">
            <text:p>0.419810054124297</text:p>
          </table:table-cell>
          <table:table-cell office:value-type="float" office:value="0.0419810054124297" calcext:value-type="float">
            <text:p>0.0419810054124297</text:p>
          </table:table-cell>
          <table:table-cell office:value-type="float" office:value="0.577823594426802" calcext:value-type="float">
            <text:p>0.577823594426802</text:p>
          </table:table-cell>
          <table:table-cell office:value-type="float" office:value="0.417280219907531" calcext:value-type="float">
            <text:p>0.417280219907531</text:p>
          </table:table-cell>
          <table:table-cell office:value-type="float" office:value="0.0417280219907531" calcext:value-type="float">
            <text:p>0.04172802199075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19393327163751" calcext:value-type="float">
            <text:p>0.419393327163751</text:p>
          </table:table-cell>
          <table:table-cell office:value-type="float" office:value="0.395859883680482" calcext:value-type="float">
            <text:p>0.395859883680482</text:p>
          </table:table-cell>
          <table:table-cell office:value-type="float" office:value="0.0395859883680482" calcext:value-type="float">
            <text:p>0.0395859883680482</text:p>
          </table:table-cell>
          <table:table-cell office:value-type="float" office:value="0.446025880130037" calcext:value-type="float">
            <text:p>0.446025880130037</text:p>
          </table:table-cell>
          <table:table-cell office:value-type="float" office:value="0.365272382324543" calcext:value-type="float">
            <text:p>0.365272382324543</text:p>
          </table:table-cell>
          <table:table-cell office:value-type="float" office:value="0.0365272382324543" calcext:value-type="float">
            <text:p>0.03652723823245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.51224079746956" calcext:value-type="float">
            <text:p>1.51224079746956</text:p>
          </table:table-cell>
          <table:table-cell office:value-type="float" office:value="2.64419573255902" calcext:value-type="float">
            <text:p>2.64419573255902</text:p>
          </table:table-cell>
          <table:table-cell office:value-type="float" office:value="0.264419573255902" calcext:value-type="float">
            <text:p>0.264419573255902</text:p>
          </table:table-cell>
          <table:table-cell office:value-type="float" office:value="1.51224079746956" calcext:value-type="float">
            <text:p>1.51224079746956</text:p>
          </table:table-cell>
          <table:table-cell office:value-type="float" office:value="2.64419573255902" calcext:value-type="float">
            <text:p>2.64419573255902</text:p>
          </table:table-cell>
          <table:table-cell office:value-type="float" office:value="0.264419573255902" calcext:value-type="float">
            <text:p>0.2644195732559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707841084140061" calcext:value-type="float">
            <text:p>0.707841084140061</text:p>
          </table:table-cell>
          <table:table-cell office:value-type="float" office:value="0.319140291423241" calcext:value-type="float">
            <text:p>0.319140291423241</text:p>
          </table:table-cell>
          <table:table-cell office:value-type="float" office:value="0.0319140291423241" calcext:value-type="float">
            <text:p>0.0319140291423241</text:p>
          </table:table-cell>
          <table:table-cell office:value-type="float" office:value="0.707841084140061" calcext:value-type="float">
            <text:p>0.707841084140061</text:p>
          </table:table-cell>
          <table:table-cell office:value-type="float" office:value="0.319140291423241" calcext:value-type="float">
            <text:p>0.319140291423241</text:p>
          </table:table-cell>
          <table:table-cell office:value-type="float" office:value="0.0319140291423241" calcext:value-type="float">
            <text:p>0.0319140291423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83979191055547" calcext:value-type="float">
            <text:p>0.583979191055547</text:p>
          </table:table-cell>
          <table:table-cell office:value-type="float" office:value="0.260058188729151" calcext:value-type="float">
            <text:p>0.260058188729151</text:p>
          </table:table-cell>
          <table:table-cell office:value-type="float" office:value="0.0260058188729151" calcext:value-type="float">
            <text:p>0.0260058188729151</text:p>
          </table:table-cell>
          <table:table-cell office:value-type="float" office:value="0.584967556228739" calcext:value-type="float">
            <text:p>0.584967556228739</text:p>
          </table:table-cell>
          <table:table-cell office:value-type="float" office:value="0.257804664633071" calcext:value-type="float">
            <text:p>0.257804664633071</text:p>
          </table:table-cell>
          <table:table-cell office:value-type="float" office:value="0.0257804664633071" calcext:value-type="float">
            <text:p>0.02578046646330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20006553605552" calcext:value-type="float">
            <text:p>0.320006553605552</text:p>
          </table:table-cell>
          <table:table-cell office:value-type="float" office:value="6.01322346580246" calcext:value-type="float">
            <text:p>6.01322346580246</text:p>
          </table:table-cell>
          <table:table-cell office:value-type="float" office:value="0.601322346580246" calcext:value-type="float">
            <text:p>0.601322346580246</text:p>
          </table:table-cell>
          <table:table-cell office:value-type="float" office:value="1.83550958739188" calcext:value-type="float">
            <text:p>1.83550958739188</text:p>
          </table:table-cell>
          <table:table-cell office:value-type="float" office:value="5.73229171599776" calcext:value-type="float">
            <text:p>5.73229171599776</text:p>
          </table:table-cell>
          <table:table-cell office:value-type="float" office:value="0.573229171599776" calcext:value-type="float">
            <text:p>0.5732291715997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85269127614314" calcext:value-type="float">
            <text:p>0.485269127614314</text:p>
          </table:table-cell>
          <table:table-cell office:value-type="float" office:value="0.30540672970475" calcext:value-type="float">
            <text:p>0.30540672970475</text:p>
          </table:table-cell>
          <table:table-cell office:value-type="float" office:value="0.030540672970475" calcext:value-type="float">
            <text:p>0.030540672970475</text:p>
          </table:table-cell>
          <table:table-cell office:value-type="float" office:value="0.489562516349993" calcext:value-type="float">
            <text:p>0.489562516349993</text:p>
          </table:table-cell>
          <table:table-cell office:value-type="float" office:value="0.298405199815368" calcext:value-type="float">
            <text:p>0.298405199815368</text:p>
          </table:table-cell>
          <table:table-cell office:value-type="float" office:value="0.0298405199815368" calcext:value-type="float">
            <text:p>0.02984051998153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ming (Wtd)</text:p>
          </table:table-cell>
          <table:table-cell office:value-type="string" calcext:value-type="string">
            <text:p>deming_wtd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1982066807187" calcext:value-type="float">
            <text:p>0.41982066807187</text:p>
          </table:table-cell>
          <table:table-cell office:value-type="float" office:value="0.305086698496892" calcext:value-type="float">
            <text:p>0.305086698496892</text:p>
          </table:table-cell>
          <table:table-cell office:value-type="float" office:value="0.0305086698496892" calcext:value-type="float">
            <text:p>0.0305086698496892</text:p>
          </table:table-cell>
          <table:table-cell office:value-type="float" office:value="0.431184166190242" calcext:value-type="float">
            <text:p>0.431184166190242</text:p>
          </table:table-cell>
          <table:table-cell office:value-type="float" office:value="0.288634407237402" calcext:value-type="float">
            <text:p>0.288634407237402</text:p>
          </table:table-cell>
          <table:table-cell office:value-type="float" office:value="0.0288634407237402" calcext:value-type="float">
            <text:p>0.02886344072374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760497630281646" calcext:value-type="float">
            <text:p>0.760497630281646</text:p>
          </table:table-cell>
          <table:table-cell office:value-type="float" office:value="0.496486688491648" calcext:value-type="float">
            <text:p>0.496486688491648</text:p>
          </table:table-cell>
          <table:table-cell office:value-type="float" office:value="0.0496486688491648" calcext:value-type="float">
            <text:p>0.0496486688491648</text:p>
          </table:table-cell>
          <table:table-cell office:value-type="float" office:value="0.764436584120087" calcext:value-type="float">
            <text:p>0.764436584120087</text:p>
          </table:table-cell>
          <table:table-cell office:value-type="float" office:value="0.490338366014302" calcext:value-type="float">
            <text:p>0.490338366014302</text:p>
          </table:table-cell>
          <table:table-cell office:value-type="float" office:value="0.0490338366014302" calcext:value-type="float">
            <text:p>0.04903383660143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60714891463334" calcext:value-type="float">
            <text:p>0.60714891463334</text:p>
          </table:table-cell>
          <table:table-cell office:value-type="float" office:value="0.294259758522108" calcext:value-type="float">
            <text:p>0.294259758522108</text:p>
          </table:table-cell>
          <table:table-cell office:value-type="float" office:value="0.0294259758522108" calcext:value-type="float">
            <text:p>0.0294259758522108</text:p>
          </table:table-cell>
          <table:table-cell office:value-type="float" office:value="0.608839816573299" calcext:value-type="float">
            <text:p>0.608839816573299</text:p>
          </table:table-cell>
          <table:table-cell office:value-type="float" office:value="0.290709337509515" calcext:value-type="float">
            <text:p>0.290709337509515</text:p>
          </table:table-cell>
          <table:table-cell office:value-type="float" office:value="0.0290709337509515" calcext:value-type="float">
            <text:p>0.02907093375095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40140583103323" calcext:value-type="float">
            <text:p>0.540140583103323</text:p>
          </table:table-cell>
          <table:table-cell office:value-type="float" office:value="0.230750065576683" calcext:value-type="float">
            <text:p>0.230750065576683</text:p>
          </table:table-cell>
          <table:table-cell office:value-type="float" office:value="0.0230750065576683" calcext:value-type="float">
            <text:p>0.0230750065576683</text:p>
          </table:table-cell>
          <table:table-cell office:value-type="float" office:value="0.540140583103323" calcext:value-type="float">
            <text:p>0.540140583103323</text:p>
          </table:table-cell>
          <table:table-cell office:value-type="float" office:value="0.230750065576683" calcext:value-type="float">
            <text:p>0.230750065576683</text:p>
          </table:table-cell>
          <table:table-cell office:value-type="float" office:value="0.0230750065576683" calcext:value-type="float">
            <text:p>0.023075006557668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79728052939047" calcext:value-type="float">
            <text:p>0.479728052939047</text:p>
          </table:table-cell>
          <table:table-cell office:value-type="float" office:value="0.731101996333148" calcext:value-type="float">
            <text:p>0.731101996333148</text:p>
          </table:table-cell>
          <table:table-cell office:value-type="float" office:value="0.0731101996333148" calcext:value-type="float">
            <text:p>0.0731101996333148</text:p>
          </table:table-cell>
          <table:table-cell office:value-type="float" office:value="0.598108305716552" calcext:value-type="float">
            <text:p>0.598108305716552</text:p>
          </table:table-cell>
          <table:table-cell office:value-type="float" office:value="0.636888337708064" calcext:value-type="float">
            <text:p>0.636888337708064</text:p>
          </table:table-cell>
          <table:table-cell office:value-type="float" office:value="0.0636888337708064" calcext:value-type="float">
            <text:p>0.06368883377080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23798511897165" calcext:value-type="float">
            <text:p>0.423798511897165</text:p>
          </table:table-cell>
          <table:table-cell office:value-type="float" office:value="0.304782127764217" calcext:value-type="float">
            <text:p>0.304782127764217</text:p>
          </table:table-cell>
          <table:table-cell office:value-type="float" office:value="0.0304782127764217" calcext:value-type="float">
            <text:p>0.0304782127764217</text:p>
          </table:table-cell>
          <table:table-cell office:value-type="float" office:value="0.436772124489905" calcext:value-type="float">
            <text:p>0.436772124489905</text:p>
          </table:table-cell>
          <table:table-cell office:value-type="float" office:value="0.285682797015097" calcext:value-type="float">
            <text:p>0.285682797015097</text:p>
          </table:table-cell>
          <table:table-cell office:value-type="float" office:value="0.0285682797015097" calcext:value-type="float">
            <text:p>0.02856827970150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72582237703618" calcext:value-type="float">
            <text:p>0.372582237703618</text:p>
          </table:table-cell>
          <table:table-cell office:value-type="float" office:value="0.276107255774487" calcext:value-type="float">
            <text:p>0.276107255774487</text:p>
          </table:table-cell>
          <table:table-cell office:value-type="float" office:value="0.0276107255774487" calcext:value-type="float">
            <text:p>0.0276107255774487</text:p>
          </table:table-cell>
          <table:table-cell office:value-type="float" office:value="0.384412075575074" calcext:value-type="float">
            <text:p>0.384412075575074</text:p>
          </table:table-cell>
          <table:table-cell office:value-type="float" office:value="0.259209646691794" calcext:value-type="float">
            <text:p>0.259209646691794</text:p>
          </table:table-cell>
          <table:table-cell office:value-type="float" office:value="0.0259209646691794" calcext:value-type="float">
            <text:p>0.02592096466917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8188381526002" calcext:value-type="float">
            <text:p>0.8188381526002</text:p>
          </table:table-cell>
          <table:table-cell office:value-type="float" office:value="0.437050485752691" calcext:value-type="float">
            <text:p>0.437050485752691</text:p>
          </table:table-cell>
          <table:table-cell office:value-type="float" office:value="0.0437050485752691" calcext:value-type="float">
            <text:p>0.0437050485752691</text:p>
          </table:table-cell>
          <table:table-cell office:value-type="float" office:value="0.819473344122877" calcext:value-type="float">
            <text:p>0.819473344122877</text:p>
          </table:table-cell>
          <table:table-cell office:value-type="float" office:value="0.435846273348056" calcext:value-type="float">
            <text:p>0.435846273348056</text:p>
          </table:table-cell>
          <table:table-cell office:value-type="float" office:value="0.0435846273348056" calcext:value-type="float">
            <text:p>0.04358462733480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603278826505466" calcext:value-type="float">
            <text:p>0.603278826505466</text:p>
          </table:table-cell>
          <table:table-cell office:value-type="float" office:value="0.281222393028061" calcext:value-type="float">
            <text:p>0.281222393028061</text:p>
          </table:table-cell>
          <table:table-cell office:value-type="float" office:value="0.0281222393028061" calcext:value-type="float">
            <text:p>0.0281222393028061</text:p>
          </table:table-cell>
          <table:table-cell office:value-type="float" office:value="0.603278826505466" calcext:value-type="float">
            <text:p>0.603278826505466</text:p>
          </table:table-cell>
          <table:table-cell office:value-type="float" office:value="0.281222393028061" calcext:value-type="float">
            <text:p>0.281222393028061</text:p>
          </table:table-cell>
          <table:table-cell office:value-type="float" office:value="0.0281222393028061" calcext:value-type="float">
            <text:p>0.028122239302806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26914367206546" calcext:value-type="float">
            <text:p>0.526914367206546</text:p>
          </table:table-cell>
          <table:table-cell office:value-type="float" office:value="0.2536309869034" calcext:value-type="float">
            <text:p>0.2536309869034</text:p>
          </table:table-cell>
          <table:table-cell office:value-type="float" office:value="0.02536309869034" calcext:value-type="float">
            <text:p>0.02536309869034</text:p>
          </table:table-cell>
          <table:table-cell office:value-type="float" office:value="0.527949779211373" calcext:value-type="float">
            <text:p>0.527949779211373</text:p>
          </table:table-cell>
          <table:table-cell office:value-type="float" office:value="0.25144666631668" calcext:value-type="float">
            <text:p>0.25144666631668</text:p>
          </table:table-cell>
          <table:table-cell office:value-type="float" office:value="0.025144666631668" calcext:value-type="float">
            <text:p>0.0251446666316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507772460354794" calcext:value-type="float">
            <text:p>0.507772460354794</text:p>
          </table:table-cell>
          <table:table-cell office:value-type="float" office:value="0.681312043961743" calcext:value-type="float">
            <text:p>0.681312043961743</text:p>
          </table:table-cell>
          <table:table-cell office:value-type="float" office:value="0.0681312043961743" calcext:value-type="float">
            <text:p>0.0681312043961743</text:p>
          </table:table-cell>
          <table:table-cell office:value-type="float" office:value="0.597343693027489" calcext:value-type="float">
            <text:p>0.597343693027489</text:p>
          </table:table-cell>
          <table:table-cell office:value-type="float" office:value="0.603489536225135" calcext:value-type="float">
            <text:p>0.603489536225135</text:p>
          </table:table-cell>
          <table:table-cell office:value-type="float" office:value="0.0603489536225135" calcext:value-type="float">
            <text:p>0.060348953622513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45293972516923" calcext:value-type="float">
            <text:p>0.445293972516923</text:p>
          </table:table-cell>
          <table:table-cell office:value-type="float" office:value="0.311339510887379" calcext:value-type="float">
            <text:p>0.311339510887379</text:p>
          </table:table-cell>
          <table:table-cell office:value-type="float" office:value="0.0311339510887379" calcext:value-type="float">
            <text:p>0.0311339510887379</text:p>
          </table:table-cell>
          <table:table-cell office:value-type="float" office:value="0.449114064945795" calcext:value-type="float">
            <text:p>0.449114064945795</text:p>
          </table:table-cell>
          <table:table-cell office:value-type="float" office:value="0.305746720882279" calcext:value-type="float">
            <text:p>0.305746720882279</text:p>
          </table:table-cell>
          <table:table-cell office:value-type="float" office:value="0.0305746720882279" calcext:value-type="float">
            <text:p>0.03057467208822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91884330906216" calcext:value-type="float">
            <text:p>0.391884330906216</text:p>
          </table:table-cell>
          <table:table-cell office:value-type="float" office:value="0.278556451076941" calcext:value-type="float">
            <text:p>0.278556451076941</text:p>
          </table:table-cell>
          <table:table-cell office:value-type="float" office:value="0.0278556451076941" calcext:value-type="float">
            <text:p>0.0278556451076941</text:p>
          </table:table-cell>
          <table:table-cell office:value-type="float" office:value="0.399010613242275" calcext:value-type="float">
            <text:p>0.399010613242275</text:p>
          </table:table-cell>
          <table:table-cell office:value-type="float" office:value="0.268142919079688" calcext:value-type="float">
            <text:p>0.268142919079688</text:p>
          </table:table-cell>
          <table:table-cell office:value-type="float" office:value="0.0268142919079688" calcext:value-type="float">
            <text:p>0.02681429190796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27344658341306" calcext:value-type="float">
            <text:p>0.527344658341306</text:p>
          </table:table-cell>
          <table:table-cell office:value-type="float" office:value="0.364761839577426" calcext:value-type="float">
            <text:p>0.364761839577426</text:p>
          </table:table-cell>
          <table:table-cell office:value-type="float" office:value="0.0364761839577426" calcext:value-type="float">
            <text:p>0.0364761839577426</text:p>
          </table:table-cell>
          <table:table-cell office:value-type="float" office:value="0.551028877999477" calcext:value-type="float">
            <text:p>0.551028877999477</text:p>
          </table:table-cell>
          <table:table-cell office:value-type="float" office:value="0.327494701796199" calcext:value-type="float">
            <text:p>0.327494701796199</text:p>
          </table:table-cell>
          <table:table-cell office:value-type="float" office:value="0.0327494701796199" calcext:value-type="float">
            <text:p>0.03274947017961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11047693060897" calcext:value-type="float">
            <text:p>0.511047693060897</text:p>
          </table:table-cell>
          <table:table-cell office:value-type="float" office:value="0.316628199771095" calcext:value-type="float">
            <text:p>0.316628199771095</text:p>
          </table:table-cell>
          <table:table-cell office:value-type="float" office:value="0.0316628199771095" calcext:value-type="float">
            <text:p>0.0316628199771095</text:p>
          </table:table-cell>
          <table:table-cell office:value-type="float" office:value="0.516672758043877" calcext:value-type="float">
            <text:p>0.516672758043877</text:p>
          </table:table-cell>
          <table:table-cell office:value-type="float" office:value="0.307268658809265" calcext:value-type="float">
            <text:p>0.307268658809265</text:p>
          </table:table-cell>
          <table:table-cell office:value-type="float" office:value="0.0307268658809265" calcext:value-type="float">
            <text:p>0.03072686588092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68945532360133" calcext:value-type="float">
            <text:p>0.368945532360133</text:p>
          </table:table-cell>
          <table:table-cell office:value-type="float" office:value="0.264742860022135" calcext:value-type="float">
            <text:p>0.264742860022135</text:p>
          </table:table-cell>
          <table:table-cell office:value-type="float" office:value="0.0264742860022135" calcext:value-type="float">
            <text:p>0.0264742860022135</text:p>
          </table:table-cell>
          <table:table-cell office:value-type="float" office:value="0.380031803273103" calcext:value-type="float">
            <text:p>0.380031803273103</text:p>
          </table:table-cell>
          <table:table-cell office:value-type="float" office:value="0.248397954705523" calcext:value-type="float">
            <text:p>0.248397954705523</text:p>
          </table:table-cell>
          <table:table-cell office:value-type="float" office:value="0.0248397954705523" calcext:value-type="float">
            <text:p>0.02483979547055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70474578134704" calcext:value-type="float">
            <text:p>0.470474578134704</text:p>
          </table:table-cell>
          <table:table-cell office:value-type="float" office:value="0.796354768822895" calcext:value-type="float">
            <text:p>0.796354768822895</text:p>
          </table:table-cell>
          <table:table-cell office:value-type="float" office:value="0.0796354768822895" calcext:value-type="float">
            <text:p>0.0796354768822895</text:p>
          </table:table-cell>
          <table:table-cell office:value-type="float" office:value="0.556716075339967" calcext:value-type="float">
            <text:p>0.556716075339967</text:p>
          </table:table-cell>
          <table:table-cell office:value-type="float" office:value="0.7380376990575" calcext:value-type="float">
            <text:p>0.7380376990575</text:p>
          </table:table-cell>
          <table:table-cell office:value-type="float" office:value="0.07380376990575" calcext:value-type="float">
            <text:p>0.073803769905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05748963673838" calcext:value-type="float">
            <text:p>0.305748963673838</text:p>
          </table:table-cell>
          <table:table-cell office:value-type="float" office:value="0.251853821245804" calcext:value-type="float">
            <text:p>0.251853821245804</text:p>
          </table:table-cell>
          <table:table-cell office:value-type="float" office:value="0.0251853821245804" calcext:value-type="float">
            <text:p>0.0251853821245804</text:p>
          </table:table-cell>
          <table:table-cell office:value-type="float" office:value="0.337560132550806" calcext:value-type="float">
            <text:p>0.337560132550806</text:p>
          </table:table-cell>
          <table:table-cell office:value-type="float" office:value="0.206783030542802" calcext:value-type="float">
            <text:p>0.206783030542802</text:p>
          </table:table-cell>
          <table:table-cell office:value-type="float" office:value="0.0206783030542802" calcext:value-type="float">
            <text:p>0.02067830305428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85506464558544" calcext:value-type="float">
            <text:p>0.285506464558544</text:p>
          </table:table-cell>
          <table:table-cell office:value-type="float" office:value="0.35634154739456" calcext:value-type="float">
            <text:p>0.35634154739456</text:p>
          </table:table-cell>
          <table:table-cell office:value-type="float" office:value="0.035634154739456" calcext:value-type="float">
            <text:p>0.035634154739456</text:p>
          </table:table-cell>
          <table:table-cell office:value-type="float" office:value="0.341260777288699" calcext:value-type="float">
            <text:p>0.341260777288699</text:p>
          </table:table-cell>
          <table:table-cell office:value-type="float" office:value="0.302789269996205" calcext:value-type="float">
            <text:p>0.302789269996205</text:p>
          </table:table-cell>
          <table:table-cell office:value-type="float" office:value="0.0302789269996205" calcext:value-type="float">
            <text:p>0.0302789269996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3891026011182" calcext:value-type="float">
            <text:p>0.53891026011182</text:p>
          </table:table-cell>
          <table:table-cell office:value-type="float" office:value="0.412045895818216" calcext:value-type="float">
            <text:p>0.412045895818216</text:p>
          </table:table-cell>
          <table:table-cell office:value-type="float" office:value="0.0412045895818216" calcext:value-type="float">
            <text:p>0.0412045895818216</text:p>
          </table:table-cell>
          <table:table-cell office:value-type="float" office:value="0.548063077787158" calcext:value-type="float">
            <text:p>0.548063077787158</text:p>
          </table:table-cell>
          <table:table-cell office:value-type="float" office:value="0.399665432401722" calcext:value-type="float">
            <text:p>0.399665432401722</text:p>
          </table:table-cell>
          <table:table-cell office:value-type="float" office:value="0.0399665432401722" calcext:value-type="float">
            <text:p>0.03996654324017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99640096115142" calcext:value-type="float">
            <text:p>0.499640096115142</text:p>
          </table:table-cell>
          <table:table-cell office:value-type="float" office:value="0.29412792817803" calcext:value-type="float">
            <text:p>0.29412792817803</text:p>
          </table:table-cell>
          <table:table-cell office:value-type="float" office:value="0.029412792817803" calcext:value-type="float">
            <text:p>0.029412792817803</text:p>
          </table:table-cell>
          <table:table-cell office:value-type="float" office:value="0.499640096115142" calcext:value-type="float">
            <text:p>0.499640096115142</text:p>
          </table:table-cell>
          <table:table-cell office:value-type="float" office:value="0.29412792817803" calcext:value-type="float">
            <text:p>0.29412792817803</text:p>
          </table:table-cell>
          <table:table-cell office:value-type="float" office:value="0.029412792817803" calcext:value-type="float">
            <text:p>0.0294127928178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08972212713543" calcext:value-type="float">
            <text:p>0.408972212713543</text:p>
          </table:table-cell>
          <table:table-cell office:value-type="float" office:value="0.273236884340359" calcext:value-type="float">
            <text:p>0.273236884340359</text:p>
          </table:table-cell>
          <table:table-cell office:value-type="float" office:value="0.0273236884340359" calcext:value-type="float">
            <text:p>0.0273236884340359</text:p>
          </table:table-cell>
          <table:table-cell office:value-type="float" office:value="0.415641456445744" calcext:value-type="float">
            <text:p>0.415641456445744</text:p>
          </table:table-cell>
          <table:table-cell office:value-type="float" office:value="0.262875054757957" calcext:value-type="float">
            <text:p>0.262875054757957</text:p>
          </table:table-cell>
          <table:table-cell office:value-type="float" office:value="0.0262875054757957" calcext:value-type="float">
            <text:p>0.02628750547579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54727362893215" calcext:value-type="float">
            <text:p>0.454727362893215</text:p>
          </table:table-cell>
          <table:table-cell office:value-type="float" office:value="1.44899292616161" calcext:value-type="float">
            <text:p>1.44899292616161</text:p>
          </table:table-cell>
          <table:table-cell office:value-type="float" office:value="0.144899292616161" calcext:value-type="float">
            <text:p>0.144899292616161</text:p>
          </table:table-cell>
          <table:table-cell office:value-type="float" office:value="0.559917605597523" calcext:value-type="float">
            <text:p>0.559917605597523</text:p>
          </table:table-cell>
          <table:table-cell office:value-type="float" office:value="1.41130140692316" calcext:value-type="float">
            <text:p>1.41130140692316</text:p>
          </table:table-cell>
          <table:table-cell office:value-type="float" office:value="0.141130140692316" calcext:value-type="float">
            <text:p>0.1411301406923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06801677448703" calcext:value-type="float">
            <text:p>0.306801677448703</text:p>
          </table:table-cell>
          <table:table-cell office:value-type="float" office:value="0.323668207908531" calcext:value-type="float">
            <text:p>0.323668207908531</text:p>
          </table:table-cell>
          <table:table-cell office:value-type="float" office:value="0.0323668207908531" calcext:value-type="float">
            <text:p>0.0323668207908531</text:p>
          </table:table-cell>
          <table:table-cell office:value-type="float" office:value="0.363935611243336" calcext:value-type="float">
            <text:p>0.363935611243336</text:p>
          </table:table-cell>
          <table:table-cell office:value-type="float" office:value="0.257006146758411" calcext:value-type="float">
            <text:p>0.257006146758411</text:p>
          </table:table-cell>
          <table:table-cell office:value-type="float" office:value="0.0257006146758411" calcext:value-type="float">
            <text:p>0.02570061467584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86103883948925" calcext:value-type="float">
            <text:p>0.286103883948925</text:p>
          </table:table-cell>
          <table:table-cell office:value-type="float" office:value="0.285480713921303" calcext:value-type="float">
            <text:p>0.285480713921303</text:p>
          </table:table-cell>
          <table:table-cell office:value-type="float" office:value="0.0285480713921303" calcext:value-type="float">
            <text:p>0.0285480713921303</text:p>
          </table:table-cell>
          <table:table-cell office:value-type="float" office:value="0.316211124100315" calcext:value-type="float">
            <text:p>0.316211124100315</text:p>
          </table:table-cell>
          <table:table-cell office:value-type="float" office:value="0.251360345479308" calcext:value-type="float">
            <text:p>0.251360345479308</text:p>
          </table:table-cell>
          <table:table-cell office:value-type="float" office:value="0.0251360345479308" calcext:value-type="float">
            <text:p>0.02513603454793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30630026151222" calcext:value-type="float">
            <text:p>0.330630026151222</text:p>
          </table:table-cell>
          <table:table-cell office:value-type="float" office:value="0.338155848126061" calcext:value-type="float">
            <text:p>0.338155848126061</text:p>
          </table:table-cell>
          <table:table-cell office:value-type="float" office:value="0.0338155848126061" calcext:value-type="float">
            <text:p>0.0338155848126061</text:p>
          </table:table-cell>
          <table:table-cell office:value-type="float" office:value="0.362131582939989" calcext:value-type="float">
            <text:p>0.362131582939989</text:p>
          </table:table-cell>
          <table:table-cell office:value-type="float" office:value="0.303818816747532" calcext:value-type="float">
            <text:p>0.303818816747532</text:p>
          </table:table-cell>
          <table:table-cell office:value-type="float" office:value="0.0303818816747532" calcext:value-type="float">
            <text:p>0.03038188167475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59999675149025" calcext:value-type="float">
            <text:p>0.359999675149025</text:p>
          </table:table-cell>
          <table:table-cell office:value-type="float" office:value="0.253690446485717" calcext:value-type="float">
            <text:p>0.253690446485717</text:p>
          </table:table-cell>
          <table:table-cell office:value-type="float" office:value="0.0253690446485717" calcext:value-type="float">
            <text:p>0.0253690446485717</text:p>
          </table:table-cell>
          <table:table-cell office:value-type="float" office:value="0.363093098463005" calcext:value-type="float">
            <text:p>0.363093098463005</text:p>
          </table:table-cell>
          <table:table-cell office:value-type="float" office:value="0.249197544793261" calcext:value-type="float">
            <text:p>0.249197544793261</text:p>
          </table:table-cell>
          <table:table-cell office:value-type="float" office:value="0.0249197544793261" calcext:value-type="float">
            <text:p>0.024919754479326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72343546391056" calcext:value-type="float">
            <text:p>0.272343546391056</text:p>
          </table:table-cell>
          <table:table-cell office:value-type="float" office:value="0.266426379323531" calcext:value-type="float">
            <text:p>0.266426379323531</text:p>
          </table:table-cell>
          <table:table-cell office:value-type="float" office:value="0.0266426379323531" calcext:value-type="float">
            <text:p>0.0266426379323531</text:p>
          </table:table-cell>
          <table:table-cell office:value-type="float" office:value="0.305690746523528" calcext:value-type="float">
            <text:p>0.305690746523528</text:p>
          </table:table-cell>
          <table:table-cell office:value-type="float" office:value="0.226963620531229" calcext:value-type="float">
            <text:p>0.226963620531229</text:p>
          </table:table-cell>
          <table:table-cell office:value-type="float" office:value="0.0226963620531229" calcext:value-type="float">
            <text:p>0.022696362053122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25805080697438" calcext:value-type="float">
            <text:p>0.325805080697438</text:p>
          </table:table-cell>
          <table:table-cell office:value-type="float" office:value="0.399467706827212" calcext:value-type="float">
            <text:p>0.399467706827212</text:p>
          </table:table-cell>
          <table:table-cell office:value-type="float" office:value="0.0399467706827212" calcext:value-type="float">
            <text:p>0.0399467706827212</text:p>
          </table:table-cell>
          <table:table-cell office:value-type="float" office:value="0.404111851661668" calcext:value-type="float">
            <text:p>0.404111851661668</text:p>
          </table:table-cell>
          <table:table-cell office:value-type="float" office:value="0.319123272253202" calcext:value-type="float">
            <text:p>0.319123272253202</text:p>
          </table:table-cell>
          <table:table-cell office:value-type="float" office:value="0.0319123272253202" calcext:value-type="float">
            <text:p>0.03191232722532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63281656094785" calcext:value-type="float">
            <text:p>0.263281656094785</text:p>
          </table:table-cell>
          <table:table-cell office:value-type="float" office:value="0.332498128534378" calcext:value-type="float">
            <text:p>0.332498128534378</text:p>
          </table:table-cell>
          <table:table-cell office:value-type="float" office:value="0.0332498128534378" calcext:value-type="float">
            <text:p>0.0332498128534378</text:p>
          </table:table-cell>
          <table:table-cell office:value-type="float" office:value="0.324807597240521" calcext:value-type="float">
            <text:p>0.324807597240521</text:p>
          </table:table-cell>
          <table:table-cell office:value-type="float" office:value="0.272041868871537" calcext:value-type="float">
            <text:p>0.272041868871537</text:p>
          </table:table-cell>
          <table:table-cell office:value-type="float" office:value="0.0272041868871537" calcext:value-type="float">
            <text:p>0.027204186887153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37791129088858" calcext:value-type="float">
            <text:p>0.237791129088858</text:p>
          </table:table-cell>
          <table:table-cell office:value-type="float" office:value="0.383905163208885" calcext:value-type="float">
            <text:p>0.383905163208885</text:p>
          </table:table-cell>
          <table:table-cell office:value-type="float" office:value="0.0383905163208885" calcext:value-type="float">
            <text:p>0.0383905163208885</text:p>
          </table:table-cell>
          <table:table-cell office:value-type="float" office:value="0.33508646373312" calcext:value-type="float">
            <text:p>0.33508646373312</text:p>
          </table:table-cell>
          <table:table-cell office:value-type="float" office:value="0.301797687086147" calcext:value-type="float">
            <text:p>0.301797687086147</text:p>
          </table:table-cell>
          <table:table-cell office:value-type="float" office:value="0.0301797687086147" calcext:value-type="float">
            <text:p>0.03017976870861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369921985929874" calcext:value-type="float">
            <text:p>0.369921985929874</text:p>
          </table:table-cell>
          <table:table-cell office:value-type="float" office:value="0.363217010029694" calcext:value-type="float">
            <text:p>0.363217010029694</text:p>
          </table:table-cell>
          <table:table-cell office:value-type="float" office:value="0.0363217010029693" calcext:value-type="float">
            <text:p>0.0363217010029693</text:p>
          </table:table-cell>
          <table:table-cell office:value-type="float" office:value="0.397142944366802" calcext:value-type="float">
            <text:p>0.397142944366802</text:p>
          </table:table-cell>
          <table:table-cell office:value-type="float" office:value="0.332919573241956" calcext:value-type="float">
            <text:p>0.332919573241956</text:p>
          </table:table-cell>
          <table:table-cell office:value-type="float" office:value="0.0332919573241956" calcext:value-type="float">
            <text:p>0.03329195732419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334018363965219" calcext:value-type="float">
            <text:p>0.334018363965219</text:p>
          </table:table-cell>
          <table:table-cell office:value-type="float" office:value="0.277672737349727" calcext:value-type="float">
            <text:p>0.277672737349727</text:p>
          </table:table-cell>
          <table:table-cell office:value-type="float" office:value="0.0277672737349727" calcext:value-type="float">
            <text:p>0.0277672737349727</text:p>
          </table:table-cell>
          <table:table-cell office:value-type="float" office:value="0.356751397404568" calcext:value-type="float">
            <text:p>0.356751397404568</text:p>
          </table:table-cell>
          <table:table-cell office:value-type="float" office:value="0.247467650150922" calcext:value-type="float">
            <text:p>0.247467650150922</text:p>
          </table:table-cell>
          <table:table-cell office:value-type="float" office:value="0.0247467650150922" calcext:value-type="float">
            <text:p>0.02474676501509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351288161646285" calcext:value-type="float">
            <text:p>0.351288161646285</text:p>
          </table:table-cell>
          <table:table-cell office:value-type="float" office:value="0.23738884345848" calcext:value-type="float">
            <text:p>0.23738884345848</text:p>
          </table:table-cell>
          <table:table-cell office:value-type="float" office:value="0.023738884345848" calcext:value-type="float">
            <text:p>0.023738884345848</text:p>
          </table:table-cell>
          <table:table-cell office:value-type="float" office:value="0.366866294738324" calcext:value-type="float">
            <text:p>0.366866294738324</text:p>
          </table:table-cell>
          <table:table-cell office:value-type="float" office:value="0.212256807165875" calcext:value-type="float">
            <text:p>0.212256807165875</text:p>
          </table:table-cell>
          <table:table-cell office:value-type="float" office:value="0.0212256807165875" calcext:value-type="float">
            <text:p>0.02122568071658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69906741397159" calcext:value-type="float">
            <text:p>0.269906741397159</text:p>
          </table:table-cell>
          <table:table-cell office:value-type="float" office:value="0.60901595285054" calcext:value-type="float">
            <text:p>0.60901595285054</text:p>
          </table:table-cell>
          <table:table-cell office:value-type="float" office:value="0.060901595285054" calcext:value-type="float">
            <text:p>0.060901595285054</text:p>
          </table:table-cell>
          <table:table-cell office:value-type="float" office:value="0.418607071461114" calcext:value-type="float">
            <text:p>0.418607071461114</text:p>
          </table:table-cell>
          <table:table-cell office:value-type="float" office:value="0.517188588088581" calcext:value-type="float">
            <text:p>0.517188588088581</text:p>
          </table:table-cell>
          <table:table-cell office:value-type="float" office:value="0.0517188588088581" calcext:value-type="float">
            <text:p>0.05171885880885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21382760649555" calcext:value-type="float">
            <text:p>0.221382760649555</text:p>
          </table:table-cell>
          <table:table-cell office:value-type="float" office:value="0.296270822598502" calcext:value-type="float">
            <text:p>0.296270822598502</text:p>
          </table:table-cell>
          <table:table-cell office:value-type="float" office:value="0.0296270822598502" calcext:value-type="float">
            <text:p>0.0296270822598502</text:p>
          </table:table-cell>
          <table:table-cell office:value-type="float" office:value="0.281718945681226" calcext:value-type="float">
            <text:p>0.281718945681226</text:p>
          </table:table-cell>
          <table:table-cell office:value-type="float" office:value="0.238986493589533" calcext:value-type="float">
            <text:p>0.238986493589533</text:p>
          </table:table-cell>
          <table:table-cell office:value-type="float" office:value="0.0238986493589533" calcext:value-type="float">
            <text:p>0.02389864935895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MA (Major Axis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38336800617448" calcext:value-type="float">
            <text:p>0.238336800617448</text:p>
          </table:table-cell>
          <table:table-cell office:value-type="float" office:value="0.299351271344349" calcext:value-type="float">
            <text:p>0.299351271344349</text:p>
          </table:table-cell>
          <table:table-cell office:value-type="float" office:value="0.0299351271344349" calcext:value-type="float">
            <text:p>0.0299351271344349</text:p>
          </table:table-cell>
          <table:table-cell office:value-type="float" office:value="0.301170639451795" calcext:value-type="float">
            <text:p>0.301170639451795</text:p>
          </table:table-cell>
          <table:table-cell office:value-type="float" office:value="0.235307124215882" calcext:value-type="float">
            <text:p>0.235307124215882</text:p>
          </table:table-cell>
          <table:table-cell office:value-type="float" office:value="0.0235307124215882" calcext:value-type="float">
            <text:p>0.02353071242158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536519944404177" calcext:value-type="float">
            <text:p>0.536519944404177</text:p>
          </table:table-cell>
          <table:table-cell office:value-type="float" office:value="0.161038613100477" calcext:value-type="float">
            <text:p>0.161038613100477</text:p>
          </table:table-cell>
          <table:table-cell office:value-type="float" office:value="0.0161038613100477" calcext:value-type="float">
            <text:p>0.0161038613100477</text:p>
          </table:table-cell>
          <table:table-cell office:value-type="float" office:value="0.536519944404177" calcext:value-type="float">
            <text:p>0.536519944404177</text:p>
          </table:table-cell>
          <table:table-cell office:value-type="float" office:value="0.161038613100477" calcext:value-type="float">
            <text:p>0.161038613100477</text:p>
          </table:table-cell>
          <table:table-cell office:value-type="float" office:value="0.0161038613100477" calcext:value-type="float">
            <text:p>0.016103861310047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66790369960442" calcext:value-type="float">
            <text:p>0.366790369960442</text:p>
          </table:table-cell>
          <table:table-cell office:value-type="float" office:value="0.153814551786707" calcext:value-type="float">
            <text:p>0.153814551786707</text:p>
          </table:table-cell>
          <table:table-cell office:value-type="float" office:value="0.0153814551786707" calcext:value-type="float">
            <text:p>0.0153814551786707</text:p>
          </table:table-cell>
          <table:table-cell office:value-type="float" office:value="0.367738074265614" calcext:value-type="float">
            <text:p>0.367738074265614</text:p>
          </table:table-cell>
          <table:table-cell office:value-type="float" office:value="0.1515116137465" calcext:value-type="float">
            <text:p>0.1515116137465</text:p>
          </table:table-cell>
          <table:table-cell office:value-type="float" office:value="0.01515116137465" calcext:value-type="float">
            <text:p>0.015151161374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94442988467141" calcext:value-type="float">
            <text:p>0.294442988467141</text:p>
          </table:table-cell>
          <table:table-cell office:value-type="float" office:value="0.168029104845355" calcext:value-type="float">
            <text:p>0.168029104845355</text:p>
          </table:table-cell>
          <table:table-cell office:value-type="float" office:value="0.0168029104845355" calcext:value-type="float">
            <text:p>0.0168029104845355</text:p>
          </table:table-cell>
          <table:table-cell office:value-type="float" office:value="0.294696000527336" calcext:value-type="float">
            <text:p>0.294696000527336</text:p>
          </table:table-cell>
          <table:table-cell office:value-type="float" office:value="0.167580473673394" calcext:value-type="float">
            <text:p>0.167580473673394</text:p>
          </table:table-cell>
          <table:table-cell office:value-type="float" office:value="0.0167580473673394" calcext:value-type="float">
            <text:p>0.01675804736733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07633333378571" calcext:value-type="float">
            <text:p>0.407633333378571</text:p>
          </table:table-cell>
          <table:table-cell office:value-type="float" office:value="0.354901780457788" calcext:value-type="float">
            <text:p>0.354901780457788</text:p>
          </table:table-cell>
          <table:table-cell office:value-type="float" office:value="0.0354901780457788" calcext:value-type="float">
            <text:p>0.0354901780457788</text:p>
          </table:table-cell>
          <table:table-cell office:value-type="float" office:value="0.471873248394835" calcext:value-type="float">
            <text:p>0.471873248394835</text:p>
          </table:table-cell>
          <table:table-cell office:value-type="float" office:value="0.26245979579568" calcext:value-type="float">
            <text:p>0.26245979579568</text:p>
          </table:table-cell>
          <table:table-cell office:value-type="float" office:value="0.026245979579568" calcext:value-type="float">
            <text:p>0.0262459795795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88873836499642" calcext:value-type="float">
            <text:p>0.288873836499642</text:p>
          </table:table-cell>
          <table:table-cell office:value-type="float" office:value="0.202205459950868" calcext:value-type="float">
            <text:p>0.202205459950868</text:p>
          </table:table-cell>
          <table:table-cell office:value-type="float" office:value="0.0202205459950868" calcext:value-type="float">
            <text:p>0.0202205459950868</text:p>
          </table:table-cell>
          <table:table-cell office:value-type="float" office:value="0.296065224265951" calcext:value-type="float">
            <text:p>0.296065224265951</text:p>
          </table:table-cell>
          <table:table-cell office:value-type="float" office:value="0.191410643097204" calcext:value-type="float">
            <text:p>0.191410643097204</text:p>
          </table:table-cell>
          <table:table-cell office:value-type="float" office:value="0.0191410643097204" calcext:value-type="float">
            <text:p>0.01914106430972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92136126284048" calcext:value-type="float">
            <text:p>0.192136126284048</text:p>
          </table:table-cell>
          <table:table-cell office:value-type="float" office:value="0.208064249804562" calcext:value-type="float">
            <text:p>0.208064249804562</text:p>
          </table:table-cell>
          <table:table-cell office:value-type="float" office:value="0.0208064249804562" calcext:value-type="float">
            <text:p>0.0208064249804562</text:p>
          </table:table-cell>
          <table:table-cell office:value-type="float" office:value="0.222438053464968" calcext:value-type="float">
            <text:p>0.222438053464968</text:p>
          </table:table-cell>
          <table:table-cell office:value-type="float" office:value="0.174932680039729" calcext:value-type="float">
            <text:p>0.174932680039729</text:p>
          </table:table-cell>
          <table:table-cell office:value-type="float" office:value="0.0174932680039729" calcext:value-type="float">
            <text:p>0.017493268003972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577005241795312" calcext:value-type="float">
            <text:p>0.577005241795312</text:p>
          </table:table-cell>
          <table:table-cell office:value-type="float" office:value="0.155083339006359" calcext:value-type="float">
            <text:p>0.155083339006359</text:p>
          </table:table-cell>
          <table:table-cell office:value-type="float" office:value="0.0155083339006359" calcext:value-type="float">
            <text:p>0.0155083339006359</text:p>
          </table:table-cell>
          <table:table-cell office:value-type="float" office:value="0.577005241795312" calcext:value-type="float">
            <text:p>0.577005241795312</text:p>
          </table:table-cell>
          <table:table-cell office:value-type="float" office:value="0.155083339006359" calcext:value-type="float">
            <text:p>0.155083339006359</text:p>
          </table:table-cell>
          <table:table-cell office:value-type="float" office:value="0.0155083339006359" calcext:value-type="float">
            <text:p>0.01550833390063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382592172806424" calcext:value-type="float">
            <text:p>0.382592172806424</text:p>
          </table:table-cell>
          <table:table-cell office:value-type="float" office:value="0.171134046813358" calcext:value-type="float">
            <text:p>0.171134046813358</text:p>
          </table:table-cell>
          <table:table-cell office:value-type="float" office:value="0.0171134046813358" calcext:value-type="float">
            <text:p>0.0171134046813358</text:p>
          </table:table-cell>
          <table:table-cell office:value-type="float" office:value="0.382592172806424" calcext:value-type="float">
            <text:p>0.382592172806424</text:p>
          </table:table-cell>
          <table:table-cell office:value-type="float" office:value="0.171134046813358" calcext:value-type="float">
            <text:p>0.171134046813358</text:p>
          </table:table-cell>
          <table:table-cell office:value-type="float" office:value="0.0171134046813358" calcext:value-type="float">
            <text:p>0.017113404681335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295504712736775" calcext:value-type="float">
            <text:p>0.295504712736775</text:p>
          </table:table-cell>
          <table:table-cell office:value-type="float" office:value="0.193817197019721" calcext:value-type="float">
            <text:p>0.193817197019721</text:p>
          </table:table-cell>
          <table:table-cell office:value-type="float" office:value="0.0193817197019721" calcext:value-type="float">
            <text:p>0.0193817197019721</text:p>
          </table:table-cell>
          <table:table-cell office:value-type="float" office:value="0.30207636434875" calcext:value-type="float">
            <text:p>0.30207636434875</text:p>
          </table:table-cell>
          <table:table-cell office:value-type="float" office:value="0.183298509512091" calcext:value-type="float">
            <text:p>0.183298509512091</text:p>
          </table:table-cell>
          <table:table-cell office:value-type="float" office:value="0.0183298509512091" calcext:value-type="float">
            <text:p>0.01832985095120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447688185144048" calcext:value-type="float">
            <text:p>0.447688185144048</text:p>
          </table:table-cell>
          <table:table-cell office:value-type="float" office:value="0.306156563142002" calcext:value-type="float">
            <text:p>0.306156563142002</text:p>
          </table:table-cell>
          <table:table-cell office:value-type="float" office:value="0.0306156563142002" calcext:value-type="float">
            <text:p>0.0306156563142002</text:p>
          </table:table-cell>
          <table:table-cell office:value-type="float" office:value="0.481101269994348" calcext:value-type="float">
            <text:p>0.481101269994348</text:p>
          </table:table-cell>
          <table:table-cell office:value-type="float" office:value="0.249769190162264" calcext:value-type="float">
            <text:p>0.249769190162264</text:p>
          </table:table-cell>
          <table:table-cell office:value-type="float" office:value="0.0249769190162264" calcext:value-type="float">
            <text:p>0.02497691901622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12384860432379" calcext:value-type="float">
            <text:p>0.312384860432379</text:p>
          </table:table-cell>
          <table:table-cell office:value-type="float" office:value="0.209059941903816" calcext:value-type="float">
            <text:p>0.209059941903816</text:p>
          </table:table-cell>
          <table:table-cell office:value-type="float" office:value="0.0209059941903816" calcext:value-type="float">
            <text:p>0.0209059941903816</text:p>
          </table:table-cell>
          <table:table-cell office:value-type="float" office:value="0.315031512701319" calcext:value-type="float">
            <text:p>0.315031512701319</text:p>
          </table:table-cell>
          <table:table-cell office:value-type="float" office:value="0.20500910486855" calcext:value-type="float">
            <text:p>0.20500910486855</text:p>
          </table:table-cell>
          <table:table-cell office:value-type="float" office:value="0.020500910486855" calcext:value-type="float">
            <text:p>0.0205009104868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31113746688363" calcext:value-type="float">
            <text:p>0.231113746688363</text:p>
          </table:table-cell>
          <table:table-cell office:value-type="float" office:value="0.231765806642249" calcext:value-type="float">
            <text:p>0.231765806642249</text:p>
          </table:table-cell>
          <table:table-cell office:value-type="float" office:value="0.0231765806642249" calcext:value-type="float">
            <text:p>0.0231765806642249</text:p>
          </table:table-cell>
          <table:table-cell office:value-type="float" office:value="0.254332157308822" calcext:value-type="float">
            <text:p>0.254332157308822</text:p>
          </table:table-cell>
          <table:table-cell office:value-type="float" office:value="0.205743178401638" calcext:value-type="float">
            <text:p>0.205743178401638</text:p>
          </table:table-cell>
          <table:table-cell office:value-type="float" office:value="0.0205743178401638" calcext:value-type="float">
            <text:p>0.02057431784016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457309551742804" calcext:value-type="float">
            <text:p>0.457309551742804</text:p>
          </table:table-cell>
          <table:table-cell office:value-type="float" office:value="0.161132181850383" calcext:value-type="float">
            <text:p>0.161132181850383</text:p>
          </table:table-cell>
          <table:table-cell office:value-type="float" office:value="0.0161132181850383" calcext:value-type="float">
            <text:p>0.0161132181850383</text:p>
          </table:table-cell>
          <table:table-cell office:value-type="float" office:value="0.457309551742804" calcext:value-type="float">
            <text:p>0.457309551742804</text:p>
          </table:table-cell>
          <table:table-cell office:value-type="float" office:value="0.161132181850383" calcext:value-type="float">
            <text:p>0.161132181850383</text:p>
          </table:table-cell>
          <table:table-cell office:value-type="float" office:value="0.0161132181850383" calcext:value-type="float">
            <text:p>0.016113218185038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04910596218066" calcext:value-type="float">
            <text:p>0.304910596218066</text:p>
          </table:table-cell>
          <table:table-cell office:value-type="float" office:value="0.172297868198855" calcext:value-type="float">
            <text:p>0.172297868198855</text:p>
          </table:table-cell>
          <table:table-cell office:value-type="float" office:value="0.0172297868198855" calcext:value-type="float">
            <text:p>0.0172297868198855</text:p>
          </table:table-cell>
          <table:table-cell office:value-type="float" office:value="0.308053153865933" calcext:value-type="float">
            <text:p>0.308053153865933</text:p>
          </table:table-cell>
          <table:table-cell office:value-type="float" office:value="0.166555768896931" calcext:value-type="float">
            <text:p>0.166555768896931</text:p>
          </table:table-cell>
          <table:table-cell office:value-type="float" office:value="0.0166555768896931" calcext:value-type="float">
            <text:p>0.01665557688969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59652020374877" calcext:value-type="float">
            <text:p>0.159652020374877</text:p>
          </table:table-cell>
          <table:table-cell office:value-type="float" office:value="0.188257056926236" calcext:value-type="float">
            <text:p>0.188257056926236</text:p>
          </table:table-cell>
          <table:table-cell office:value-type="float" office:value="0.0188257056926236" calcext:value-type="float">
            <text:p>0.0188257056926236</text:p>
          </table:table-cell>
          <table:table-cell office:value-type="float" office:value="0.196011566306503" calcext:value-type="float">
            <text:p>0.196011566306503</text:p>
          </table:table-cell>
          <table:table-cell office:value-type="float" office:value="0.149593880430237" calcext:value-type="float">
            <text:p>0.149593880430237</text:p>
          </table:table-cell>
          <table:table-cell office:value-type="float" office:value="0.0149593880430237" calcext:value-type="float">
            <text:p>0.014959388043023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77191658487335" calcext:value-type="float">
            <text:p>0.377191658487335</text:p>
          </table:table-cell>
          <table:table-cell office:value-type="float" office:value="0.298882978933493" calcext:value-type="float">
            <text:p>0.298882978933493</text:p>
          </table:table-cell>
          <table:table-cell office:value-type="float" office:value="0.0298882978933493" calcext:value-type="float">
            <text:p>0.0298882978933493</text:p>
          </table:table-cell>
          <table:table-cell office:value-type="float" office:value="0.410050481198288" calcext:value-type="float">
            <text:p>0.410050481198288</text:p>
          </table:table-cell>
          <table:table-cell office:value-type="float" office:value="0.251399868306492" calcext:value-type="float">
            <text:p>0.251399868306492</text:p>
          </table:table-cell>
          <table:table-cell office:value-type="float" office:value="0.0251399868306492" calcext:value-type="float">
            <text:p>0.02513998683064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15278475198914" calcext:value-type="float">
            <text:p>0.215278475198914</text:p>
          </table:table-cell>
          <table:table-cell office:value-type="float" office:value="0.174450848289734" calcext:value-type="float">
            <text:p>0.174450848289734</text:p>
          </table:table-cell>
          <table:table-cell office:value-type="float" office:value="0.0174450848289734" calcext:value-type="float">
            <text:p>0.0174450848289734</text:p>
          </table:table-cell>
          <table:table-cell office:value-type="float" office:value="0.233049406033301" calcext:value-type="float">
            <text:p>0.233049406033301</text:p>
          </table:table-cell>
          <table:table-cell office:value-type="float" office:value="0.149617572145654" calcext:value-type="float">
            <text:p>0.149617572145654</text:p>
          </table:table-cell>
          <table:table-cell office:value-type="float" office:value="0.0149617572145654" calcext:value-type="float">
            <text:p>0.01496175721456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24680547078268" calcext:value-type="float">
            <text:p>0.124680547078268</text:p>
          </table:table-cell>
          <table:table-cell office:value-type="float" office:value="0.258062017907437" calcext:value-type="float">
            <text:p>0.258062017907437</text:p>
          </table:table-cell>
          <table:table-cell office:value-type="float" office:value="0.0258062017907437" calcext:value-type="float">
            <text:p>0.0258062017907437</text:p>
          </table:table-cell>
          <table:table-cell office:value-type="float" office:value="0.220156621468706" calcext:value-type="float">
            <text:p>0.220156621468706</text:p>
          </table:table-cell>
          <table:table-cell office:value-type="float" office:value="0.182591739440573" calcext:value-type="float">
            <text:p>0.182591739440573</text:p>
          </table:table-cell>
          <table:table-cell office:value-type="float" office:value="0.0182591739440573" calcext:value-type="float">
            <text:p>0.018259173944057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449843020273379" calcext:value-type="float">
            <text:p>0.449843020273379</text:p>
          </table:table-cell>
          <table:table-cell office:value-type="float" office:value="0.162269707888979" calcext:value-type="float">
            <text:p>0.162269707888979</text:p>
          </table:table-cell>
          <table:table-cell office:value-type="float" office:value="0.0162269707888979" calcext:value-type="float">
            <text:p>0.0162269707888979</text:p>
          </table:table-cell>
          <table:table-cell office:value-type="float" office:value="0.449843020273379" calcext:value-type="float">
            <text:p>0.449843020273379</text:p>
          </table:table-cell>
          <table:table-cell office:value-type="float" office:value="0.162269707888979" calcext:value-type="float">
            <text:p>0.162269707888979</text:p>
          </table:table-cell>
          <table:table-cell office:value-type="float" office:value="0.0162269707888979" calcext:value-type="float">
            <text:p>0.01622697078889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308518036324313" calcext:value-type="float">
            <text:p>0.308518036324313</text:p>
          </table:table-cell>
          <table:table-cell office:value-type="float" office:value="0.166528431895564" calcext:value-type="float">
            <text:p>0.166528431895564</text:p>
          </table:table-cell>
          <table:table-cell office:value-type="float" office:value="0.0166528431895564" calcext:value-type="float">
            <text:p>0.0166528431895564</text:p>
          </table:table-cell>
          <table:table-cell office:value-type="float" office:value="0.308518036324313" calcext:value-type="float">
            <text:p>0.308518036324313</text:p>
          </table:table-cell>
          <table:table-cell office:value-type="float" office:value="0.166528431895564" calcext:value-type="float">
            <text:p>0.166528431895564</text:p>
          </table:table-cell>
          <table:table-cell office:value-type="float" office:value="0.0166528431895564" calcext:value-type="float">
            <text:p>0.01665284318955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89330194067534" calcext:value-type="float">
            <text:p>0.189330194067534</text:p>
          </table:table-cell>
          <table:table-cell office:value-type="float" office:value="0.195044669775034" calcext:value-type="float">
            <text:p>0.195044669775034</text:p>
          </table:table-cell>
          <table:table-cell office:value-type="float" office:value="0.0195044669775034" calcext:value-type="float">
            <text:p>0.0195044669775034</text:p>
          </table:table-cell>
          <table:table-cell office:value-type="float" office:value="0.217450150132018" calcext:value-type="float">
            <text:p>0.217450150132018</text:p>
          </table:table-cell>
          <table:table-cell office:value-type="float" office:value="0.162752068890289" calcext:value-type="float">
            <text:p>0.162752068890289</text:p>
          </table:table-cell>
          <table:table-cell office:value-type="float" office:value="0.0162752068890289" calcext:value-type="float">
            <text:p>0.01627520688902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3332198960539" calcext:value-type="float">
            <text:p>0.3332198960539</text:p>
          </table:table-cell>
          <table:table-cell office:value-type="float" office:value="0.326038391499138" calcext:value-type="float">
            <text:p>0.326038391499138</text:p>
          </table:table-cell>
          <table:table-cell office:value-type="float" office:value="0.0326038391499138" calcext:value-type="float">
            <text:p>0.0326038391499138</text:p>
          </table:table-cell>
          <table:table-cell office:value-type="float" office:value="0.394047208378732" calcext:value-type="float">
            <text:p>0.394047208378732</text:p>
          </table:table-cell>
          <table:table-cell office:value-type="float" office:value="0.248226678539026" calcext:value-type="float">
            <text:p>0.248226678539026</text:p>
          </table:table-cell>
          <table:table-cell office:value-type="float" office:value="0.0248226678539026" calcext:value-type="float">
            <text:p>0.02482266785390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20177803156205" calcext:value-type="float">
            <text:p>0.220177803156205</text:p>
          </table:table-cell>
          <table:table-cell office:value-type="float" office:value="0.227512355076356" calcext:value-type="float">
            <text:p>0.227512355076356</text:p>
          </table:table-cell>
          <table:table-cell office:value-type="float" office:value="0.0227512355076356" calcext:value-type="float">
            <text:p>0.0227512355076356</text:p>
          </table:table-cell>
          <table:table-cell office:value-type="float" office:value="0.256965741985386" calcext:value-type="float">
            <text:p>0.256965741985386</text:p>
          </table:table-cell>
          <table:table-cell office:value-type="float" office:value="0.184476122688768" calcext:value-type="float">
            <text:p>0.184476122688768</text:p>
          </table:table-cell>
          <table:table-cell office:value-type="float" office:value="0.0184476122688768" calcext:value-type="float">
            <text:p>0.01844761226887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3523425821253" calcext:value-type="float">
            <text:p>0.13523425821253</text:p>
          </table:table-cell>
          <table:table-cell office:value-type="float" office:value="0.218556645451699" calcext:value-type="float">
            <text:p>0.218556645451699</text:p>
          </table:table-cell>
          <table:table-cell office:value-type="float" office:value="0.0218556645451699" calcext:value-type="float">
            <text:p>0.0218556645451699</text:p>
          </table:table-cell>
          <table:table-cell office:value-type="float" office:value="0.193404787739507" calcext:value-type="float">
            <text:p>0.193404787739507</text:p>
          </table:table-cell>
          <table:table-cell office:value-type="float" office:value="0.168691427910918" calcext:value-type="float">
            <text:p>0.168691427910918</text:p>
          </table:table-cell>
          <table:table-cell office:value-type="float" office:value="0.0168691427910918" calcext:value-type="float">
            <text:p>0.016869142791091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361179351689136" calcext:value-type="float">
            <text:p>0.361179351689136</text:p>
          </table:table-cell>
          <table:table-cell office:value-type="float" office:value="0.151005227149849" calcext:value-type="float">
            <text:p>0.151005227149849</text:p>
          </table:table-cell>
          <table:table-cell office:value-type="float" office:value="0.0151005227149849" calcext:value-type="float">
            <text:p>0.0151005227149849</text:p>
          </table:table-cell>
          <table:table-cell office:value-type="float" office:value="0.361179351689136" calcext:value-type="float">
            <text:p>0.361179351689136</text:p>
          </table:table-cell>
          <table:table-cell office:value-type="float" office:value="0.151005227149849" calcext:value-type="float">
            <text:p>0.151005227149849</text:p>
          </table:table-cell>
          <table:table-cell office:value-type="float" office:value="0.0151005227149849" calcext:value-type="float">
            <text:p>0.01510052271498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25941083595865" calcext:value-type="float">
            <text:p>0.225941083595865</text:p>
          </table:table-cell>
          <table:table-cell office:value-type="float" office:value="0.15356315724121" calcext:value-type="float">
            <text:p>0.15356315724121</text:p>
          </table:table-cell>
          <table:table-cell office:value-type="float" office:value="0.015356315724121" calcext:value-type="float">
            <text:p>0.015356315724121</text:p>
          </table:table-cell>
          <table:table-cell office:value-type="float" office:value="0.227940937303723" calcext:value-type="float">
            <text:p>0.227940937303723</text:p>
          </table:table-cell>
          <table:table-cell office:value-type="float" office:value="0.150548254577752" calcext:value-type="float">
            <text:p>0.150548254577752</text:p>
          </table:table-cell>
          <table:table-cell office:value-type="float" office:value="0.0150548254577752" calcext:value-type="float">
            <text:p>0.01505482545777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694340412703146" calcext:value-type="float">
            <text:p>0.0694340412703146</text:p>
          </table:table-cell>
          <table:table-cell office:value-type="float" office:value="0.176952578318453" calcext:value-type="float">
            <text:p>0.176952578318453</text:p>
          </table:table-cell>
          <table:table-cell office:value-type="float" office:value="0.0176952578318453" calcext:value-type="float">
            <text:p>0.0176952578318453</text:p>
          </table:table-cell>
          <table:table-cell office:value-type="float" office:value="0.15244969883352" calcext:value-type="float">
            <text:p>0.15244969883352</text:p>
          </table:table-cell>
          <table:table-cell office:value-type="float" office:value="0.112722364914997" calcext:value-type="float">
            <text:p>0.112722364914997</text:p>
          </table:table-cell>
          <table:table-cell office:value-type="float" office:value="0.0112722364914997" calcext:value-type="float">
            <text:p>0.01127223649149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337918023148775" calcext:value-type="float">
            <text:p>0.337918023148775</text:p>
          </table:table-cell>
          <table:table-cell office:value-type="float" office:value="0.257956465188359" calcext:value-type="float">
            <text:p>0.257956465188359</text:p>
          </table:table-cell>
          <table:table-cell office:value-type="float" office:value="0.0257956465188359" calcext:value-type="float">
            <text:p>0.0257956465188359</text:p>
          </table:table-cell>
          <table:table-cell office:value-type="float" office:value="0.366751436576384" calcext:value-type="float">
            <text:p>0.366751436576384</text:p>
          </table:table-cell>
          <table:table-cell office:value-type="float" office:value="0.21451871593393" calcext:value-type="float">
            <text:p>0.21451871593393</text:p>
          </table:table-cell>
          <table:table-cell office:value-type="float" office:value="0.021451871593393" calcext:value-type="float">
            <text:p>0.0214518715933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69726393016608" calcext:value-type="float">
            <text:p>0.169726393016608</text:p>
          </table:table-cell>
          <table:table-cell office:value-type="float" office:value="0.213040499353499" calcext:value-type="float">
            <text:p>0.213040499353499</text:p>
          </table:table-cell>
          <table:table-cell office:value-type="float" office:value="0.0213040499353499" calcext:value-type="float">
            <text:p>0.0213040499353499</text:p>
          </table:table-cell>
          <table:table-cell office:value-type="float" office:value="0.212156986254458" calcext:value-type="float">
            <text:p>0.212156986254458</text:p>
          </table:table-cell>
          <table:table-cell office:value-type="float" office:value="0.170349769387272" calcext:value-type="float">
            <text:p>0.170349769387272</text:p>
          </table:table-cell>
          <table:table-cell office:value-type="float" office:value="0.0170349769387272" calcext:value-type="float">
            <text:p>0.01703497693872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738811437810801" calcext:value-type="float">
            <text:p>0.0738811437810801</text:p>
          </table:table-cell>
          <table:table-cell office:value-type="float" office:value="0.27124550977377" calcext:value-type="float">
            <text:p>0.27124550977377</text:p>
          </table:table-cell>
          <table:table-cell office:value-type="float" office:value="0.027124550977377" calcext:value-type="float">
            <text:p>0.027124550977377</text:p>
          </table:table-cell>
          <table:table-cell office:value-type="float" office:value="0.21309703506968" calcext:value-type="float">
            <text:p>0.21309703506968</text:p>
          </table:table-cell>
          <table:table-cell office:value-type="float" office:value="0.182259838818322" calcext:value-type="float">
            <text:p>0.182259838818322</text:p>
          </table:table-cell>
          <table:table-cell office:value-type="float" office:value="0.0182259838818322" calcext:value-type="float">
            <text:p>0.01822598388183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376150938193806" calcext:value-type="float">
            <text:p>0.376150938193806</text:p>
          </table:table-cell>
          <table:table-cell office:value-type="float" office:value="0.149430305887307" calcext:value-type="float">
            <text:p>0.149430305887307</text:p>
          </table:table-cell>
          <table:table-cell office:value-type="float" office:value="0.0149430305887307" calcext:value-type="float">
            <text:p>0.0149430305887307</text:p>
          </table:table-cell>
          <table:table-cell office:value-type="float" office:value="0.376150938193806" calcext:value-type="float">
            <text:p>0.376150938193806</text:p>
          </table:table-cell>
          <table:table-cell office:value-type="float" office:value="0.149430305887307" calcext:value-type="float">
            <text:p>0.149430305887307</text:p>
          </table:table-cell>
          <table:table-cell office:value-type="float" office:value="0.0149430305887307" calcext:value-type="float">
            <text:p>0.01494303058873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201903150094478" calcext:value-type="float">
            <text:p>0.201903150094478</text:p>
          </table:table-cell>
          <table:table-cell office:value-type="float" office:value="0.160416079586238" calcext:value-type="float">
            <text:p>0.160416079586238</text:p>
          </table:table-cell>
          <table:table-cell office:value-type="float" office:value="0.0160416079586238" calcext:value-type="float">
            <text:p>0.0160416079586238</text:p>
          </table:table-cell>
          <table:table-cell office:value-type="float" office:value="0.216637023553148" calcext:value-type="float">
            <text:p>0.216637023553148</text:p>
          </table:table-cell>
          <table:table-cell office:value-type="float" office:value="0.139657833842437" calcext:value-type="float">
            <text:p>0.139657833842437</text:p>
          </table:table-cell>
          <table:table-cell office:value-type="float" office:value="0.0139657833842437" calcext:value-type="float">
            <text:p>0.013965783384243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18205966727409" calcext:value-type="float">
            <text:p>0.118205966727409</text:p>
          </table:table-cell>
          <table:table-cell office:value-type="float" office:value="0.152130653593163" calcext:value-type="float">
            <text:p>0.152130653593163</text:p>
          </table:table-cell>
          <table:table-cell office:value-type="float" office:value="0.0152130653593163" calcext:value-type="float">
            <text:p>0.0152130653593163</text:p>
          </table:table-cell>
          <table:table-cell office:value-type="float" office:value="0.160316652068781" calcext:value-type="float">
            <text:p>0.160316652068781</text:p>
          </table:table-cell>
          <table:table-cell office:value-type="float" office:value="0.106284923170734" calcext:value-type="float">
            <text:p>0.106284923170734</text:p>
          </table:table-cell>
          <table:table-cell office:value-type="float" office:value="0.0106284923170734" calcext:value-type="float">
            <text:p>0.010628492317073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72024132593853" calcext:value-type="float">
            <text:p>0.272024132593853</text:p>
          </table:table-cell>
          <table:table-cell office:value-type="float" office:value="0.361062635211641" calcext:value-type="float">
            <text:p>0.361062635211641</text:p>
          </table:table-cell>
          <table:table-cell office:value-type="float" office:value="0.0361062635211641" calcext:value-type="float">
            <text:p>0.0361062635211641</text:p>
          </table:table-cell>
          <table:table-cell office:value-type="float" office:value="0.361202006804222" calcext:value-type="float">
            <text:p>0.361202006804222</text:p>
          </table:table-cell>
          <table:table-cell office:value-type="float" office:value="0.270787857766356" calcext:value-type="float">
            <text:p>0.270787857766356</text:p>
          </table:table-cell>
          <table:table-cell office:value-type="float" office:value="0.0270787857766356" calcext:value-type="float">
            <text:p>0.02707878577663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53534417940167" calcext:value-type="float">
            <text:p>0.153534417940167</text:p>
          </table:table-cell>
          <table:table-cell office:value-type="float" office:value="0.206152169446134" calcext:value-type="float">
            <text:p>0.206152169446134</text:p>
          </table:table-cell>
          <table:table-cell office:value-type="float" office:value="0.0206152169446134" calcext:value-type="float">
            <text:p>0.0206152169446134</text:p>
          </table:table-cell>
          <table:table-cell office:value-type="float" office:value="0.196183533829403" calcext:value-type="float">
            <text:p>0.196183533829403</text:p>
          </table:table-cell>
          <table:table-cell office:value-type="float" office:value="0.165628793744567" calcext:value-type="float">
            <text:p>0.165628793744567</text:p>
          </table:table-cell>
          <table:table-cell office:value-type="float" office:value="0.0165628793744567" calcext:value-type="float">
            <text:p>0.016562879374456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Type II (Errors-in-Variables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0793577950443874" calcext:value-type="float">
            <text:p>0.0793577950443874</text:p>
          </table:table-cell>
          <table:table-cell office:value-type="float" office:value="0.224095348239952" calcext:value-type="float">
            <text:p>0.224095348239952</text:p>
          </table:table-cell>
          <table:table-cell office:value-type="float" office:value="0.0224095348239952" calcext:value-type="float">
            <text:p>0.0224095348239952</text:p>
          </table:table-cell>
          <table:table-cell office:value-type="float" office:value="0.178971057590625" calcext:value-type="float">
            <text:p>0.178971057590625</text:p>
          </table:table-cell>
          <table:table-cell office:value-type="float" office:value="0.15564644612996" calcext:value-type="float">
            <text:p>0.15564644612996</text:p>
          </table:table-cell>
          <table:table-cell office:value-type="float" office:value="0.015564644612996" calcext:value-type="float">
            <text:p>0.0155646446129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544808306605922" calcext:value-type="float">
            <text:p>-0.0544808306605922</text:p>
          </table:table-cell>
          <table:table-cell office:value-type="float" office:value="0.205223716968883" calcext:value-type="float">
            <text:p>0.205223716968883</text:p>
          </table:table-cell>
          <table:table-cell office:value-type="float" office:value="0.0205223716968883" calcext:value-type="float">
            <text:p>0.0205223716968883</text:p>
          </table:table-cell>
          <table:table-cell office:value-type="float" office:value="0.171929313762148" calcext:value-type="float">
            <text:p>0.171929313762148</text:p>
          </table:table-cell>
          <table:table-cell office:value-type="float" office:value="0.123517790994355" calcext:value-type="float">
            <text:p>0.123517790994355</text:p>
          </table:table-cell>
          <table:table-cell office:value-type="float" office:value="0.0123517790994355" calcext:value-type="float">
            <text:p>0.01235177909943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981287427969756" calcext:value-type="float">
            <text:p>-0.0981287427969756</text:p>
          </table:table-cell>
          <table:table-cell office:value-type="float" office:value="0.206229980322283" calcext:value-type="float">
            <text:p>0.206229980322283</text:p>
          </table:table-cell>
          <table:table-cell office:value-type="float" office:value="0.0206229980322283" calcext:value-type="float">
            <text:p>0.0206229980322283</text:p>
          </table:table-cell>
          <table:table-cell office:value-type="float" office:value="0.180363508405083" calcext:value-type="float">
            <text:p>0.180363508405083</text:p>
          </table:table-cell>
          <table:table-cell office:value-type="float" office:value="0.139275730207617" calcext:value-type="float">
            <text:p>0.139275730207617</text:p>
          </table:table-cell>
          <table:table-cell office:value-type="float" office:value="0.0139275730207617" calcext:value-type="float">
            <text:p>0.013927573020761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780817180894485" calcext:value-type="float">
            <text:p>-0.0780817180894485</text:p>
          </table:table-cell>
          <table:table-cell office:value-type="float" office:value="0.191217827166441" calcext:value-type="float">
            <text:p>0.191217827166441</text:p>
          </table:table-cell>
          <table:table-cell office:value-type="float" office:value="0.0191217827166441" calcext:value-type="float">
            <text:p>0.0191217827166441</text:p>
          </table:table-cell>
          <table:table-cell office:value-type="float" office:value="0.172479779396997" calcext:value-type="float">
            <text:p>0.172479779396997</text:p>
          </table:table-cell>
          <table:table-cell office:value-type="float" office:value="0.112573635838121" calcext:value-type="float">
            <text:p>0.112573635838121</text:p>
          </table:table-cell>
          <table:table-cell office:value-type="float" office:value="0.0112573635838121" calcext:value-type="float">
            <text:p>0.01125736358381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565358845785413" calcext:value-type="float">
            <text:p>-0.0565358845785413</text:p>
          </table:table-cell>
          <table:table-cell office:value-type="float" office:value="0.269386602487112" calcext:value-type="float">
            <text:p>0.269386602487112</text:p>
          </table:table-cell>
          <table:table-cell office:value-type="float" office:value="0.0269386602487112" calcext:value-type="float">
            <text:p>0.0269386602487112</text:p>
          </table:table-cell>
          <table:table-cell office:value-type="float" office:value="0.210100795316188" calcext:value-type="float">
            <text:p>0.210100795316188</text:p>
          </table:table-cell>
          <table:table-cell office:value-type="float" office:value="0.176662127546425" calcext:value-type="float">
            <text:p>0.176662127546425</text:p>
          </table:table-cell>
          <table:table-cell office:value-type="float" office:value="0.0176662127546425" calcext:value-type="float">
            <text:p>0.017666212754642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978344527462165" calcext:value-type="float">
            <text:p>-0.0978344527462165</text:p>
          </table:table-cell>
          <table:table-cell office:value-type="float" office:value="0.260695449616771" calcext:value-type="float">
            <text:p>0.260695449616771</text:p>
          </table:table-cell>
          <table:table-cell office:value-type="float" office:value="0.0260695449616771" calcext:value-type="float">
            <text:p>0.0260695449616771</text:p>
          </table:table-cell>
          <table:table-cell office:value-type="float" office:value="0.224670956651302" calcext:value-type="float">
            <text:p>0.224670956651302</text:p>
          </table:table-cell>
          <table:table-cell office:value-type="float" office:value="0.163228283032504" calcext:value-type="float">
            <text:p>0.163228283032504</text:p>
          </table:table-cell>
          <table:table-cell office:value-type="float" office:value="0.0163228283032504" calcext:value-type="float">
            <text:p>0.01632282830325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3276832883421" calcext:value-type="float">
            <text:p>-0.13276832883421</text:p>
          </table:table-cell>
          <table:table-cell office:value-type="float" office:value="0.207408968945126" calcext:value-type="float">
            <text:p>0.207408968945126</text:p>
          </table:table-cell>
          <table:table-cell office:value-type="float" office:value="0.0207408968945126" calcext:value-type="float">
            <text:p>0.0207408968945126</text:p>
          </table:table-cell>
          <table:table-cell office:value-type="float" office:value="0.199520127941538" calcext:value-type="float">
            <text:p>0.199520127941538</text:p>
          </table:table-cell>
          <table:table-cell office:value-type="float" office:value="0.143574298094209" calcext:value-type="float">
            <text:p>0.143574298094209</text:p>
          </table:table-cell>
          <table:table-cell office:value-type="float" office:value="0.0143574298094209" calcext:value-type="float">
            <text:p>0.01435742980942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35629607359529" calcext:value-type="float">
            <text:p>-0.035629607359529</text:p>
          </table:table-cell>
          <table:table-cell office:value-type="float" office:value="0.184159845083081" calcext:value-type="float">
            <text:p>0.184159845083081</text:p>
          </table:table-cell>
          <table:table-cell office:value-type="float" office:value="0.0184159845083081" calcext:value-type="float">
            <text:p>0.0184159845083081</text:p>
          </table:table-cell>
          <table:table-cell office:value-type="float" office:value="0.143734729955121" calcext:value-type="float">
            <text:p>0.143734729955121</text:p>
          </table:table-cell>
          <table:table-cell office:value-type="float" office:value="0.119702899811026" calcext:value-type="float">
            <text:p>0.119702899811026</text:p>
          </table:table-cell>
          <table:table-cell office:value-type="float" office:value="0.0119702899811026" calcext:value-type="float">
            <text:p>0.01197028998110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583771097864314" calcext:value-type="float">
            <text:p>-0.0583771097864314</text:p>
          </table:table-cell>
          <table:table-cell office:value-type="float" office:value="0.194203152455547" calcext:value-type="float">
            <text:p>0.194203152455547</text:p>
          </table:table-cell>
          <table:table-cell office:value-type="float" office:value="0.0194203152455547" calcext:value-type="float">
            <text:p>0.0194203152455547</text:p>
          </table:table-cell>
          <table:table-cell office:value-type="float" office:value="0.163864785728655" calcext:value-type="float">
            <text:p>0.163864785728655</text:p>
          </table:table-cell>
          <table:table-cell office:value-type="float" office:value="0.118466355981562" calcext:value-type="float">
            <text:p>0.118466355981562</text:p>
          </table:table-cell>
          <table:table-cell office:value-type="float" office:value="0.0118466355981562" calcext:value-type="float">
            <text:p>0.011846635598156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03823841918292" calcext:value-type="float">
            <text:p>-0.0603823841918292</text:p>
          </table:table-cell>
          <table:table-cell office:value-type="float" office:value="0.212447326254394" calcext:value-type="float">
            <text:p>0.212447326254394</text:p>
          </table:table-cell>
          <table:table-cell office:value-type="float" office:value="0.0212447326254394" calcext:value-type="float">
            <text:p>0.0212447326254394</text:p>
          </table:table-cell>
          <table:table-cell office:value-type="float" office:value="0.177517148653199" calcext:value-type="float">
            <text:p>0.177517148653199</text:p>
          </table:table-cell>
          <table:table-cell office:value-type="float" office:value="0.130330667348702" calcext:value-type="float">
            <text:p>0.130330667348702</text:p>
          </table:table-cell>
          <table:table-cell office:value-type="float" office:value="0.0130330667348702" calcext:value-type="float">
            <text:p>0.01303306673487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18836884502627" calcext:value-type="float">
            <text:p>-0.018836884502627</text:p>
          </table:table-cell>
          <table:table-cell office:value-type="float" office:value="0.252527428183882" calcext:value-type="float">
            <text:p>0.252527428183882</text:p>
          </table:table-cell>
          <table:table-cell office:value-type="float" office:value="0.0252527428183882" calcext:value-type="float">
            <text:p>0.0252527428183882</text:p>
          </table:table-cell>
          <table:table-cell office:value-type="float" office:value="0.206148190945583" calcext:value-type="float">
            <text:p>0.206148190945583</text:p>
          </table:table-cell>
          <table:table-cell office:value-type="float" office:value="0.145609664156958" calcext:value-type="float">
            <text:p>0.145609664156958</text:p>
          </table:table-cell>
          <table:table-cell office:value-type="float" office:value="0.0145609664156958" calcext:value-type="float">
            <text:p>0.014560966415695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37357949931986" calcext:value-type="float">
            <text:p>-0.037357949931986</text:p>
          </table:table-cell>
          <table:table-cell office:value-type="float" office:value="0.248753333623385" calcext:value-type="float">
            <text:p>0.248753333623385</text:p>
          </table:table-cell>
          <table:table-cell office:value-type="float" office:value="0.0248753333623385" calcext:value-type="float">
            <text:p>0.0248753333623385</text:p>
          </table:table-cell>
          <table:table-cell office:value-type="float" office:value="0.194523715246254" calcext:value-type="float">
            <text:p>0.194523715246254</text:p>
          </table:table-cell>
          <table:table-cell office:value-type="float" office:value="0.158323219481683" calcext:value-type="float">
            <text:p>0.158323219481683</text:p>
          </table:table-cell>
          <table:table-cell office:value-type="float" office:value="0.0158323219481683" calcext:value-type="float">
            <text:p>0.015832321948168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646213919089241" calcext:value-type="float">
            <text:p>-0.0646213919089241</text:p>
          </table:table-cell>
          <table:table-cell office:value-type="float" office:value="0.262938190266915" calcext:value-type="float">
            <text:p>0.262938190266915</text:p>
          </table:table-cell>
          <table:table-cell office:value-type="float" office:value="0.0262938190266915" calcext:value-type="float">
            <text:p>0.0262938190266915</text:p>
          </table:table-cell>
          <table:table-cell office:value-type="float" office:value="0.221809636913302" calcext:value-type="float">
            <text:p>0.221809636913302</text:p>
          </table:table-cell>
          <table:table-cell office:value-type="float" office:value="0.153811954739137" calcext:value-type="float">
            <text:p>0.153811954739137</text:p>
          </table:table-cell>
          <table:table-cell office:value-type="float" office:value="0.0153811954739137" calcext:value-type="float">
            <text:p>0.015381195473913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694201082509378" calcext:value-type="float">
            <text:p>-0.0694201082509378</text:p>
          </table:table-cell>
          <table:table-cell office:value-type="float" office:value="0.186225904783869" calcext:value-type="float">
            <text:p>0.186225904783869</text:p>
          </table:table-cell>
          <table:table-cell office:value-type="float" office:value="0.0186225904783869" calcext:value-type="float">
            <text:p>0.0186225904783869</text:p>
          </table:table-cell>
          <table:table-cell office:value-type="float" office:value="0.151644057925153" calcext:value-type="float">
            <text:p>0.151644057925153</text:p>
          </table:table-cell>
          <table:table-cell office:value-type="float" office:value="0.127748639961963" calcext:value-type="float">
            <text:p>0.127748639961963</text:p>
          </table:table-cell>
          <table:table-cell office:value-type="float" office:value="0.0127748639961963" calcext:value-type="float">
            <text:p>0.012774863996196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50983417621505" calcext:value-type="float">
            <text:p>-0.150983417621505</text:p>
          </table:table-cell>
          <table:table-cell office:value-type="float" office:value="0.194395544157952" calcext:value-type="float">
            <text:p>0.194395544157952</text:p>
          </table:table-cell>
          <table:table-cell office:value-type="float" office:value="0.0194395544157952" calcext:value-type="float">
            <text:p>0.0194395544157952</text:p>
          </table:table-cell>
          <table:table-cell office:value-type="float" office:value="0.196592029284426" calcext:value-type="float">
            <text:p>0.196592029284426</text:p>
          </table:table-cell>
          <table:table-cell office:value-type="float" office:value="0.147570554024965" calcext:value-type="float">
            <text:p>0.147570554024965</text:p>
          </table:table-cell>
          <table:table-cell office:value-type="float" office:value="0.0147570554024965" calcext:value-type="float">
            <text:p>0.01475705540249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14930259438421" calcext:value-type="float">
            <text:p>-0.214930259438421</text:p>
          </table:table-cell>
          <table:table-cell office:value-type="float" office:value="0.20619344979654" calcext:value-type="float">
            <text:p>0.20619344979654</text:p>
          </table:table-cell>
          <table:table-cell office:value-type="float" office:value="0.020619344979654" calcext:value-type="float">
            <text:p>0.020619344979654</text:p>
          </table:table-cell>
          <table:table-cell office:value-type="float" office:value="0.244928335143293" calcext:value-type="float">
            <text:p>0.244928335143293</text:p>
          </table:table-cell>
          <table:table-cell office:value-type="float" office:value="0.16906070996643" calcext:value-type="float">
            <text:p>0.16906070996643</text:p>
          </table:table-cell>
          <table:table-cell office:value-type="float" office:value="0.016906070996643" calcext:value-type="float">
            <text:p>0.0169060709966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742166551164841" calcext:value-type="float">
            <text:p>-0.0742166551164841</text:p>
          </table:table-cell>
          <table:table-cell office:value-type="float" office:value="0.242857876593716" calcext:value-type="float">
            <text:p>0.242857876593716</text:p>
          </table:table-cell>
          <table:table-cell office:value-type="float" office:value="0.0242857876593716" calcext:value-type="float">
            <text:p>0.0242857876593716</text:p>
          </table:table-cell>
          <table:table-cell office:value-type="float" office:value="0.196788496229664" calcext:value-type="float">
            <text:p>0.196788496229664</text:p>
          </table:table-cell>
          <table:table-cell office:value-type="float" office:value="0.159457883327455" calcext:value-type="float">
            <text:p>0.159457883327455</text:p>
          </table:table-cell>
          <table:table-cell office:value-type="float" office:value="0.0159457883327455" calcext:value-type="float">
            <text:p>0.01594578833274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15814944014219" calcext:value-type="float">
            <text:p>-0.115814944014219</text:p>
          </table:table-cell>
          <table:table-cell office:value-type="float" office:value="0.227770707905683" calcext:value-type="float">
            <text:p>0.227770707905683</text:p>
          </table:table-cell>
          <table:table-cell office:value-type="float" office:value="0.0227770707905683" calcext:value-type="float">
            <text:p>0.0227770707905683</text:p>
          </table:table-cell>
          <table:table-cell office:value-type="float" office:value="0.192053457665457" calcext:value-type="float">
            <text:p>0.192053457665457</text:p>
          </table:table-cell>
          <table:table-cell office:value-type="float" office:value="0.167842130857314" calcext:value-type="float">
            <text:p>0.167842130857314</text:p>
          </table:table-cell>
          <table:table-cell office:value-type="float" office:value="0.0167842130857314" calcext:value-type="float">
            <text:p>0.01678421308573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83754266375487" calcext:value-type="float">
            <text:p>-0.183754266375487</text:p>
          </table:table-cell>
          <table:table-cell office:value-type="float" office:value="0.266574785742088" calcext:value-type="float">
            <text:p>0.266574785742088</text:p>
          </table:table-cell>
          <table:table-cell office:value-type="float" office:value="0.0266574785742088" calcext:value-type="float">
            <text:p>0.0266574785742088</text:p>
          </table:table-cell>
          <table:table-cell office:value-type="float" office:value="0.258591657421039" calcext:value-type="float">
            <text:p>0.258591657421039</text:p>
          </table:table-cell>
          <table:table-cell office:value-type="float" office:value="0.193968341561764" calcext:value-type="float">
            <text:p>0.193968341561764</text:p>
          </table:table-cell>
          <table:table-cell office:value-type="float" office:value="0.0193968341561764" calcext:value-type="float">
            <text:p>0.01939683415617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77810592204979" calcext:value-type="float">
            <text:p>-0.077810592204979</text:p>
          </table:table-cell>
          <table:table-cell office:value-type="float" office:value="0.167924503868316" calcext:value-type="float">
            <text:p>0.167924503868316</text:p>
          </table:table-cell>
          <table:table-cell office:value-type="float" office:value="0.0167924503868316" calcext:value-type="float">
            <text:p>0.0167924503868316</text:p>
          </table:table-cell>
          <table:table-cell office:value-type="float" office:value="0.147255106399139" calcext:value-type="float">
            <text:p>0.147255106399139</text:p>
          </table:table-cell>
          <table:table-cell office:value-type="float" office:value="0.111405504225832" calcext:value-type="float">
            <text:p>0.111405504225832</text:p>
          </table:table-cell>
          <table:table-cell office:value-type="float" office:value="0.0111405504225832" calcext:value-type="float">
            <text:p>0.01114055042258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20665769227518" calcext:value-type="float">
            <text:p>-0.120665769227518</text:p>
          </table:table-cell>
          <table:table-cell office:value-type="float" office:value="0.164537877181812" calcext:value-type="float">
            <text:p>0.164537877181812</text:p>
          </table:table-cell>
          <table:table-cell office:value-type="float" office:value="0.0164537877181812" calcext:value-type="float">
            <text:p>0.0164537877181812</text:p>
          </table:table-cell>
          <table:table-cell office:value-type="float" office:value="0.160927926777207" calcext:value-type="float">
            <text:p>0.160927926777207</text:p>
          </table:table-cell>
          <table:table-cell office:value-type="float" office:value="0.124982488242769" calcext:value-type="float">
            <text:p>0.124982488242769</text:p>
          </table:table-cell>
          <table:table-cell office:value-type="float" office:value="0.0124982488242769" calcext:value-type="float">
            <text:p>0.012498248824276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74566111669937" calcext:value-type="float">
            <text:p>-0.174566111669937</text:p>
          </table:table-cell>
          <table:table-cell office:value-type="float" office:value="0.197401812411191" calcext:value-type="float">
            <text:p>0.197401812411191</text:p>
          </table:table-cell>
          <table:table-cell office:value-type="float" office:value="0.0197401812411191" calcext:value-type="float">
            <text:p>0.0197401812411191</text:p>
          </table:table-cell>
          <table:table-cell office:value-type="float" office:value="0.212478544759974" calcext:value-type="float">
            <text:p>0.212478544759974</text:p>
          </table:table-cell>
          <table:table-cell office:value-type="float" office:value="0.155388064710843" calcext:value-type="float">
            <text:p>0.155388064710843</text:p>
          </table:table-cell>
          <table:table-cell office:value-type="float" office:value="0.0155388064710843" calcext:value-type="float">
            <text:p>0.01553880647108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04799588798778" calcext:value-type="float">
            <text:p>-0.104799588798778</text:p>
          </table:table-cell>
          <table:table-cell office:value-type="float" office:value="0.24036344955871" calcext:value-type="float">
            <text:p>0.24036344955871</text:p>
          </table:table-cell>
          <table:table-cell office:value-type="float" office:value="0.024036344955871" calcext:value-type="float">
            <text:p>0.024036344955871</text:p>
          </table:table-cell>
          <table:table-cell office:value-type="float" office:value="0.2125250805859" calcext:value-type="float">
            <text:p>0.2125250805859</text:p>
          </table:table-cell>
          <table:table-cell office:value-type="float" office:value="0.15246422312333" calcext:value-type="float">
            <text:p>0.15246422312333</text:p>
          </table:table-cell>
          <table:table-cell office:value-type="float" office:value="0.015246422312333" calcext:value-type="float">
            <text:p>0.0152464223123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24145843760352" calcext:value-type="float">
            <text:p>-0.124145843760352</text:p>
          </table:table-cell>
          <table:table-cell office:value-type="float" office:value="0.24674889125555" calcext:value-type="float">
            <text:p>0.24674889125555</text:p>
          </table:table-cell>
          <table:table-cell office:value-type="float" office:value="0.024674889125555" calcext:value-type="float">
            <text:p>0.024674889125555</text:p>
          </table:table-cell>
          <table:table-cell office:value-type="float" office:value="0.222429282456816" calcext:value-type="float">
            <text:p>0.222429282456816</text:p>
          </table:table-cell>
          <table:table-cell office:value-type="float" office:value="0.162721705825214" calcext:value-type="float">
            <text:p>0.162721705825214</text:p>
          </table:table-cell>
          <table:table-cell office:value-type="float" office:value="0.0162721705825214" calcext:value-type="float">
            <text:p>0.01627217058252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68463677162454" calcext:value-type="float">
            <text:p>-0.168463677162454</text:p>
          </table:table-cell>
          <table:table-cell office:value-type="float" office:value="0.209238444175954" calcext:value-type="float">
            <text:p>0.209238444175954</text:p>
          </table:table-cell>
          <table:table-cell office:value-type="float" office:value="0.0209238444175954" calcext:value-type="float">
            <text:p>0.0209238444175954</text:p>
          </table:table-cell>
          <table:table-cell office:value-type="float" office:value="0.223386090937979" calcext:value-type="float">
            <text:p>0.223386090937979</text:p>
          </table:table-cell>
          <table:table-cell office:value-type="float" office:value="0.148465498337058" calcext:value-type="float">
            <text:p>0.148465498337058</text:p>
          </table:table-cell>
          <table:table-cell office:value-type="float" office:value="0.0148465498337058" calcext:value-type="float">
            <text:p>0.014846549833705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34882853040198" calcext:value-type="float">
            <text:p>-0.134882853040198</text:p>
          </table:table-cell>
          <table:table-cell office:value-type="float" office:value="0.180551647909174" calcext:value-type="float">
            <text:p>0.180551647909174</text:p>
          </table:table-cell>
          <table:table-cell office:value-type="float" office:value="0.0180551647909174" calcext:value-type="float">
            <text:p>0.0180551647909174</text:p>
          </table:table-cell>
          <table:table-cell office:value-type="float" office:value="0.182714512237645" calcext:value-type="float">
            <text:p>0.182714512237645</text:p>
          </table:table-cell>
          <table:table-cell office:value-type="float" office:value="0.131355403656691" calcext:value-type="float">
            <text:p>0.131355403656691</text:p>
          </table:table-cell>
          <table:table-cell office:value-type="float" office:value="0.0131355403656691" calcext:value-type="float">
            <text:p>0.01313554036566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78160414337359" calcext:value-type="float">
            <text:p>-0.178160414337359</text:p>
          </table:table-cell>
          <table:table-cell office:value-type="float" office:value="0.140687999287122" calcext:value-type="float">
            <text:p>0.140687999287122</text:p>
          </table:table-cell>
          <table:table-cell office:value-type="float" office:value="0.0140687999287122" calcext:value-type="float">
            <text:p>0.0140687999287122</text:p>
          </table:table-cell>
          <table:table-cell office:value-type="float" office:value="0.193139591596082" calcext:value-type="float">
            <text:p>0.193139591596082</text:p>
          </table:table-cell>
          <table:table-cell office:value-type="float" office:value="0.119059502172285" calcext:value-type="float">
            <text:p>0.119059502172285</text:p>
          </table:table-cell>
          <table:table-cell office:value-type="float" office:value="0.0119059502172285" calcext:value-type="float">
            <text:p>0.01190595021722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10977824443704" calcext:value-type="float">
            <text:p>-0.310977824443704</text:p>
          </table:table-cell>
          <table:table-cell office:value-type="float" office:value="0.166928504712749" calcext:value-type="float">
            <text:p>0.166928504712749</text:p>
          </table:table-cell>
          <table:table-cell office:value-type="float" office:value="0.0166928504712749" calcext:value-type="float">
            <text:p>0.0166928504712749</text:p>
          </table:table-cell>
          <table:table-cell office:value-type="float" office:value="0.313927225355929" calcext:value-type="float">
            <text:p>0.313927225355929</text:p>
          </table:table-cell>
          <table:table-cell office:value-type="float" office:value="0.161255737991541" calcext:value-type="float">
            <text:p>0.161255737991541</text:p>
          </table:table-cell>
          <table:table-cell office:value-type="float" office:value="0.0161255737991541" calcext:value-type="float">
            <text:p>0.01612557379915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733314296644865" calcext:value-type="float">
            <text:p>-0.0733314296644865</text:p>
          </table:table-cell>
          <table:table-cell office:value-type="float" office:value="0.20106305018315" calcext:value-type="float">
            <text:p>0.20106305018315</text:p>
          </table:table-cell>
          <table:table-cell office:value-type="float" office:value="0.020106305018315" calcext:value-type="float">
            <text:p>0.020106305018315</text:p>
          </table:table-cell>
          <table:table-cell office:value-type="float" office:value="0.164294328622119" calcext:value-type="float">
            <text:p>0.164294328622119</text:p>
          </table:table-cell>
          <table:table-cell office:value-type="float" office:value="0.136355739459484" calcext:value-type="float">
            <text:p>0.136355739459484</text:p>
          </table:table-cell>
          <table:table-cell office:value-type="float" office:value="0.0136355739459484" calcext:value-type="float">
            <text:p>0.01363557394594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86290761131676" calcext:value-type="float">
            <text:p>-0.186290761131676</text:p>
          </table:table-cell>
          <table:table-cell office:value-type="float" office:value="0.205064153782762" calcext:value-type="float">
            <text:p>0.205064153782762</text:p>
          </table:table-cell>
          <table:table-cell office:value-type="float" office:value="0.0205064153782762" calcext:value-type="float">
            <text:p>0.0205064153782762</text:p>
          </table:table-cell>
          <table:table-cell office:value-type="float" office:value="0.236385124235863" calcext:value-type="float">
            <text:p>0.236385124235863</text:p>
          </table:table-cell>
          <table:table-cell office:value-type="float" office:value="0.143748921183439" calcext:value-type="float">
            <text:p>0.143748921183439</text:p>
          </table:table-cell>
          <table:table-cell office:value-type="float" office:value="0.0143748921183439" calcext:value-type="float">
            <text:p>0.01437489211834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54711349500294" calcext:value-type="float">
            <text:p>-0.254711349500294</text:p>
          </table:table-cell>
          <table:table-cell office:value-type="float" office:value="0.242317128178458" calcext:value-type="float">
            <text:p>0.242317128178458</text:p>
          </table:table-cell>
          <table:table-cell office:value-type="float" office:value="0.0242317128178458" calcext:value-type="float">
            <text:p>0.0242317128178458</text:p>
          </table:table-cell>
          <table:table-cell office:value-type="float" office:value="0.289996245259108" calcext:value-type="float">
            <text:p>0.289996245259108</text:p>
          </table:table-cell>
          <table:table-cell office:value-type="float" office:value="0.198251100860431" calcext:value-type="float">
            <text:p>0.198251100860431</text:p>
          </table:table-cell>
          <table:table-cell office:value-type="float" office:value="0.0198251100860431" calcext:value-type="float">
            <text:p>0.01982511008604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28872637531712" calcext:value-type="float">
            <text:p>-0.128872637531712</text:p>
          </table:table-cell>
          <table:table-cell office:value-type="float" office:value="0.157798577093473" calcext:value-type="float">
            <text:p>0.157798577093473</text:p>
          </table:table-cell>
          <table:table-cell office:value-type="float" office:value="0.0157798577093473" calcext:value-type="float">
            <text:p>0.0157798577093473</text:p>
          </table:table-cell>
          <table:table-cell office:value-type="float" office:value="0.158527694219879" calcext:value-type="float">
            <text:p>0.158527694219879</text:p>
          </table:table-cell>
          <table:table-cell office:value-type="float" office:value="0.127637879075353" calcext:value-type="float">
            <text:p>0.127637879075353</text:p>
          </table:table-cell>
          <table:table-cell office:value-type="float" office:value="0.0127637879075353" calcext:value-type="float">
            <text:p>0.012763787907535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29555483496276" calcext:value-type="float">
            <text:p>-0.229555483496276</text:p>
          </table:table-cell>
          <table:table-cell office:value-type="float" office:value="0.151281626404394" calcext:value-type="float">
            <text:p>0.151281626404394</text:p>
          </table:table-cell>
          <table:table-cell office:value-type="float" office:value="0.0151281626404394" calcext:value-type="float">
            <text:p>0.0151281626404394</text:p>
          </table:table-cell>
          <table:table-cell office:value-type="float" office:value="0.233021458551564" calcext:value-type="float">
            <text:p>0.233021458551564</text:p>
          </table:table-cell>
          <table:table-cell office:value-type="float" office:value="0.145830914405544" calcext:value-type="float">
            <text:p>0.145830914405544</text:p>
          </table:table-cell>
          <table:table-cell office:value-type="float" office:value="0.0145830914405544" calcext:value-type="float">
            <text:p>0.014583091440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83648474956606" calcext:value-type="float">
            <text:p>-0.283648474956606</text:p>
          </table:table-cell>
          <table:table-cell office:value-type="float" office:value="0.154945158737175" calcext:value-type="float">
            <text:p>0.154945158737175</text:p>
          </table:table-cell>
          <table:table-cell office:value-type="float" office:value="0.0154945158737175" calcext:value-type="float">
            <text:p>0.0154945158737175</text:p>
          </table:table-cell>
          <table:table-cell office:value-type="float" office:value="0.285473793819053" calcext:value-type="float">
            <text:p>0.285473793819053</text:p>
          </table:table-cell>
          <table:table-cell office:value-type="float" office:value="0.15152121757512" calcext:value-type="float">
            <text:p>0.15152121757512</text:p>
          </table:table-cell>
          <table:table-cell office:value-type="float" office:value="0.015152121757512" calcext:value-type="float">
            <text:p>0.0151521217575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2293669910236" calcext:value-type="float">
            <text:p>-0.12293669910236</text:p>
          </table:table-cell>
          <table:table-cell office:value-type="float" office:value="0.227069575787917" calcext:value-type="float">
            <text:p>0.227069575787917</text:p>
          </table:table-cell>
          <table:table-cell office:value-type="float" office:value="0.0227069575787917" calcext:value-type="float">
            <text:p>0.0227069575787917</text:p>
          </table:table-cell>
          <table:table-cell office:value-type="float" office:value="0.202508467645277" calcext:value-type="float">
            <text:p>0.202508467645277</text:p>
          </table:table-cell>
          <table:table-cell office:value-type="float" office:value="0.159382453580243" calcext:value-type="float">
            <text:p>0.159382453580243</text:p>
          </table:table-cell>
          <table:table-cell office:value-type="float" office:value="0.0159382453580243" calcext:value-type="float">
            <text:p>0.01593824535802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72410066456456" calcext:value-type="float">
            <text:p>-0.172410066456456</text:p>
          </table:table-cell>
          <table:table-cell office:value-type="float" office:value="0.202027126073503" calcext:value-type="float">
            <text:p>0.202027126073503</text:p>
          </table:table-cell>
          <table:table-cell office:value-type="float" office:value="0.0202027126073503" calcext:value-type="float">
            <text:p>0.0202027126073503</text:p>
          </table:table-cell>
          <table:table-cell office:value-type="float" office:value="0.220521803591449" calcext:value-type="float">
            <text:p>0.220521803591449</text:p>
          </table:table-cell>
          <table:table-cell office:value-type="float" office:value="0.14737492635554" calcext:value-type="float">
            <text:p>0.14737492635554</text:p>
          </table:table-cell>
          <table:table-cell office:value-type="float" office:value="0.014737492635554" calcext:value-type="float">
            <text:p>0.0147374926355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44143250153011" calcext:value-type="float">
            <text:p>-0.244143250153011</text:p>
          </table:table-cell>
          <table:table-cell office:value-type="float" office:value="0.230679058688653" calcext:value-type="float">
            <text:p>0.230679058688653</text:p>
          </table:table-cell>
          <table:table-cell office:value-type="float" office:value="0.0230679058688653" calcext:value-type="float">
            <text:p>0.0230679058688653</text:p>
          </table:table-cell>
          <table:table-cell office:value-type="float" office:value="0.282266736167507" calcext:value-type="float">
            <text:p>0.282266736167507</text:p>
          </table:table-cell>
          <table:table-cell office:value-type="float" office:value="0.181498020371893" calcext:value-type="float">
            <text:p>0.181498020371893</text:p>
          </table:table-cell>
          <table:table-cell office:value-type="float" office:value="0.0181498020371893" calcext:value-type="float">
            <text:p>0.01814980203718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560959216897884" calcext:value-type="float">
            <text:p>-0.0560959216897884</text:p>
          </table:table-cell>
          <table:table-cell office:value-type="float" office:value="0.201931521896668" calcext:value-type="float">
            <text:p>0.201931521896668</text:p>
          </table:table-cell>
          <table:table-cell office:value-type="float" office:value="0.0201931521896668" calcext:value-type="float">
            <text:p>0.0201931521896668</text:p>
          </table:table-cell>
          <table:table-cell office:value-type="float" office:value="0.1710092724789" calcext:value-type="float">
            <text:p>0.1710092724789</text:p>
          </table:table-cell>
          <table:table-cell office:value-type="float" office:value="0.120063776388302" calcext:value-type="float">
            <text:p>0.120063776388302</text:p>
          </table:table-cell>
          <table:table-cell office:value-type="float" office:value="0.0120063776388302" calcext:value-type="float">
            <text:p>0.01200637763883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980833488611629" calcext:value-type="float">
            <text:p>-0.0980833488611629</text:p>
          </table:table-cell>
          <table:table-cell office:value-type="float" office:value="0.18684017483603" calcext:value-type="float">
            <text:p>0.18684017483603</text:p>
          </table:table-cell>
          <table:table-cell office:value-type="float" office:value="0.018684017483603" calcext:value-type="float">
            <text:p>0.018684017483603</text:p>
          </table:table-cell>
          <table:table-cell office:value-type="float" office:value="0.168168962551522" calcext:value-type="float">
            <text:p>0.168168962551522</text:p>
          </table:table-cell>
          <table:table-cell office:value-type="float" office:value="0.126729257986839" calcext:value-type="float">
            <text:p>0.126729257986839</text:p>
          </table:table-cell>
          <table:table-cell office:value-type="float" office:value="0.0126729257986839" calcext:value-type="float">
            <text:p>0.01267292579868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814565444545861" calcext:value-type="float">
            <text:p>-0.0814565444545861</text:p>
          </table:table-cell>
          <table:table-cell office:value-type="float" office:value="0.187371602901345" calcext:value-type="float">
            <text:p>0.187371602901345</text:p>
          </table:table-cell>
          <table:table-cell office:value-type="float" office:value="0.0187371602901345" calcext:value-type="float">
            <text:p>0.0187371602901345</text:p>
          </table:table-cell>
          <table:table-cell office:value-type="float" office:value="0.169000936024429" calcext:value-type="float">
            <text:p>0.169000936024429</text:p>
          </table:table-cell>
          <table:table-cell office:value-type="float" office:value="0.113844163624419" calcext:value-type="float">
            <text:p>0.113844163624419</text:p>
          </table:table-cell>
          <table:table-cell office:value-type="float" office:value="0.0113844163624419" calcext:value-type="float">
            <text:p>0.01138441636244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612273933785136" calcext:value-type="float">
            <text:p>-0.0612273933785136</text:p>
          </table:table-cell>
          <table:table-cell office:value-type="float" office:value="0.260622111446507" calcext:value-type="float">
            <text:p>0.260622111446507</text:p>
          </table:table-cell>
          <table:table-cell office:value-type="float" office:value="0.0260622111446507" calcext:value-type="float">
            <text:p>0.0260622111446507</text:p>
          </table:table-cell>
          <table:table-cell office:value-type="float" office:value="0.205392093132688" calcext:value-type="float">
            <text:p>0.205392093132688</text:p>
          </table:table-cell>
          <table:table-cell office:value-type="float" office:value="0.170582862661895" calcext:value-type="float">
            <text:p>0.170582862661895</text:p>
          </table:table-cell>
          <table:table-cell office:value-type="float" office:value="0.0170582862661895" calcext:value-type="float">
            <text:p>0.01705828626618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940016797289962" calcext:value-type="float">
            <text:p>-0.0940016797289962</text:p>
          </table:table-cell>
          <table:table-cell office:value-type="float" office:value="0.244002080651566" calcext:value-type="float">
            <text:p>0.244002080651566</text:p>
          </table:table-cell>
          <table:table-cell office:value-type="float" office:value="0.0244002080651566" calcext:value-type="float">
            <text:p>0.0244002080651566</text:p>
          </table:table-cell>
          <table:table-cell office:value-type="float" office:value="0.211354191429946" calcext:value-type="float">
            <text:p>0.211354191429946</text:p>
          </table:table-cell>
          <table:table-cell office:value-type="float" office:value="0.152776878193802" calcext:value-type="float">
            <text:p>0.152776878193802</text:p>
          </table:table-cell>
          <table:table-cell office:value-type="float" office:value="0.0152776878193802" calcext:value-type="float">
            <text:p>0.01527768781938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32325762377831" calcext:value-type="float">
            <text:p>-0.132325762377831</text:p>
          </table:table-cell>
          <table:table-cell office:value-type="float" office:value="0.212993606737718" calcext:value-type="float">
            <text:p>0.212993606737718</text:p>
          </table:table-cell>
          <table:table-cell office:value-type="float" office:value="0.0212993606737718" calcext:value-type="float">
            <text:p>0.0212993606737718</text:p>
          </table:table-cell>
          <table:table-cell office:value-type="float" office:value="0.205056655699769" calcext:value-type="float">
            <text:p>0.205056655699769</text:p>
          </table:table-cell>
          <table:table-cell office:value-type="float" office:value="0.14345832847281" calcext:value-type="float">
            <text:p>0.14345832847281</text:p>
          </table:table-cell>
          <table:table-cell office:value-type="float" office:value="0.014345832847281" calcext:value-type="float">
            <text:p>0.0143458328472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298174697613091" calcext:value-type="float">
            <text:p>-0.0298174697613091</text:p>
          </table:table-cell>
          <table:table-cell office:value-type="float" office:value="0.177338354678394" calcext:value-type="float">
            <text:p>0.177338354678394</text:p>
          </table:table-cell>
          <table:table-cell office:value-type="float" office:value="0.0177338354678394" calcext:value-type="float">
            <text:p>0.0177338354678394</text:p>
          </table:table-cell>
          <table:table-cell office:value-type="float" office:value="0.139982287410253" calcext:value-type="float">
            <text:p>0.139982287410253</text:p>
          </table:table-cell>
          <table:table-cell office:value-type="float" office:value="0.112044561093819" calcext:value-type="float">
            <text:p>0.112044561093819</text:p>
          </table:table-cell>
          <table:table-cell office:value-type="float" office:value="0.0112044561093819" calcext:value-type="float">
            <text:p>0.01120445610938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03629752331647" calcext:value-type="float">
            <text:p>-0.0603629752331647</text:p>
          </table:table-cell>
          <table:table-cell office:value-type="float" office:value="0.190718945561909" calcext:value-type="float">
            <text:p>0.190718945561909</text:p>
          </table:table-cell>
          <table:table-cell office:value-type="float" office:value="0.0190718945561909" calcext:value-type="float">
            <text:p>0.0190718945561909</text:p>
          </table:table-cell>
          <table:table-cell office:value-type="float" office:value="0.162298177141799" calcext:value-type="float">
            <text:p>0.162298177141799</text:p>
          </table:table-cell>
          <table:table-cell office:value-type="float" office:value="0.115963114606435" calcext:value-type="float">
            <text:p>0.115963114606435</text:p>
          </table:table-cell>
          <table:table-cell office:value-type="float" office:value="0.0115963114606435" calcext:value-type="float">
            <text:p>0.011596311460643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75634450430441" calcext:value-type="float">
            <text:p>-0.0675634450430441</text:p>
          </table:table-cell>
          <table:table-cell office:value-type="float" office:value="0.205441632423606" calcext:value-type="float">
            <text:p>0.205441632423606</text:p>
          </table:table-cell>
          <table:table-cell office:value-type="float" office:value="0.0205441632423606" calcext:value-type="float">
            <text:p>0.0205441632423606</text:p>
          </table:table-cell>
          <table:table-cell office:value-type="float" office:value="0.17309203755413" calcext:value-type="float">
            <text:p>0.17309203755413</text:p>
          </table:table-cell>
          <table:table-cell office:value-type="float" office:value="0.128661199958413" calcext:value-type="float">
            <text:p>0.128661199958413</text:p>
          </table:table-cell>
          <table:table-cell office:value-type="float" office:value="0.0128661199958413" calcext:value-type="float">
            <text:p>0.01286611999584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223773609751092" calcext:value-type="float">
            <text:p>-0.0223773609751092</text:p>
          </table:table-cell>
          <table:table-cell office:value-type="float" office:value="0.249923682815514" calcext:value-type="float">
            <text:p>0.249923682815514</text:p>
          </table:table-cell>
          <table:table-cell office:value-type="float" office:value="0.0249923682815514" calcext:value-type="float">
            <text:p>0.0249923682815514</text:p>
          </table:table-cell>
          <table:table-cell office:value-type="float" office:value="0.205174580356506" calcext:value-type="float">
            <text:p>0.205174580356506</text:p>
          </table:table-cell>
          <table:table-cell office:value-type="float" office:value="0.142988897709482" calcext:value-type="float">
            <text:p>0.142988897709482</text:p>
          </table:table-cell>
          <table:table-cell office:value-type="float" office:value="0.0142988897709482" calcext:value-type="float">
            <text:p>0.01429888977094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441358458101352" calcext:value-type="float">
            <text:p>-0.0441358458101352</text:p>
          </table:table-cell>
          <table:table-cell office:value-type="float" office:value="0.245839614223208" calcext:value-type="float">
            <text:p>0.245839614223208</text:p>
          </table:table-cell>
          <table:table-cell office:value-type="float" office:value="0.0245839614223208" calcext:value-type="float">
            <text:p>0.0245839614223208</text:p>
          </table:table-cell>
          <table:table-cell office:value-type="float" office:value="0.196183490499471" calcext:value-type="float">
            <text:p>0.196183490499471</text:p>
          </table:table-cell>
          <table:table-cell office:value-type="float" office:value="0.153388513467138" calcext:value-type="float">
            <text:p>0.153388513467138</text:p>
          </table:table-cell>
          <table:table-cell office:value-type="float" office:value="0.0153388513467138" calcext:value-type="float">
            <text:p>0.01533885134671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623265691454702" calcext:value-type="float">
            <text:p>-0.0623265691454702</text:p>
          </table:table-cell>
          <table:table-cell office:value-type="float" office:value="0.256582089802744" calcext:value-type="float">
            <text:p>0.256582089802744</text:p>
          </table:table-cell>
          <table:table-cell office:value-type="float" office:value="0.0256582089802744" calcext:value-type="float">
            <text:p>0.0256582089802744</text:p>
          </table:table-cell>
          <table:table-cell office:value-type="float" office:value="0.215496067791199" calcext:value-type="float">
            <text:p>0.215496067791199</text:p>
          </table:table-cell>
          <table:table-cell office:value-type="float" office:value="0.15116407270316" calcext:value-type="float">
            <text:p>0.15116407270316</text:p>
          </table:table-cell>
          <table:table-cell office:value-type="float" office:value="0.015116407270316" calcext:value-type="float">
            <text:p>0.0151164072703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765275815364464" calcext:value-type="float">
            <text:p>-0.0765275815364464</text:p>
          </table:table-cell>
          <table:table-cell office:value-type="float" office:value="0.173599899729494" calcext:value-type="float">
            <text:p>0.173599899729494</text:p>
          </table:table-cell>
          <table:table-cell office:value-type="float" office:value="0.0173599899729494" calcext:value-type="float">
            <text:p>0.0173599899729494</text:p>
          </table:table-cell>
          <table:table-cell office:value-type="float" office:value="0.147655291484073" calcext:value-type="float">
            <text:p>0.147655291484073</text:p>
          </table:table-cell>
          <table:table-cell office:value-type="float" office:value="0.118449330968432" calcext:value-type="float">
            <text:p>0.118449330968432</text:p>
          </table:table-cell>
          <table:table-cell office:value-type="float" office:value="0.0118449330968432" calcext:value-type="float">
            <text:p>0.01184493309684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56522517611432" calcext:value-type="float">
            <text:p>-0.156522517611432</text:p>
          </table:table-cell>
          <table:table-cell office:value-type="float" office:value="0.184573940395136" calcext:value-type="float">
            <text:p>0.184573940395136</text:p>
          </table:table-cell>
          <table:table-cell office:value-type="float" office:value="0.0184573940395136" calcext:value-type="float">
            <text:p>0.0184573940395136</text:p>
          </table:table-cell>
          <table:table-cell office:value-type="float" office:value="0.192744053320452" calcext:value-type="float">
            <text:p>0.192744053320452</text:p>
          </table:table-cell>
          <table:table-cell office:value-type="float" office:value="0.145906752106901" calcext:value-type="float">
            <text:p>0.145906752106901</text:p>
          </table:table-cell>
          <table:table-cell office:value-type="float" office:value="0.0145906752106901" calcext:value-type="float">
            <text:p>0.014590675210690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17714642998879" calcext:value-type="float">
            <text:p>-0.217714642998879</text:p>
          </table:table-cell>
          <table:table-cell office:value-type="float" office:value="0.196014802078252" calcext:value-type="float">
            <text:p>0.196014802078252</text:p>
          </table:table-cell>
          <table:table-cell office:value-type="float" office:value="0.0196014802078252" calcext:value-type="float">
            <text:p>0.0196014802078252</text:p>
          </table:table-cell>
          <table:table-cell office:value-type="float" office:value="0.245595740902602" calcext:value-type="float">
            <text:p>0.245595740902602</text:p>
          </table:table-cell>
          <table:table-cell office:value-type="float" office:value="0.159291304315" calcext:value-type="float">
            <text:p>0.159291304315</text:p>
          </table:table-cell>
          <table:table-cell office:value-type="float" office:value="0.0159291304315" calcext:value-type="float">
            <text:p>0.01592913043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755912147461949" calcext:value-type="float">
            <text:p>-0.0755912147461949</text:p>
          </table:table-cell>
          <table:table-cell office:value-type="float" office:value="0.242731462578723" calcext:value-type="float">
            <text:p>0.242731462578723</text:p>
          </table:table-cell>
          <table:table-cell office:value-type="float" office:value="0.0242731462578723" calcext:value-type="float">
            <text:p>0.0242731462578723</text:p>
          </table:table-cell>
          <table:table-cell office:value-type="float" office:value="0.195044118894374" calcext:value-type="float">
            <text:p>0.195044118894374</text:p>
          </table:table-cell>
          <table:table-cell office:value-type="float" office:value="0.162061220281297" calcext:value-type="float">
            <text:p>0.162061220281297</text:p>
          </table:table-cell>
          <table:table-cell office:value-type="float" office:value="0.0162061220281297" calcext:value-type="float">
            <text:p>0.01620612202812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26976215136503" calcext:value-type="float">
            <text:p>-0.126976215136503</text:p>
          </table:table-cell>
          <table:table-cell office:value-type="float" office:value="0.217864457674958" calcext:value-type="float">
            <text:p>0.217864457674958</text:p>
          </table:table-cell>
          <table:table-cell office:value-type="float" office:value="0.0217864457674958" calcext:value-type="float">
            <text:p>0.0217864457674958</text:p>
          </table:table-cell>
          <table:table-cell office:value-type="float" office:value="0.19110333256942" calcext:value-type="float">
            <text:p>0.19110333256942</text:p>
          </table:table-cell>
          <table:table-cell office:value-type="float" office:value="0.163894361733887" calcext:value-type="float">
            <text:p>0.163894361733887</text:p>
          </table:table-cell>
          <table:table-cell office:value-type="float" office:value="0.0163894361733887" calcext:value-type="float">
            <text:p>0.016389436173388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91927810549317" calcext:value-type="float">
            <text:p>-0.191927810549317</text:p>
          </table:table-cell>
          <table:table-cell office:value-type="float" office:value="0.253281644317476" calcext:value-type="float">
            <text:p>0.253281644317476</text:p>
          </table:table-cell>
          <table:table-cell office:value-type="float" office:value="0.0253281644317476" calcext:value-type="float">
            <text:p>0.0253281644317476</text:p>
          </table:table-cell>
          <table:table-cell office:value-type="float" office:value="0.257778022120035" calcext:value-type="float">
            <text:p>0.257778022120035</text:p>
          </table:table-cell>
          <table:table-cell office:value-type="float" office:value="0.185038492334089" calcext:value-type="float">
            <text:p>0.185038492334089</text:p>
          </table:table-cell>
          <table:table-cell office:value-type="float" office:value="0.0185038492334089" calcext:value-type="float">
            <text:p>0.01850384923340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807265921766406" calcext:value-type="float">
            <text:p>-0.0807265921766406</text:p>
          </table:table-cell>
          <table:table-cell office:value-type="float" office:value="0.157123499894622" calcext:value-type="float">
            <text:p>0.157123499894622</text:p>
          </table:table-cell>
          <table:table-cell office:value-type="float" office:value="0.0157123499894622" calcext:value-type="float">
            <text:p>0.0157123499894622</text:p>
          </table:table-cell>
          <table:table-cell office:value-type="float" office:value="0.142087747545866" calcext:value-type="float">
            <text:p>0.142087747545866</text:p>
          </table:table-cell>
          <table:table-cell office:value-type="float" office:value="0.104295476522088" calcext:value-type="float">
            <text:p>0.104295476522088</text:p>
          </table:table-cell>
          <table:table-cell office:value-type="float" office:value="0.0104295476522088" calcext:value-type="float">
            <text:p>0.01042954765220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29844864319331" calcext:value-type="float">
            <text:p>-0.129844864319331</text:p>
          </table:table-cell>
          <table:table-cell office:value-type="float" office:value="0.162217127608604" calcext:value-type="float">
            <text:p>0.162217127608604</text:p>
          </table:table-cell>
          <table:table-cell office:value-type="float" office:value="0.0162217127608604" calcext:value-type="float">
            <text:p>0.0162217127608604</text:p>
          </table:table-cell>
          <table:table-cell office:value-type="float" office:value="0.167328406625785" calcext:value-type="float">
            <text:p>0.167328406625785</text:p>
          </table:table-cell>
          <table:table-cell office:value-type="float" office:value="0.12273049085178" calcext:value-type="float">
            <text:p>0.12273049085178</text:p>
          </table:table-cell>
          <table:table-cell office:value-type="float" office:value="0.012273049085178" calcext:value-type="float">
            <text:p>0.0122730490851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85678586368749" calcext:value-type="float">
            <text:p>-0.185678586368749</text:p>
          </table:table-cell>
          <table:table-cell office:value-type="float" office:value="0.187748074607797" calcext:value-type="float">
            <text:p>0.187748074607797</text:p>
          </table:table-cell>
          <table:table-cell office:value-type="float" office:value="0.0187748074607797" calcext:value-type="float">
            <text:p>0.0187748074607797</text:p>
          </table:table-cell>
          <table:table-cell office:value-type="float" office:value="0.214973091464765" calcext:value-type="float">
            <text:p>0.214973091464765</text:p>
          </table:table-cell>
          <table:table-cell office:value-type="float" office:value="0.152950620887999" calcext:value-type="float">
            <text:p>0.152950620887999</text:p>
          </table:table-cell>
          <table:table-cell office:value-type="float" office:value="0.0152950620887999" calcext:value-type="float">
            <text:p>0.01529506208879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04072882295102" calcext:value-type="float">
            <text:p>-0.104072882295102</text:p>
          </table:table-cell>
          <table:table-cell office:value-type="float" office:value="0.2376654640214" calcext:value-type="float">
            <text:p>0.2376654640214</text:p>
          </table:table-cell>
          <table:table-cell office:value-type="float" office:value="0.02376654640214" calcext:value-type="float">
            <text:p>0.02376654640214</text:p>
          </table:table-cell>
          <table:table-cell office:value-type="float" office:value="0.205954878891866" calcext:value-type="float">
            <text:p>0.205954878891866</text:p>
          </table:table-cell>
          <table:table-cell office:value-type="float" office:value="0.156778737318622" calcext:value-type="float">
            <text:p>0.156778737318622</text:p>
          </table:table-cell>
          <table:table-cell office:value-type="float" office:value="0.0156778737318622" calcext:value-type="float">
            <text:p>0.01567787373186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22782850780255" calcext:value-type="float">
            <text:p>-0.122782850780255</text:p>
          </table:table-cell>
          <table:table-cell office:value-type="float" office:value="0.23710877816007" calcext:value-type="float">
            <text:p>0.23710877816007</text:p>
          </table:table-cell>
          <table:table-cell office:value-type="float" office:value="0.023710877816007" calcext:value-type="float">
            <text:p>0.023710877816007</text:p>
          </table:table-cell>
          <table:table-cell office:value-type="float" office:value="0.218973147115813" calcext:value-type="float">
            <text:p>0.218973147115813</text:p>
          </table:table-cell>
          <table:table-cell office:value-type="float" office:value="0.151706642223155" calcext:value-type="float">
            <text:p>0.151706642223155</text:p>
          </table:table-cell>
          <table:table-cell office:value-type="float" office:value="0.0151706642223155" calcext:value-type="float">
            <text:p>0.01517066422231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69649346983798" calcext:value-type="float">
            <text:p>-0.169649346983798</text:p>
          </table:table-cell>
          <table:table-cell office:value-type="float" office:value="0.205327383137933" calcext:value-type="float">
            <text:p>0.205327383137933</text:p>
          </table:table-cell>
          <table:table-cell office:value-type="float" office:value="0.0205327383137933" calcext:value-type="float">
            <text:p>0.0205327383137933</text:p>
          </table:table-cell>
          <table:table-cell office:value-type="float" office:value="0.225313180685609" calcext:value-type="float">
            <text:p>0.225313180685609</text:p>
          </table:table-cell>
          <table:table-cell office:value-type="float" office:value="0.141252022297034" calcext:value-type="float">
            <text:p>0.141252022297034</text:p>
          </table:table-cell>
          <table:table-cell office:value-type="float" office:value="0.0141252022297034" calcext:value-type="float">
            <text:p>0.014125202229703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41339902543692" calcext:value-type="float">
            <text:p>-0.141339902543692</text:p>
          </table:table-cell>
          <table:table-cell office:value-type="float" office:value="0.170170353479633" calcext:value-type="float">
            <text:p>0.170170353479633</text:p>
          </table:table-cell>
          <table:table-cell office:value-type="float" office:value="0.0170170353479633" calcext:value-type="float">
            <text:p>0.0170170353479633</text:p>
          </table:table-cell>
          <table:table-cell office:value-type="float" office:value="0.18261732427095" calcext:value-type="float">
            <text:p>0.18261732427095</text:p>
          </table:table-cell>
          <table:table-cell office:value-type="float" office:value="0.124301078920239" calcext:value-type="float">
            <text:p>0.124301078920239</text:p>
          </table:table-cell>
          <table:table-cell office:value-type="float" office:value="0.0124301078920239" calcext:value-type="float">
            <text:p>0.01243010789202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88963987084614" calcext:value-type="float">
            <text:p>-0.188963987084614</text:p>
          </table:table-cell>
          <table:table-cell office:value-type="float" office:value="0.136886374397713" calcext:value-type="float">
            <text:p>0.136886374397713</text:p>
          </table:table-cell>
          <table:table-cell office:value-type="float" office:value="0.0136886374397713" calcext:value-type="float">
            <text:p>0.0136886374397713</text:p>
          </table:table-cell>
          <table:table-cell office:value-type="float" office:value="0.201451318374843" calcext:value-type="float">
            <text:p>0.201451318374843</text:p>
          </table:table-cell>
          <table:table-cell office:value-type="float" office:value="0.1175303762186" calcext:value-type="float">
            <text:p>0.1175303762186</text:p>
          </table:table-cell>
          <table:table-cell office:value-type="float" office:value="0.01175303762186" calcext:value-type="float">
            <text:p>0.011753037621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23398440290067" calcext:value-type="float">
            <text:p>-0.323398440290067</text:p>
          </table:table-cell>
          <table:table-cell office:value-type="float" office:value="0.160047206968977" calcext:value-type="float">
            <text:p>0.160047206968977</text:p>
          </table:table-cell>
          <table:table-cell office:value-type="float" office:value="0.0160047206968977" calcext:value-type="float">
            <text:p>0.0160047206968977</text:p>
          </table:table-cell>
          <table:table-cell office:value-type="float" office:value="0.325253149431432" calcext:value-type="float">
            <text:p>0.325253149431432</text:p>
          </table:table-cell>
          <table:table-cell office:value-type="float" office:value="0.156204661594998" calcext:value-type="float">
            <text:p>0.156204661594998</text:p>
          </table:table-cell>
          <table:table-cell office:value-type="float" office:value="0.0156204661594998" calcext:value-type="float">
            <text:p>0.01562046615949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810608893100839" calcext:value-type="float">
            <text:p>-0.0810608893100839</text:p>
          </table:table-cell>
          <table:table-cell office:value-type="float" office:value="0.194170319481916" calcext:value-type="float">
            <text:p>0.194170319481916</text:p>
          </table:table-cell>
          <table:table-cell office:value-type="float" office:value="0.0194170319481916" calcext:value-type="float">
            <text:p>0.0194170319481916</text:p>
          </table:table-cell>
          <table:table-cell office:value-type="float" office:value="0.159345556812905" calcext:value-type="float">
            <text:p>0.159345556812905</text:p>
          </table:table-cell>
          <table:table-cell office:value-type="float" office:value="0.136718220644954" calcext:value-type="float">
            <text:p>0.136718220644954</text:p>
          </table:table-cell>
          <table:table-cell office:value-type="float" office:value="0.0136718220644954" calcext:value-type="float">
            <text:p>0.01367182206449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90530895416506" calcext:value-type="float">
            <text:p>-0.190530895416506</text:p>
          </table:table-cell>
          <table:table-cell office:value-type="float" office:value="0.206645954285109" calcext:value-type="float">
            <text:p>0.206645954285109</text:p>
          </table:table-cell>
          <table:table-cell office:value-type="float" office:value="0.0206645954285109" calcext:value-type="float">
            <text:p>0.0206645954285109</text:p>
          </table:table-cell>
          <table:table-cell office:value-type="float" office:value="0.237675754284923" calcext:value-type="float">
            <text:p>0.237675754284923</text:p>
          </table:table-cell>
          <table:table-cell office:value-type="float" office:value="0.149368309119371" calcext:value-type="float">
            <text:p>0.149368309119371</text:p>
          </table:table-cell>
          <table:table-cell office:value-type="float" office:value="0.0149368309119371" calcext:value-type="float">
            <text:p>0.01493683091193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61141773943446" calcext:value-type="float">
            <text:p>-0.261141773943446</text:p>
          </table:table-cell>
          <table:table-cell office:value-type="float" office:value="0.238750655486572" calcext:value-type="float">
            <text:p>0.238750655486572</text:p>
          </table:table-cell>
          <table:table-cell office:value-type="float" office:value="0.0238750655486572" calcext:value-type="float">
            <text:p>0.0238750655486572</text:p>
          </table:table-cell>
          <table:table-cell office:value-type="float" office:value="0.294195726459592" calcext:value-type="float">
            <text:p>0.294195726459592</text:p>
          </table:table-cell>
          <table:table-cell office:value-type="float" office:value="0.196113133118033" calcext:value-type="float">
            <text:p>0.196113133118033</text:p>
          </table:table-cell>
          <table:table-cell office:value-type="float" office:value="0.0196113133118033" calcext:value-type="float">
            <text:p>0.01961131331180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37895516580071" calcext:value-type="float">
            <text:p>-0.137895516580071</text:p>
          </table:table-cell>
          <table:table-cell office:value-type="float" office:value="0.153249431637966" calcext:value-type="float">
            <text:p>0.153249431637966</text:p>
          </table:table-cell>
          <table:table-cell office:value-type="float" office:value="0.0153249431637966" calcext:value-type="float">
            <text:p>0.0153249431637966</text:p>
          </table:table-cell>
          <table:table-cell office:value-type="float" office:value="0.161192820104701" calcext:value-type="float">
            <text:p>0.161192820104701</text:p>
          </table:table-cell>
          <table:table-cell office:value-type="float" office:value="0.128246064991572" calcext:value-type="float">
            <text:p>0.128246064991572</text:p>
          </table:table-cell>
          <table:table-cell office:value-type="float" office:value="0.0128246064991572" calcext:value-type="float">
            <text:p>0.01282460649915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34898748571295" calcext:value-type="float">
            <text:p>-0.234898748571295</text:p>
          </table:table-cell>
          <table:table-cell office:value-type="float" office:value="0.142977156756701" calcext:value-type="float">
            <text:p>0.142977156756701</text:p>
          </table:table-cell>
          <table:table-cell office:value-type="float" office:value="0.0142977156756701" calcext:value-type="float">
            <text:p>0.0142977156756701</text:p>
          </table:table-cell>
          <table:table-cell office:value-type="float" office:value="0.236679846882569" calcext:value-type="float">
            <text:p>0.236679846882569</text:p>
          </table:table-cell>
          <table:table-cell office:value-type="float" office:value="0.139978767656521" calcext:value-type="float">
            <text:p>0.139978767656521</text:p>
          </table:table-cell>
          <table:table-cell office:value-type="float" office:value="0.0139978767656521" calcext:value-type="float">
            <text:p>0.01399787676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95343008514609" calcext:value-type="float">
            <text:p>-0.295343008514609</text:p>
          </table:table-cell>
          <table:table-cell office:value-type="float" office:value="0.149333290202938" calcext:value-type="float">
            <text:p>0.149333290202938</text:p>
          </table:table-cell>
          <table:table-cell office:value-type="float" office:value="0.0149333290202938" calcext:value-type="float">
            <text:p>0.0149333290202938</text:p>
          </table:table-cell>
          <table:table-cell office:value-type="float" office:value="0.295343008514609" calcext:value-type="float">
            <text:p>0.295343008514609</text:p>
          </table:table-cell>
          <table:table-cell office:value-type="float" office:value="0.149333290202938" calcext:value-type="float">
            <text:p>0.149333290202938</text:p>
          </table:table-cell>
          <table:table-cell office:value-type="float" office:value="0.0149333290202938" calcext:value-type="float">
            <text:p>0.01493332902029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2867312928491" calcext:value-type="float">
            <text:p>-0.12867312928491</text:p>
          </table:table-cell>
          <table:table-cell office:value-type="float" office:value="0.223786451877751" calcext:value-type="float">
            <text:p>0.223786451877751</text:p>
          </table:table-cell>
          <table:table-cell office:value-type="float" office:value="0.0223786451877751" calcext:value-type="float">
            <text:p>0.0223786451877751</text:p>
          </table:table-cell>
          <table:table-cell office:value-type="float" office:value="0.201712400075848" calcext:value-type="float">
            <text:p>0.201712400075848</text:p>
          </table:table-cell>
          <table:table-cell office:value-type="float" office:value="0.160329377319068" calcext:value-type="float">
            <text:p>0.160329377319068</text:p>
          </table:table-cell>
          <table:table-cell office:value-type="float" office:value="0.0160329377319068" calcext:value-type="float">
            <text:p>0.01603293773190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83854640822147" calcext:value-type="float">
            <text:p>-0.183854640822147</text:p>
          </table:table-cell>
          <table:table-cell office:value-type="float" office:value="0.196741853932078" calcext:value-type="float">
            <text:p>0.196741853932078</text:p>
          </table:table-cell>
          <table:table-cell office:value-type="float" office:value="0.0196741853932078" calcext:value-type="float">
            <text:p>0.0196741853932078</text:p>
          </table:table-cell>
          <table:table-cell office:value-type="float" office:value="0.226684054497433" calcext:value-type="float">
            <text:p>0.226684054497433</text:p>
          </table:table-cell>
          <table:table-cell office:value-type="float" office:value="0.144729465165394" calcext:value-type="float">
            <text:p>0.144729465165394</text:p>
          </table:table-cell>
          <table:table-cell office:value-type="float" office:value="0.0144729465165394" calcext:value-type="float">
            <text:p>0.01447294651653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iegel</text:p>
          </table:table-cell>
          <table:table-cell office:value-type="string" calcext:value-type="string">
            <text:p>siegel</text:p>
          </table:table-cell>
          <table:table-cell office:value-type="string" calcext:value-type="string">
            <text:p>Robust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52842061128157" calcext:value-type="float">
            <text:p>-0.252842061128157</text:p>
          </table:table-cell>
          <table:table-cell office:value-type="float" office:value="0.224785706053637" calcext:value-type="float">
            <text:p>0.224785706053637</text:p>
          </table:table-cell>
          <table:table-cell office:value-type="float" office:value="0.0224785706053637" calcext:value-type="float">
            <text:p>0.0224785706053637</text:p>
          </table:table-cell>
          <table:table-cell office:value-type="float" office:value="0.28937653837335" calcext:value-type="float">
            <text:p>0.28937653837335</text:p>
          </table:table-cell>
          <table:table-cell office:value-type="float" office:value="0.174696430566542" calcext:value-type="float">
            <text:p>0.174696430566542</text:p>
          </table:table-cell>
          <table:table-cell office:value-type="float" office:value="0.0174696430566542" calcext:value-type="float">
            <text:p>0.01746964305665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524925085552763" calcext:value-type="float">
            <text:p>-0.0524925085552763</text:p>
          </table:table-cell>
          <table:table-cell office:value-type="float" office:value="0.199557956264774" calcext:value-type="float">
            <text:p>0.199557956264774</text:p>
          </table:table-cell>
          <table:table-cell office:value-type="float" office:value="0.0199557956264774" calcext:value-type="float">
            <text:p>0.0199557956264774</text:p>
          </table:table-cell>
          <table:table-cell office:value-type="float" office:value="0.166264647224267" calcext:value-type="float">
            <text:p>0.166264647224267</text:p>
          </table:table-cell>
          <table:table-cell office:value-type="float" office:value="0.121175532864324" calcext:value-type="float">
            <text:p>0.121175532864324</text:p>
          </table:table-cell>
          <table:table-cell office:value-type="float" office:value="0.0121175532864324" calcext:value-type="float">
            <text:p>0.01211755328643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977922666932887" calcext:value-type="float">
            <text:p>-0.0977922666932887</text:p>
          </table:table-cell>
          <table:table-cell office:value-type="float" office:value="0.176916800244573" calcext:value-type="float">
            <text:p>0.176916800244573</text:p>
          </table:table-cell>
          <table:table-cell office:value-type="float" office:value="0.0176916800244573" calcext:value-type="float">
            <text:p>0.0176916800244573</text:p>
          </table:table-cell>
          <table:table-cell office:value-type="float" office:value="0.160539942487374" calcext:value-type="float">
            <text:p>0.160539942487374</text:p>
          </table:table-cell>
          <table:table-cell office:value-type="float" office:value="0.122172311489962" calcext:value-type="float">
            <text:p>0.122172311489962</text:p>
          </table:table-cell>
          <table:table-cell office:value-type="float" office:value="0.0122172311489962" calcext:value-type="float">
            <text:p>0.012217231148996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811673418243702" calcext:value-type="float">
            <text:p>-0.0811673418243702</text:p>
          </table:table-cell>
          <table:table-cell office:value-type="float" office:value="0.178048185929318" calcext:value-type="float">
            <text:p>0.178048185929318</text:p>
          </table:table-cell>
          <table:table-cell office:value-type="float" office:value="0.0178048185929318" calcext:value-type="float">
            <text:p>0.0178048185929318</text:p>
          </table:table-cell>
          <table:table-cell office:value-type="float" office:value="0.164471810823285" calcext:value-type="float">
            <text:p>0.164471810823285</text:p>
          </table:table-cell>
          <table:table-cell office:value-type="float" office:value="0.105031528556171" calcext:value-type="float">
            <text:p>0.105031528556171</text:p>
          </table:table-cell>
          <table:table-cell office:value-type="float" office:value="0.0105031528556171" calcext:value-type="float">
            <text:p>0.01050315285561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608124902129531" calcext:value-type="float">
            <text:p>-0.0608124902129531</text:p>
          </table:table-cell>
          <table:table-cell office:value-type="float" office:value="0.257273310161738" calcext:value-type="float">
            <text:p>0.257273310161738</text:p>
          </table:table-cell>
          <table:table-cell office:value-type="float" office:value="0.0257273310161738" calcext:value-type="float">
            <text:p>0.0257273310161738</text:p>
          </table:table-cell>
          <table:table-cell office:value-type="float" office:value="0.204768520922373" calcext:value-type="float">
            <text:p>0.204768520922373</text:p>
          </table:table-cell>
          <table:table-cell office:value-type="float" office:value="0.166046337592264" calcext:value-type="float">
            <text:p>0.166046337592264</text:p>
          </table:table-cell>
          <table:table-cell office:value-type="float" office:value="0.0166046337592264" calcext:value-type="float">
            <text:p>0.01660463375922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825408288854508" calcext:value-type="float">
            <text:p>-0.0825408288854508</text:p>
          </table:table-cell>
          <table:table-cell office:value-type="float" office:value="0.227720397737834" calcext:value-type="float">
            <text:p>0.227720397737834</text:p>
          </table:table-cell>
          <table:table-cell office:value-type="float" office:value="0.0227720397737834" calcext:value-type="float">
            <text:p>0.0227720397737834</text:p>
          </table:table-cell>
          <table:table-cell office:value-type="float" office:value="0.191284005975486" calcext:value-type="float">
            <text:p>0.191284005975486</text:p>
          </table:table-cell>
          <table:table-cell office:value-type="float" office:value="0.147577855643211" calcext:value-type="float">
            <text:p>0.147577855643211</text:p>
          </table:table-cell>
          <table:table-cell office:value-type="float" office:value="0.0147577855643211" calcext:value-type="float">
            <text:p>0.01475778556432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23644959763455" calcext:value-type="float">
            <text:p>-0.123644959763455</text:p>
          </table:table-cell>
          <table:table-cell office:value-type="float" office:value="0.212239290631137" calcext:value-type="float">
            <text:p>0.212239290631137</text:p>
          </table:table-cell>
          <table:table-cell office:value-type="float" office:value="0.0212239290631137" calcext:value-type="float">
            <text:p>0.0212239290631137</text:p>
          </table:table-cell>
          <table:table-cell office:value-type="float" office:value="0.203112321818562" calcext:value-type="float">
            <text:p>0.203112321818562</text:p>
          </table:table-cell>
          <table:table-cell office:value-type="float" office:value="0.137173937077143" calcext:value-type="float">
            <text:p>0.137173937077143</text:p>
          </table:table-cell>
          <table:table-cell office:value-type="float" office:value="0.0137173937077143" calcext:value-type="float">
            <text:p>0.01371739370771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183667127083666" calcext:value-type="float">
            <text:p>-0.0183667127083666</text:p>
          </table:table-cell>
          <table:table-cell office:value-type="float" office:value="0.171185875699869" calcext:value-type="float">
            <text:p>0.171185875699869</text:p>
          </table:table-cell>
          <table:table-cell office:value-type="float" office:value="0.0171185875699869" calcext:value-type="float">
            <text:p>0.0171185875699869</text:p>
          </table:table-cell>
          <table:table-cell office:value-type="float" office:value="0.131248562901369" calcext:value-type="float">
            <text:p>0.131248562901369</text:p>
          </table:table-cell>
          <table:table-cell office:value-type="float" office:value="0.11065785320316" calcext:value-type="float">
            <text:p>0.11065785320316</text:p>
          </table:table-cell>
          <table:table-cell office:value-type="float" office:value="0.011065785320316" calcext:value-type="float">
            <text:p>0.0110657853203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14158252898132" calcext:value-type="float">
            <text:p>-0.0614158252898132</text:p>
          </table:table-cell>
          <table:table-cell office:value-type="float" office:value="0.1839790386303" calcext:value-type="float">
            <text:p>0.1839790386303</text:p>
          </table:table-cell>
          <table:table-cell office:value-type="float" office:value="0.01839790386303" calcext:value-type="float">
            <text:p>0.01839790386303</text:p>
          </table:table-cell>
          <table:table-cell office:value-type="float" office:value="0.155559731197076" calcext:value-type="float">
            <text:p>0.155559731197076</text:p>
          </table:table-cell>
          <table:table-cell office:value-type="float" office:value="0.114956633960875" calcext:value-type="float">
            <text:p>0.114956633960875</text:p>
          </table:table-cell>
          <table:table-cell office:value-type="float" office:value="0.0114956633960875" calcext:value-type="float">
            <text:p>0.01149566339608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64781211070706" calcext:value-type="float">
            <text:p>-0.0664781211070706</text:p>
          </table:table-cell>
          <table:table-cell office:value-type="float" office:value="0.199781706644972" calcext:value-type="float">
            <text:p>0.199781706644972</text:p>
          </table:table-cell>
          <table:table-cell office:value-type="float" office:value="0.0199781706644972" calcext:value-type="float">
            <text:p>0.0199781706644972</text:p>
          </table:table-cell>
          <table:table-cell office:value-type="float" office:value="0.169401475330756" calcext:value-type="float">
            <text:p>0.169401475330756</text:p>
          </table:table-cell>
          <table:table-cell office:value-type="float" office:value="0.124056372607019" calcext:value-type="float">
            <text:p>0.124056372607019</text:p>
          </table:table-cell>
          <table:table-cell office:value-type="float" office:value="0.0124056372607019" calcext:value-type="float">
            <text:p>0.01240563726070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154965662921489" calcext:value-type="float">
            <text:p>-0.0154965662921489</text:p>
          </table:table-cell>
          <table:table-cell office:value-type="float" office:value="0.256061103028059" calcext:value-type="float">
            <text:p>0.256061103028059</text:p>
          </table:table-cell>
          <table:table-cell office:value-type="float" office:value="0.0256061103028059" calcext:value-type="float">
            <text:p>0.0256061103028059</text:p>
          </table:table-cell>
          <table:table-cell office:value-type="float" office:value="0.209775413753724" calcext:value-type="float">
            <text:p>0.209775413753724</text:p>
          </table:table-cell>
          <table:table-cell office:value-type="float" office:value="0.146149345749607" calcext:value-type="float">
            <text:p>0.146149345749607</text:p>
          </table:table-cell>
          <table:table-cell office:value-type="float" office:value="0.0146149345749607" calcext:value-type="float">
            <text:p>0.01461493457496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387137889010639" calcext:value-type="float">
            <text:p>-0.0387137889010639</text:p>
          </table:table-cell>
          <table:table-cell office:value-type="float" office:value="0.235517782749369" calcext:value-type="float">
            <text:p>0.235517782749369</text:p>
          </table:table-cell>
          <table:table-cell office:value-type="float" office:value="0.0235517782749369" calcext:value-type="float">
            <text:p>0.0235517782749369</text:p>
          </table:table-cell>
          <table:table-cell office:value-type="float" office:value="0.19000795786854" calcext:value-type="float">
            <text:p>0.19000795786854</text:p>
          </table:table-cell>
          <table:table-cell office:value-type="float" office:value="0.143229959653678" calcext:value-type="float">
            <text:p>0.143229959653678</text:p>
          </table:table-cell>
          <table:table-cell office:value-type="float" office:value="0.0143229959653678" calcext:value-type="float">
            <text:p>0.01432299596536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544145538392116" calcext:value-type="float">
            <text:p>-0.0544145538392116</text:p>
          </table:table-cell>
          <table:table-cell office:value-type="float" office:value="0.246307303955789" calcext:value-type="float">
            <text:p>0.246307303955789</text:p>
          </table:table-cell>
          <table:table-cell office:value-type="float" office:value="0.0246307303955789" calcext:value-type="float">
            <text:p>0.0246307303955789</text:p>
          </table:table-cell>
          <table:table-cell office:value-type="float" office:value="0.203889352265869" calcext:value-type="float">
            <text:p>0.203889352265869</text:p>
          </table:table-cell>
          <table:table-cell office:value-type="float" office:value="0.147198384667639" calcext:value-type="float">
            <text:p>0.147198384667639</text:p>
          </table:table-cell>
          <table:table-cell office:value-type="float" office:value="0.0147198384667639" calcext:value-type="float">
            <text:p>0.01471983846676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696415198648789" calcext:value-type="float">
            <text:p>-0.0696415198648789</text:p>
          </table:table-cell>
          <table:table-cell office:value-type="float" office:value="0.167241614831612" calcext:value-type="float">
            <text:p>0.167241614831612</text:p>
          </table:table-cell>
          <table:table-cell office:value-type="float" office:value="0.0167241614831612" calcext:value-type="float">
            <text:p>0.0167241614831612</text:p>
          </table:table-cell>
          <table:table-cell office:value-type="float" office:value="0.140402605817334" calcext:value-type="float">
            <text:p>0.140402605817334</text:p>
          </table:table-cell>
          <table:table-cell office:value-type="float" office:value="0.113827397790872" calcext:value-type="float">
            <text:p>0.113827397790872</text:p>
          </table:table-cell>
          <table:table-cell office:value-type="float" office:value="0.0113827397790872" calcext:value-type="float">
            <text:p>0.01138273977908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5396289554023" calcext:value-type="float">
            <text:p>-0.15396289554023</text:p>
          </table:table-cell>
          <table:table-cell office:value-type="float" office:value="0.181023096758437" calcext:value-type="float">
            <text:p>0.181023096758437</text:p>
          </table:table-cell>
          <table:table-cell office:value-type="float" office:value="0.0181023096758437" calcext:value-type="float">
            <text:p>0.0181023096758437</text:p>
          </table:table-cell>
          <table:table-cell office:value-type="float" office:value="0.18886997346432" calcext:value-type="float">
            <text:p>0.18886997346432</text:p>
          </table:table-cell>
          <table:table-cell office:value-type="float" office:value="0.143809548126881" calcext:value-type="float">
            <text:p>0.143809548126881</text:p>
          </table:table-cell>
          <table:table-cell office:value-type="float" office:value="0.0143809548126881" calcext:value-type="float">
            <text:p>0.01438095481268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04588230295972" calcext:value-type="float">
            <text:p>-0.204588230295972</text:p>
          </table:table-cell>
          <table:table-cell office:value-type="float" office:value="0.193707721582926" calcext:value-type="float">
            <text:p>0.193707721582926</text:p>
          </table:table-cell>
          <table:table-cell office:value-type="float" office:value="0.0193707721582926" calcext:value-type="float">
            <text:p>0.0193707721582926</text:p>
          </table:table-cell>
          <table:table-cell office:value-type="float" office:value="0.237860775326972" calcext:value-type="float">
            <text:p>0.237860775326972</text:p>
          </table:table-cell>
          <table:table-cell office:value-type="float" office:value="0.150507726984865" calcext:value-type="float">
            <text:p>0.150507726984865</text:p>
          </table:table-cell>
          <table:table-cell office:value-type="float" office:value="0.0150507726984865" calcext:value-type="float">
            <text:p>0.01505077269848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673846297724153" calcext:value-type="float">
            <text:p>-0.0673846297724153</text:p>
          </table:table-cell>
          <table:table-cell office:value-type="float" office:value="0.242325755261055" calcext:value-type="float">
            <text:p>0.242325755261055</text:p>
          </table:table-cell>
          <table:table-cell office:value-type="float" office:value="0.0242325755261055" calcext:value-type="float">
            <text:p>0.0242325755261055</text:p>
          </table:table-cell>
          <table:table-cell office:value-type="float" office:value="0.189954550850036" calcext:value-type="float">
            <text:p>0.189954550850036</text:p>
          </table:table-cell>
          <table:table-cell office:value-type="float" office:value="0.163893630468732" calcext:value-type="float">
            <text:p>0.163893630468732</text:p>
          </table:table-cell>
          <table:table-cell office:value-type="float" office:value="0.0163893630468732" calcext:value-type="float">
            <text:p>0.01638936304687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26336849100193" calcext:value-type="float">
            <text:p>-0.126336849100193</text:p>
          </table:table-cell>
          <table:table-cell office:value-type="float" office:value="0.213726405723622" calcext:value-type="float">
            <text:p>0.213726405723622</text:p>
          </table:table-cell>
          <table:table-cell office:value-type="float" office:value="0.0213726405723622" calcext:value-type="float">
            <text:p>0.0213726405723622</text:p>
          </table:table-cell>
          <table:table-cell office:value-type="float" office:value="0.19105846967191" calcext:value-type="float">
            <text:p>0.19105846967191</text:p>
          </table:table-cell>
          <table:table-cell office:value-type="float" office:value="0.157889640993405" calcext:value-type="float">
            <text:p>0.157889640993405</text:p>
          </table:table-cell>
          <table:table-cell office:value-type="float" office:value="0.0157889640993405" calcext:value-type="float">
            <text:p>0.01578896409934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84203357010553" calcext:value-type="float">
            <text:p>-0.184203357010553</text:p>
          </table:table-cell>
          <table:table-cell office:value-type="float" office:value="0.249598090401152" calcext:value-type="float">
            <text:p>0.249598090401152</text:p>
          </table:table-cell>
          <table:table-cell office:value-type="float" office:value="0.0249598090401152" calcext:value-type="float">
            <text:p>0.0249598090401152</text:p>
          </table:table-cell>
          <table:table-cell office:value-type="float" office:value="0.250537518797383" calcext:value-type="float">
            <text:p>0.250537518797383</text:p>
          </table:table-cell>
          <table:table-cell office:value-type="float" office:value="0.182125617303477" calcext:value-type="float">
            <text:p>0.182125617303477</text:p>
          </table:table-cell>
          <table:table-cell office:value-type="float" office:value="0.0182125617303477" calcext:value-type="float">
            <text:p>0.018212561730347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74294059830713" calcext:value-type="float">
            <text:p>-0.074294059830713</text:p>
          </table:table-cell>
          <table:table-cell office:value-type="float" office:value="0.153080614842656" calcext:value-type="float">
            <text:p>0.153080614842656</text:p>
          </table:table-cell>
          <table:table-cell office:value-type="float" office:value="0.0153080614842656" calcext:value-type="float">
            <text:p>0.0153080614842656</text:p>
          </table:table-cell>
          <table:table-cell office:value-type="float" office:value="0.13455266272115" calcext:value-type="float">
            <text:p>0.13455266272115</text:p>
          </table:table-cell>
          <table:table-cell office:value-type="float" office:value="0.103545852698639" calcext:value-type="float">
            <text:p>0.103545852698639</text:p>
          </table:table-cell>
          <table:table-cell office:value-type="float" office:value="0.0103545852698639" calcext:value-type="float">
            <text:p>0.01035458526986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26789626274738" calcext:value-type="float">
            <text:p>-0.126789626274738</text:p>
          </table:table-cell>
          <table:table-cell office:value-type="float" office:value="0.155801606563083" calcext:value-type="float">
            <text:p>0.155801606563083</text:p>
          </table:table-cell>
          <table:table-cell office:value-type="float" office:value="0.0155801606563083" calcext:value-type="float">
            <text:p>0.0155801606563083</text:p>
          </table:table-cell>
          <table:table-cell office:value-type="float" office:value="0.163683317808636" calcext:value-type="float">
            <text:p>0.163683317808636</text:p>
          </table:table-cell>
          <table:table-cell office:value-type="float" office:value="0.115970999525379" calcext:value-type="float">
            <text:p>0.115970999525379</text:p>
          </table:table-cell>
          <table:table-cell office:value-type="float" office:value="0.0115970999525379" calcext:value-type="float">
            <text:p>0.01159709995253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82126251631758" calcext:value-type="float">
            <text:p>-0.182126251631758</text:p>
          </table:table-cell>
          <table:table-cell office:value-type="float" office:value="0.183494621967782" calcext:value-type="float">
            <text:p>0.183494621967782</text:p>
          </table:table-cell>
          <table:table-cell office:value-type="float" office:value="0.0183494621967782" calcext:value-type="float">
            <text:p>0.0183494621967782</text:p>
          </table:table-cell>
          <table:table-cell office:value-type="float" office:value="0.213924827525924" calcext:value-type="float">
            <text:p>0.213924827525924</text:p>
          </table:table-cell>
          <table:table-cell office:value-type="float" office:value="0.144738402929046" calcext:value-type="float">
            <text:p>0.144738402929046</text:p>
          </table:table-cell>
          <table:table-cell office:value-type="float" office:value="0.0144738402929046" calcext:value-type="float">
            <text:p>0.014473840292904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00074259611276" calcext:value-type="float">
            <text:p>-0.100074259611276</text:p>
          </table:table-cell>
          <table:table-cell office:value-type="float" office:value="0.239470063578546" calcext:value-type="float">
            <text:p>0.239470063578546</text:p>
          </table:table-cell>
          <table:table-cell office:value-type="float" office:value="0.0239470063578546" calcext:value-type="float">
            <text:p>0.0239470063578546</text:p>
          </table:table-cell>
          <table:table-cell office:value-type="float" office:value="0.201407186482695" calcext:value-type="float">
            <text:p>0.201407186482695</text:p>
          </table:table-cell>
          <table:table-cell office:value-type="float" office:value="0.162749280147611" calcext:value-type="float">
            <text:p>0.162749280147611</text:p>
          </table:table-cell>
          <table:table-cell office:value-type="float" office:value="0.0162749280147611" calcext:value-type="float">
            <text:p>0.01627492801476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11944869966781" calcext:value-type="float">
            <text:p>-0.111944869966781</text:p>
          </table:table-cell>
          <table:table-cell office:value-type="float" office:value="0.231990310154292" calcext:value-type="float">
            <text:p>0.231990310154292</text:p>
          </table:table-cell>
          <table:table-cell office:value-type="float" office:value="0.0231990310154292" calcext:value-type="float">
            <text:p>0.0231990310154292</text:p>
          </table:table-cell>
          <table:table-cell office:value-type="float" office:value="0.211808657489528" calcext:value-type="float">
            <text:p>0.211808657489528</text:p>
          </table:table-cell>
          <table:table-cell office:value-type="float" office:value="0.145470520078511" calcext:value-type="float">
            <text:p>0.145470520078511</text:p>
          </table:table-cell>
          <table:table-cell office:value-type="float" office:value="0.0145470520078511" calcext:value-type="float">
            <text:p>0.01454705200785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55718584506971" calcext:value-type="float">
            <text:p>-0.155718584506971</text:p>
          </table:table-cell>
          <table:table-cell office:value-type="float" office:value="0.202639887593886" calcext:value-type="float">
            <text:p>0.202639887593886</text:p>
          </table:table-cell>
          <table:table-cell office:value-type="float" office:value="0.0202639887593886" calcext:value-type="float">
            <text:p>0.0202639887593886</text:p>
          </table:table-cell>
          <table:table-cell office:value-type="float" office:value="0.216103035999703" calcext:value-type="float">
            <text:p>0.216103035999703</text:p>
          </table:table-cell>
          <table:table-cell office:value-type="float" office:value="0.135587201044413" calcext:value-type="float">
            <text:p>0.135587201044413</text:p>
          </table:table-cell>
          <table:table-cell office:value-type="float" office:value="0.0135587201044413" calcext:value-type="float">
            <text:p>0.01355872010444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38066555909284" calcext:value-type="float">
            <text:p>-0.138066555909284</text:p>
          </table:table-cell>
          <table:table-cell office:value-type="float" office:value="0.155099324141161" calcext:value-type="float">
            <text:p>0.155099324141161</text:p>
          </table:table-cell>
          <table:table-cell office:value-type="float" office:value="0.0155099324141161" calcext:value-type="float">
            <text:p>0.0155099324141161</text:p>
          </table:table-cell>
          <table:table-cell office:value-type="float" office:value="0.172482487663496" calcext:value-type="float">
            <text:p>0.172482487663496</text:p>
          </table:table-cell>
          <table:table-cell office:value-type="float" office:value="0.115152106940982" calcext:value-type="float">
            <text:p>0.115152106940982</text:p>
          </table:table-cell>
          <table:table-cell office:value-type="float" office:value="0.0115152106940982" calcext:value-type="float">
            <text:p>0.01151521069409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81987808869685" calcext:value-type="float">
            <text:p>-0.181987808869685</text:p>
          </table:table-cell>
          <table:table-cell office:value-type="float" office:value="0.135371052640297" calcext:value-type="float">
            <text:p>0.135371052640297</text:p>
          </table:table-cell>
          <table:table-cell office:value-type="float" office:value="0.0135371052640297" calcext:value-type="float">
            <text:p>0.0135371052640297</text:p>
          </table:table-cell>
          <table:table-cell office:value-type="float" office:value="0.196972866158562" calcext:value-type="float">
            <text:p>0.196972866158562</text:p>
          </table:table-cell>
          <table:table-cell office:value-type="float" office:value="0.112201663901683" calcext:value-type="float">
            <text:p>0.112201663901683</text:p>
          </table:table-cell>
          <table:table-cell office:value-type="float" office:value="0.0112201663901683" calcext:value-type="float">
            <text:p>0.011220166390168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13664224305918" calcext:value-type="float">
            <text:p>-0.313664224305918</text:p>
          </table:table-cell>
          <table:table-cell office:value-type="float" office:value="0.158488334689419" calcext:value-type="float">
            <text:p>0.158488334689419</text:p>
          </table:table-cell>
          <table:table-cell office:value-type="float" office:value="0.0158488334689419" calcext:value-type="float">
            <text:p>0.0158488334689419</text:p>
          </table:table-cell>
          <table:table-cell office:value-type="float" office:value="0.315101552080564" calcext:value-type="float">
            <text:p>0.315101552080564</text:p>
          </table:table-cell>
          <table:table-cell office:value-type="float" office:value="0.15558175023509" calcext:value-type="float">
            <text:p>0.15558175023509</text:p>
          </table:table-cell>
          <table:table-cell office:value-type="float" office:value="0.015558175023509" calcext:value-type="float">
            <text:p>0.0155581750235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739261745630511" calcext:value-type="float">
            <text:p>-0.0739261745630511</text:p>
          </table:table-cell>
          <table:table-cell office:value-type="float" office:value="0.204084012291952" calcext:value-type="float">
            <text:p>0.204084012291952</text:p>
          </table:table-cell>
          <table:table-cell office:value-type="float" office:value="0.0204084012291952" calcext:value-type="float">
            <text:p>0.0204084012291952</text:p>
          </table:table-cell>
          <table:table-cell office:value-type="float" office:value="0.16741955319318" calcext:value-type="float">
            <text:p>0.16741955319318</text:p>
          </table:table-cell>
          <table:table-cell office:value-type="float" office:value="0.13732492518602" calcext:value-type="float">
            <text:p>0.13732492518602</text:p>
          </table:table-cell>
          <table:table-cell office:value-type="float" office:value="0.013732492518602" calcext:value-type="float">
            <text:p>0.0137324925186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86698697711755" calcext:value-type="float">
            <text:p>-0.186698697711755</text:p>
          </table:table-cell>
          <table:table-cell office:value-type="float" office:value="0.208745027050929" calcext:value-type="float">
            <text:p>0.208745027050929</text:p>
          </table:table-cell>
          <table:table-cell office:value-type="float" office:value="0.0208745027050929" calcext:value-type="float">
            <text:p>0.0208745027050929</text:p>
          </table:table-cell>
          <table:table-cell office:value-type="float" office:value="0.23516017254772" calcext:value-type="float">
            <text:p>0.23516017254772</text:p>
          </table:table-cell>
          <table:table-cell office:value-type="float" office:value="0.151406998590294" calcext:value-type="float">
            <text:p>0.151406998590294</text:p>
          </table:table-cell>
          <table:table-cell office:value-type="float" office:value="0.0151406998590294" calcext:value-type="float">
            <text:p>0.01514069985902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48296436464353" calcext:value-type="float">
            <text:p>-0.248296436464353</text:p>
          </table:table-cell>
          <table:table-cell office:value-type="float" office:value="0.242506020902986" calcext:value-type="float">
            <text:p>0.242506020902986</text:p>
          </table:table-cell>
          <table:table-cell office:value-type="float" office:value="0.0242506020902986" calcext:value-type="float">
            <text:p>0.0242506020902986</text:p>
          </table:table-cell>
          <table:table-cell office:value-type="float" office:value="0.286865400479143" calcext:value-type="float">
            <text:p>0.286865400479143</text:p>
          </table:table-cell>
          <table:table-cell office:value-type="float" office:value="0.194833367916879" calcext:value-type="float">
            <text:p>0.194833367916879</text:p>
          </table:table-cell>
          <table:table-cell office:value-type="float" office:value="0.0194833367916879" calcext:value-type="float">
            <text:p>0.01948333679168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32592387648634" calcext:value-type="float">
            <text:p>-0.132592387648634</text:p>
          </table:table-cell>
          <table:table-cell office:value-type="float" office:value="0.153569090654198" calcext:value-type="float">
            <text:p>0.153569090654198</text:p>
          </table:table-cell>
          <table:table-cell office:value-type="float" office:value="0.0153569090654198" calcext:value-type="float">
            <text:p>0.0153569090654198</text:p>
          </table:table-cell>
          <table:table-cell office:value-type="float" office:value="0.160377735567574" calcext:value-type="float">
            <text:p>0.160377735567574</text:p>
          </table:table-cell>
          <table:table-cell office:value-type="float" office:value="0.123939355261853" calcext:value-type="float">
            <text:p>0.123939355261853</text:p>
          </table:table-cell>
          <table:table-cell office:value-type="float" office:value="0.0123939355261853" calcext:value-type="float">
            <text:p>0.012393935526185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25104424167209" calcext:value-type="float">
            <text:p>-0.225104424167209</text:p>
          </table:table-cell>
          <table:table-cell office:value-type="float" office:value="0.1407410629747" calcext:value-type="float">
            <text:p>0.1407410629747</text:p>
          </table:table-cell>
          <table:table-cell office:value-type="float" office:value="0.01407410629747" calcext:value-type="float">
            <text:p>0.01407410629747</text:p>
          </table:table-cell>
          <table:table-cell office:value-type="float" office:value="0.227269309337638" calcext:value-type="float">
            <text:p>0.227269309337638</text:p>
          </table:table-cell>
          <table:table-cell office:value-type="float" office:value="0.13718169457064" calcext:value-type="float">
            <text:p>0.13718169457064</text:p>
          </table:table-cell>
          <table:table-cell office:value-type="float" office:value="0.013718169457064" calcext:value-type="float">
            <text:p>0.0137181694570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86819272879181" calcext:value-type="float">
            <text:p>-0.286819272879181</text:p>
          </table:table-cell>
          <table:table-cell office:value-type="float" office:value="0.144880443286585" calcext:value-type="float">
            <text:p>0.144880443286585</text:p>
          </table:table-cell>
          <table:table-cell office:value-type="float" office:value="0.0144880443286585" calcext:value-type="float">
            <text:p>0.0144880443286585</text:p>
          </table:table-cell>
          <table:table-cell office:value-type="float" office:value="0.286968357074047" calcext:value-type="float">
            <text:p>0.286968357074047</text:p>
          </table:table-cell>
          <table:table-cell office:value-type="float" office:value="0.144581935637685" calcext:value-type="float">
            <text:p>0.144581935637685</text:p>
          </table:table-cell>
          <table:table-cell office:value-type="float" office:value="0.0144581935637685" calcext:value-type="float">
            <text:p>0.01445819356376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1885856161938" calcext:value-type="float">
            <text:p>-0.11885856161938</text:p>
          </table:table-cell>
          <table:table-cell office:value-type="float" office:value="0.222839583691893" calcext:value-type="float">
            <text:p>0.222839583691893</text:p>
          </table:table-cell>
          <table:table-cell office:value-type="float" office:value="0.0222839583691893" calcext:value-type="float">
            <text:p>0.0222839583691893</text:p>
          </table:table-cell>
          <table:table-cell office:value-type="float" office:value="0.196460936599034" calcext:value-type="float">
            <text:p>0.196460936599034</text:p>
          </table:table-cell>
          <table:table-cell office:value-type="float" office:value="0.157926473494915" calcext:value-type="float">
            <text:p>0.157926473494915</text:p>
          </table:table-cell>
          <table:table-cell office:value-type="float" office:value="0.0157926473494915" calcext:value-type="float">
            <text:p>0.01579264734949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72910997308822" calcext:value-type="float">
            <text:p>-0.172910997308822</text:p>
          </table:table-cell>
          <table:table-cell office:value-type="float" office:value="0.191720221174088" calcext:value-type="float">
            <text:p>0.191720221174088</text:p>
          </table:table-cell>
          <table:table-cell office:value-type="float" office:value="0.0191720221174088" calcext:value-type="float">
            <text:p>0.0191720221174088</text:p>
          </table:table-cell>
          <table:table-cell office:value-type="float" office:value="0.217684261420256" calcext:value-type="float">
            <text:p>0.217684261420256</text:p>
          </table:table-cell>
          <table:table-cell office:value-type="float" office:value="0.138172970559192" calcext:value-type="float">
            <text:p>0.138172970559192</text:p>
          </table:table-cell>
          <table:table-cell office:value-type="float" office:value="0.0138172970559192" calcext:value-type="float">
            <text:p>0.01381729705591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Type I (Traditional)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40998587847402" calcext:value-type="float">
            <text:p>-0.240998587847402</text:p>
          </table:table-cell>
          <table:table-cell office:value-type="float" office:value="0.219482574271863" calcext:value-type="float">
            <text:p>0.219482574271863</text:p>
          </table:table-cell>
          <table:table-cell office:value-type="float" office:value="0.0219482574271863" calcext:value-type="float">
            <text:p>0.0219482574271863</text:p>
          </table:table-cell>
          <table:table-cell office:value-type="float" office:value="0.278591356498054" calcext:value-type="float">
            <text:p>0.278591356498054</text:p>
          </table:table-cell>
          <table:table-cell office:value-type="float" office:value="0.168648968510713" calcext:value-type="float">
            <text:p>0.168648968510713</text:p>
          </table:table-cell>
          <table:table-cell office:value-type="float" office:value="0.0168648968510713" calcext:value-type="float">
            <text:p>0.01686489685107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21023093977888" calcext:value-type="float">
            <text:p>-0.121023093977888</text:p>
          </table:table-cell>
          <table:table-cell office:value-type="float" office:value="0.109218721689211" calcext:value-type="float">
            <text:p>0.109218721689211</text:p>
          </table:table-cell>
          <table:table-cell office:value-type="float" office:value="0.0109218721689211" calcext:value-type="float">
            <text:p>0.0109218721689211</text:p>
          </table:table-cell>
          <table:table-cell office:value-type="float" office:value="0.133455469593214" calcext:value-type="float">
            <text:p>0.133455469593214</text:p>
          </table:table-cell>
          <table:table-cell office:value-type="float" office:value="0.0934505151143522" calcext:value-type="float">
            <text:p>0.0934505151143522</text:p>
          </table:table-cell>
          <table:table-cell office:value-type="float" office:value="0.00934505151143522" calcext:value-type="float">
            <text:p>0.009345051511435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04742220600446" calcext:value-type="float">
            <text:p>-0.204742220600446</text:p>
          </table:table-cell>
          <table:table-cell office:value-type="float" office:value="0.103148612688324" calcext:value-type="float">
            <text:p>0.103148612688324</text:p>
          </table:table-cell>
          <table:table-cell office:value-type="float" office:value="0.0103148612688324" calcext:value-type="float">
            <text:p>0.0103148612688324</text:p>
          </table:table-cell>
          <table:table-cell office:value-type="float" office:value="0.205774802071973" calcext:value-type="float">
            <text:p>0.205774802071973</text:p>
          </table:table-cell>
          <table:table-cell office:value-type="float" office:value="0.101051780231982" calcext:value-type="float">
            <text:p>0.101051780231982</text:p>
          </table:table-cell>
          <table:table-cell office:value-type="float" office:value="0.0101051780231982" calcext:value-type="float">
            <text:p>0.01010517802319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577450751506" calcext:value-type="float">
            <text:p>-0.2577450751506</text:p>
          </table:table-cell>
          <table:table-cell office:value-type="float" office:value="0.123260486817219" calcext:value-type="float">
            <text:p>0.123260486817219</text:p>
          </table:table-cell>
          <table:table-cell office:value-type="float" office:value="0.0123260486817219" calcext:value-type="float">
            <text:p>0.0123260486817219</text:p>
          </table:table-cell>
          <table:table-cell office:value-type="float" office:value="0.260383269744835" calcext:value-type="float">
            <text:p>0.260383269744835</text:p>
          </table:table-cell>
          <table:table-cell office:value-type="float" office:value="0.117526239218048" calcext:value-type="float">
            <text:p>0.117526239218048</text:p>
          </table:table-cell>
          <table:table-cell office:value-type="float" office:value="0.0117526239218048" calcext:value-type="float">
            <text:p>0.01175262392180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50129223073019" calcext:value-type="float">
            <text:p>-0.150129223073019</text:p>
          </table:table-cell>
          <table:table-cell office:value-type="float" office:value="0.14524977586454" calcext:value-type="float">
            <text:p>0.14524977586454</text:p>
          </table:table-cell>
          <table:table-cell office:value-type="float" office:value="0.014524977586454" calcext:value-type="float">
            <text:p>0.014524977586454</text:p>
          </table:table-cell>
          <table:table-cell office:value-type="float" office:value="0.170772440142187" calcext:value-type="float">
            <text:p>0.170772440142187</text:p>
          </table:table-cell>
          <table:table-cell office:value-type="float" office:value="0.120025585333084" calcext:value-type="float">
            <text:p>0.120025585333084</text:p>
          </table:table-cell>
          <table:table-cell office:value-type="float" office:value="0.0120025585333084" calcext:value-type="float">
            <text:p>0.01200255853330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0212676393998" calcext:value-type="float">
            <text:p>-0.20212676393998</text:p>
          </table:table-cell>
          <table:table-cell office:value-type="float" office:value="0.153763761089995" calcext:value-type="float">
            <text:p>0.153763761089995</text:p>
          </table:table-cell>
          <table:table-cell office:value-type="float" office:value="0.0153763761089995" calcext:value-type="float">
            <text:p>0.0153763761089995</text:p>
          </table:table-cell>
          <table:table-cell office:value-type="float" office:value="0.214624720750556" calcext:value-type="float">
            <text:p>0.214624720750556</text:p>
          </table:table-cell>
          <table:table-cell office:value-type="float" office:value="0.135580753177626" calcext:value-type="float">
            <text:p>0.135580753177626</text:p>
          </table:table-cell>
          <table:table-cell office:value-type="float" office:value="0.0135580753177626" calcext:value-type="float">
            <text:p>0.01355807531776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82793412371827" calcext:value-type="float">
            <text:p>-0.282793412371827</text:p>
          </table:table-cell>
          <table:table-cell office:value-type="float" office:value="0.174326795332607" calcext:value-type="float">
            <text:p>0.174326795332607</text:p>
          </table:table-cell>
          <table:table-cell office:value-type="float" office:value="0.0174326795332607" calcext:value-type="float">
            <text:p>0.0174326795332607</text:p>
          </table:table-cell>
          <table:table-cell office:value-type="float" office:value="0.286365521105735" calcext:value-type="float">
            <text:p>0.286365521105735</text:p>
          </table:table-cell>
          <table:table-cell office:value-type="float" office:value="0.168333590332749" calcext:value-type="float">
            <text:p>0.168333590332749</text:p>
          </table:table-cell>
          <table:table-cell office:value-type="float" office:value="0.0168333590332749" calcext:value-type="float">
            <text:p>0.01683335903327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23968386260841" calcext:value-type="float">
            <text:p>-0.123968386260841</text:p>
          </table:table-cell>
          <table:table-cell office:value-type="float" office:value="0.10738320929423" calcext:value-type="float">
            <text:p>0.10738320929423</text:p>
          </table:table-cell>
          <table:table-cell office:value-type="float" office:value="0.010738320929423" calcext:value-type="float">
            <text:p>0.010738320929423</text:p>
          </table:table-cell>
          <table:table-cell office:value-type="float" office:value="0.135514892930273" calcext:value-type="float">
            <text:p>0.135514892930273</text:p>
          </table:table-cell>
          <table:table-cell office:value-type="float" office:value="0.0922212791684954" calcext:value-type="float">
            <text:p>0.0922212791684954</text:p>
          </table:table-cell>
          <table:table-cell office:value-type="float" office:value="0.00922212791684954" calcext:value-type="float">
            <text:p>0.009222127916849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0767228371976" calcext:value-type="float">
            <text:p>-0.20767228371976</text:p>
          </table:table-cell>
          <table:table-cell office:value-type="float" office:value="0.0965446354177989" calcext:value-type="float">
            <text:p>0.0965446354177989</text:p>
          </table:table-cell>
          <table:table-cell office:value-type="float" office:value="0.00965446354177989" calcext:value-type="float">
            <text:p>0.00965446354177989</text:p>
          </table:table-cell>
          <table:table-cell office:value-type="float" office:value="0.209299156456495" calcext:value-type="float">
            <text:p>0.209299156456495</text:p>
          </table:table-cell>
          <table:table-cell office:value-type="float" office:value="0.0929282252283836" calcext:value-type="float">
            <text:p>0.0929282252283836</text:p>
          </table:table-cell>
          <table:table-cell office:value-type="float" office:value="0.00929282252283836" calcext:value-type="float">
            <text:p>0.009292822522838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58682471472865" calcext:value-type="float">
            <text:p>-0.258682471472865</text:p>
          </table:table-cell>
          <table:table-cell office:value-type="float" office:value="0.111466779542353" calcext:value-type="float">
            <text:p>0.111466779542353</text:p>
          </table:table-cell>
          <table:table-cell office:value-type="float" office:value="0.0111466779542353" calcext:value-type="float">
            <text:p>0.0111466779542353</text:p>
          </table:table-cell>
          <table:table-cell office:value-type="float" office:value="0.258682471472865" calcext:value-type="float">
            <text:p>0.258682471472865</text:p>
          </table:table-cell>
          <table:table-cell office:value-type="float" office:value="0.111466779542353" calcext:value-type="float">
            <text:p>0.111466779542353</text:p>
          </table:table-cell>
          <table:table-cell office:value-type="float" office:value="0.0111466779542353" calcext:value-type="float">
            <text:p>0.011146677954235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0963681096785" calcext:value-type="float">
            <text:p>-0.10963681096785</text:p>
          </table:table-cell>
          <table:table-cell office:value-type="float" office:value="0.147628830445314" calcext:value-type="float">
            <text:p>0.147628830445314</text:p>
          </table:table-cell>
          <table:table-cell office:value-type="float" office:value="0.0147628830445314" calcext:value-type="float">
            <text:p>0.0147628830445314</text:p>
          </table:table-cell>
          <table:table-cell office:value-type="float" office:value="0.151638683966511" calcext:value-type="float">
            <text:p>0.151638683966511</text:p>
          </table:table-cell>
          <table:table-cell office:value-type="float" office:value="0.103486048964448" calcext:value-type="float">
            <text:p>0.103486048964448</text:p>
          </table:table-cell>
          <table:table-cell office:value-type="float" office:value="0.0103486048964448" calcext:value-type="float">
            <text:p>0.01034860489644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96966758472653" calcext:value-type="float">
            <text:p>-0.196966758472653</text:p>
          </table:table-cell>
          <table:table-cell office:value-type="float" office:value="0.146557004477406" calcext:value-type="float">
            <text:p>0.146557004477406</text:p>
          </table:table-cell>
          <table:table-cell office:value-type="float" office:value="0.0146557004477406" calcext:value-type="float">
            <text:p>0.0146557004477406</text:p>
          </table:table-cell>
          <table:table-cell office:value-type="float" office:value="0.203423981922149" calcext:value-type="float">
            <text:p>0.203423981922149</text:p>
          </table:table-cell>
          <table:table-cell office:value-type="float" office:value="0.13735875584031" calcext:value-type="float">
            <text:p>0.13735875584031</text:p>
          </table:table-cell>
          <table:table-cell office:value-type="float" office:value="0.013735875584031" calcext:value-type="float">
            <text:p>0.0137358755840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5013257322064" calcext:value-type="float">
            <text:p>-0.25013257322064</text:p>
          </table:table-cell>
          <table:table-cell office:value-type="float" office:value="0.151369996328504" calcext:value-type="float">
            <text:p>0.151369996328504</text:p>
          </table:table-cell>
          <table:table-cell office:value-type="float" office:value="0.0151369996328504" calcext:value-type="float">
            <text:p>0.0151369996328504</text:p>
          </table:table-cell>
          <table:table-cell office:value-type="float" office:value="0.258352371663731" calcext:value-type="float">
            <text:p>0.258352371663731</text:p>
          </table:table-cell>
          <table:table-cell office:value-type="float" office:value="0.136715081122656" calcext:value-type="float">
            <text:p>0.136715081122656</text:p>
          </table:table-cell>
          <table:table-cell office:value-type="float" office:value="0.0136715081122656" calcext:value-type="float">
            <text:p>0.01367150811226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98424405542568" calcext:value-type="float">
            <text:p>-0.198424405542568</text:p>
          </table:table-cell>
          <table:table-cell office:value-type="float" office:value="0.0840814477775534" calcext:value-type="float">
            <text:p>0.0840814477775534</text:p>
          </table:table-cell>
          <table:table-cell office:value-type="float" office:value="0.00840814477775534" calcext:value-type="float">
            <text:p>0.00840814477775534</text:p>
          </table:table-cell>
          <table:table-cell office:value-type="float" office:value="0.198424405542568" calcext:value-type="float">
            <text:p>0.198424405542568</text:p>
          </table:table-cell>
          <table:table-cell office:value-type="float" office:value="0.0840814477775534" calcext:value-type="float">
            <text:p>0.0840814477775534</text:p>
          </table:table-cell>
          <table:table-cell office:value-type="float" office:value="0.00840814477775534" calcext:value-type="float">
            <text:p>0.0084081447777553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60927422220593" calcext:value-type="float">
            <text:p>-0.360927422220593</text:p>
          </table:table-cell>
          <table:table-cell office:value-type="float" office:value="0.0839972457923364" calcext:value-type="float">
            <text:p>0.0839972457923364</text:p>
          </table:table-cell>
          <table:table-cell office:value-type="float" office:value="0.00839972457923364" calcext:value-type="float">
            <text:p>0.00839972457923364</text:p>
          </table:table-cell>
          <table:table-cell office:value-type="float" office:value="0.360927422220593" calcext:value-type="float">
            <text:p>0.360927422220593</text:p>
          </table:table-cell>
          <table:table-cell office:value-type="float" office:value="0.0839972457923364" calcext:value-type="float">
            <text:p>0.0839972457923364</text:p>
          </table:table-cell>
          <table:table-cell office:value-type="float" office:value="0.00839972457923364" calcext:value-type="float">
            <text:p>0.008399724579233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514816175058598" calcext:value-type="float">
            <text:p>-0.514816175058598</text:p>
          </table:table-cell>
          <table:table-cell office:value-type="float" office:value="0.094835148664352" calcext:value-type="float">
            <text:p>0.094835148664352</text:p>
          </table:table-cell>
          <table:table-cell office:value-type="float" office:value="0.0094835148664352" calcext:value-type="float">
            <text:p>0.0094835148664352</text:p>
          </table:table-cell>
          <table:table-cell office:value-type="float" office:value="0.514816175058598" calcext:value-type="float">
            <text:p>0.514816175058598</text:p>
          </table:table-cell>
          <table:table-cell office:value-type="float" office:value="0.094835148664352" calcext:value-type="float">
            <text:p>0.094835148664352</text:p>
          </table:table-cell>
          <table:table-cell office:value-type="float" office:value="0.0094835148664352" calcext:value-type="float">
            <text:p>0.00948351486643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1512488154589" calcext:value-type="float">
            <text:p>-0.21512488154589</text:p>
          </table:table-cell>
          <table:table-cell office:value-type="float" office:value="0.130142057928197" calcext:value-type="float">
            <text:p>0.130142057928197</text:p>
          </table:table-cell>
          <table:table-cell office:value-type="float" office:value="0.0130142057928197" calcext:value-type="float">
            <text:p>0.0130142057928197</text:p>
          </table:table-cell>
          <table:table-cell office:value-type="float" office:value="0.217555155827528" calcext:value-type="float">
            <text:p>0.217555155827528</text:p>
          </table:table-cell>
          <table:table-cell office:value-type="float" office:value="0.125995248116109" calcext:value-type="float">
            <text:p>0.125995248116109</text:p>
          </table:table-cell>
          <table:table-cell office:value-type="float" office:value="0.0125995248116109" calcext:value-type="float">
            <text:p>0.01259952481161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352238811864372" calcext:value-type="float">
            <text:p>-0.352238811864372</text:p>
          </table:table-cell>
          <table:table-cell office:value-type="float" office:value="0.127580593779454" calcext:value-type="float">
            <text:p>0.127580593779454</text:p>
          </table:table-cell>
          <table:table-cell office:value-type="float" office:value="0.0127580593779454" calcext:value-type="float">
            <text:p>0.0127580593779454</text:p>
          </table:table-cell>
          <table:table-cell office:value-type="float" office:value="0.353145742655419" calcext:value-type="float">
            <text:p>0.353145742655419</text:p>
          </table:table-cell>
          <table:table-cell office:value-type="float" office:value="0.125022441856174" calcext:value-type="float">
            <text:p>0.125022441856174</text:p>
          </table:table-cell>
          <table:table-cell office:value-type="float" office:value="0.0125022441856174" calcext:value-type="float">
            <text:p>0.012502244185617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513023718390996" calcext:value-type="float">
            <text:p>-0.513023718390996</text:p>
          </table:table-cell>
          <table:table-cell office:value-type="float" office:value="0.128087689809454" calcext:value-type="float">
            <text:p>0.128087689809454</text:p>
          </table:table-cell>
          <table:table-cell office:value-type="float" office:value="0.0128087689809454" calcext:value-type="float">
            <text:p>0.0128087689809454</text:p>
          </table:table-cell>
          <table:table-cell office:value-type="float" office:value="0.513023718390996" calcext:value-type="float">
            <text:p>0.513023718390996</text:p>
          </table:table-cell>
          <table:table-cell office:value-type="float" office:value="0.128087689809454" calcext:value-type="float">
            <text:p>0.128087689809454</text:p>
          </table:table-cell>
          <table:table-cell office:value-type="float" office:value="0.0128087689809454" calcext:value-type="float">
            <text:p>0.01280876898094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07187531735289" calcext:value-type="float">
            <text:p>-0.207187531735289</text:p>
          </table:table-cell>
          <table:table-cell office:value-type="float" office:value="0.0865879993980604" calcext:value-type="float">
            <text:p>0.0865879993980604</text:p>
          </table:table-cell>
          <table:table-cell office:value-type="float" office:value="0.00865879993980604" calcext:value-type="float">
            <text:p>0.00865879993980604</text:p>
          </table:table-cell>
          <table:table-cell office:value-type="float" office:value="0.207187531735289" calcext:value-type="float">
            <text:p>0.207187531735289</text:p>
          </table:table-cell>
          <table:table-cell office:value-type="float" office:value="0.0865879993980604" calcext:value-type="float">
            <text:p>0.0865879993980604</text:p>
          </table:table-cell>
          <table:table-cell office:value-type="float" office:value="0.00865879993980604" calcext:value-type="float">
            <text:p>0.008658799939806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362985626885523" calcext:value-type="float">
            <text:p>-0.362985626885523</text:p>
          </table:table-cell>
          <table:table-cell office:value-type="float" office:value="0.0744396480609249" calcext:value-type="float">
            <text:p>0.0744396480609249</text:p>
          </table:table-cell>
          <table:table-cell office:value-type="float" office:value="0.00744396480609249" calcext:value-type="float">
            <text:p>0.00744396480609249</text:p>
          </table:table-cell>
          <table:table-cell office:value-type="float" office:value="0.362985626885523" calcext:value-type="float">
            <text:p>0.362985626885523</text:p>
          </table:table-cell>
          <table:table-cell office:value-type="float" office:value="0.0744396480609249" calcext:value-type="float">
            <text:p>0.0744396480609249</text:p>
          </table:table-cell>
          <table:table-cell office:value-type="float" office:value="0.00744396480609249" calcext:value-type="float">
            <text:p>0.007443964806092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09502571933229" calcext:value-type="float">
            <text:p>-0.509502571933229</text:p>
          </table:table-cell>
          <table:table-cell office:value-type="float" office:value="0.0897726954163081" calcext:value-type="float">
            <text:p>0.0897726954163081</text:p>
          </table:table-cell>
          <table:table-cell office:value-type="float" office:value="0.00897726954163081" calcext:value-type="float">
            <text:p>0.00897726954163081</text:p>
          </table:table-cell>
          <table:table-cell office:value-type="float" office:value="0.509502571933229" calcext:value-type="float">
            <text:p>0.509502571933229</text:p>
          </table:table-cell>
          <table:table-cell office:value-type="float" office:value="0.0897726954163081" calcext:value-type="float">
            <text:p>0.0897726954163081</text:p>
          </table:table-cell>
          <table:table-cell office:value-type="float" office:value="0.00897726954163081" calcext:value-type="float">
            <text:p>0.008977269541630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19353726790817" calcext:value-type="float">
            <text:p>-0.219353726790817</text:p>
          </table:table-cell>
          <table:table-cell office:value-type="float" office:value="0.122467340088193" calcext:value-type="float">
            <text:p>0.122467340088193</text:p>
          </table:table-cell>
          <table:table-cell office:value-type="float" office:value="0.0122467340088193" calcext:value-type="float">
            <text:p>0.0122467340088193</text:p>
          </table:table-cell>
          <table:table-cell office:value-type="float" office:value="0.219860924619569" calcext:value-type="float">
            <text:p>0.219860924619569</text:p>
          </table:table-cell>
          <table:table-cell office:value-type="float" office:value="0.121545178767648" calcext:value-type="float">
            <text:p>0.121545178767648</text:p>
          </table:table-cell>
          <table:table-cell office:value-type="float" office:value="0.0121545178767648" calcext:value-type="float">
            <text:p>0.01215451787676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5274600779685" calcext:value-type="float">
            <text:p>-0.35274600779685</text:p>
          </table:table-cell>
          <table:table-cell office:value-type="float" office:value="0.1190409356571" calcext:value-type="float">
            <text:p>0.1190409356571</text:p>
          </table:table-cell>
          <table:table-cell office:value-type="float" office:value="0.01190409356571" calcext:value-type="float">
            <text:p>0.01190409356571</text:p>
          </table:table-cell>
          <table:table-cell office:value-type="float" office:value="0.35274600779685" calcext:value-type="float">
            <text:p>0.35274600779685</text:p>
          </table:table-cell>
          <table:table-cell office:value-type="float" office:value="0.1190409356571" calcext:value-type="float">
            <text:p>0.1190409356571</text:p>
          </table:table-cell>
          <table:table-cell office:value-type="float" office:value="0.01190409356571" calcext:value-type="float">
            <text:p>0.0119040935657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504970761125402" calcext:value-type="float">
            <text:p>-0.504970761125402</text:p>
          </table:table-cell>
          <table:table-cell office:value-type="float" office:value="0.107382409961552" calcext:value-type="float">
            <text:p>0.107382409961552</text:p>
          </table:table-cell>
          <table:table-cell office:value-type="float" office:value="0.0107382409961552" calcext:value-type="float">
            <text:p>0.0107382409961552</text:p>
          </table:table-cell>
          <table:table-cell office:value-type="float" office:value="0.504970761125402" calcext:value-type="float">
            <text:p>0.504970761125402</text:p>
          </table:table-cell>
          <table:table-cell office:value-type="float" office:value="0.107382409961552" calcext:value-type="float">
            <text:p>0.107382409961552</text:p>
          </table:table-cell>
          <table:table-cell office:value-type="float" office:value="0.0107382409961552" calcext:value-type="float">
            <text:p>0.01073824099615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97262577894676" calcext:value-type="float">
            <text:p>-0.297262577894676</text:p>
          </table:table-cell>
          <table:table-cell office:value-type="float" office:value="0.0755408623726464" calcext:value-type="float">
            <text:p>0.0755408623726464</text:p>
          </table:table-cell>
          <table:table-cell office:value-type="float" office:value="0.00755408623726464" calcext:value-type="float">
            <text:p>0.00755408623726464</text:p>
          </table:table-cell>
          <table:table-cell office:value-type="float" office:value="0.297262577894676" calcext:value-type="float">
            <text:p>0.297262577894676</text:p>
          </table:table-cell>
          <table:table-cell office:value-type="float" office:value="0.0755408623726464" calcext:value-type="float">
            <text:p>0.0755408623726464</text:p>
          </table:table-cell>
          <table:table-cell office:value-type="float" office:value="0.00755408623726464" calcext:value-type="float">
            <text:p>0.007554086237264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92865931359643" calcext:value-type="float">
            <text:p>-0.492865931359643</text:p>
          </table:table-cell>
          <table:table-cell office:value-type="float" office:value="0.0683672869376415" calcext:value-type="float">
            <text:p>0.0683672869376415</text:p>
          </table:table-cell>
          <table:table-cell office:value-type="float" office:value="0.00683672869376415" calcext:value-type="float">
            <text:p>0.00683672869376415</text:p>
          </table:table-cell>
          <table:table-cell office:value-type="float" office:value="0.492865931359643" calcext:value-type="float">
            <text:p>0.492865931359643</text:p>
          </table:table-cell>
          <table:table-cell office:value-type="float" office:value="0.0683672869376415" calcext:value-type="float">
            <text:p>0.0683672869376415</text:p>
          </table:table-cell>
          <table:table-cell office:value-type="float" office:value="0.00683672869376415" calcext:value-type="float">
            <text:p>0.006836728693764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711049121733817" calcext:value-type="float">
            <text:p>-0.711049121733817</text:p>
          </table:table-cell>
          <table:table-cell office:value-type="float" office:value="0.0748760239371887" calcext:value-type="float">
            <text:p>0.0748760239371887</text:p>
          </table:table-cell>
          <table:table-cell office:value-type="float" office:value="0.00748760239371886" calcext:value-type="float">
            <text:p>0.00748760239371886</text:p>
          </table:table-cell>
          <table:table-cell office:value-type="float" office:value="0.711049121733817" calcext:value-type="float">
            <text:p>0.711049121733817</text:p>
          </table:table-cell>
          <table:table-cell office:value-type="float" office:value="0.0748760239371887" calcext:value-type="float">
            <text:p>0.0748760239371887</text:p>
          </table:table-cell>
          <table:table-cell office:value-type="float" office:value="0.00748760239371886" calcext:value-type="float">
            <text:p>0.007487602393718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7746924728922" calcext:value-type="float">
            <text:p>-0.27746924728922</text:p>
          </table:table-cell>
          <table:table-cell office:value-type="float" office:value="0.0922776503269873" calcext:value-type="float">
            <text:p>0.0922776503269873</text:p>
          </table:table-cell>
          <table:table-cell office:value-type="float" office:value="0.00922776503269873" calcext:value-type="float">
            <text:p>0.00922776503269873</text:p>
          </table:table-cell>
          <table:table-cell office:value-type="float" office:value="0.27746924728922" calcext:value-type="float">
            <text:p>0.27746924728922</text:p>
          </table:table-cell>
          <table:table-cell office:value-type="float" office:value="0.0922776503269873" calcext:value-type="float">
            <text:p>0.0922776503269873</text:p>
          </table:table-cell>
          <table:table-cell office:value-type="float" office:value="0.00922776503269873" calcext:value-type="float">
            <text:p>0.0092277650326987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501763965784885" calcext:value-type="float">
            <text:p>-0.501763965784885</text:p>
          </table:table-cell>
          <table:table-cell office:value-type="float" office:value="0.0926141421335484" calcext:value-type="float">
            <text:p>0.0926141421335484</text:p>
          </table:table-cell>
          <table:table-cell office:value-type="float" office:value="0.00926141421335484" calcext:value-type="float">
            <text:p>0.00926141421335484</text:p>
          </table:table-cell>
          <table:table-cell office:value-type="float" office:value="0.501763965784885" calcext:value-type="float">
            <text:p>0.501763965784885</text:p>
          </table:table-cell>
          <table:table-cell office:value-type="float" office:value="0.0926141421335484" calcext:value-type="float">
            <text:p>0.0926141421335484</text:p>
          </table:table-cell>
          <table:table-cell office:value-type="float" office:value="0.00926141421335484" calcext:value-type="float">
            <text:p>0.009261414213354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683870560268544" calcext:value-type="float">
            <text:p>-0.683870560268544</text:p>
          </table:table-cell>
          <table:table-cell office:value-type="float" office:value="0.11468348107735" calcext:value-type="float">
            <text:p>0.11468348107735</text:p>
          </table:table-cell>
          <table:table-cell office:value-type="float" office:value="0.011468348107735" calcext:value-type="float">
            <text:p>0.011468348107735</text:p>
          </table:table-cell>
          <table:table-cell office:value-type="float" office:value="0.683870560268544" calcext:value-type="float">
            <text:p>0.683870560268544</text:p>
          </table:table-cell>
          <table:table-cell office:value-type="float" office:value="0.11468348107735" calcext:value-type="float">
            <text:p>0.11468348107735</text:p>
          </table:table-cell>
          <table:table-cell office:value-type="float" office:value="0.011468348107735" calcext:value-type="float">
            <text:p>0.01146834810773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97656567553708" calcext:value-type="float">
            <text:p>-0.297656567553708</text:p>
          </table:table-cell>
          <table:table-cell office:value-type="float" office:value="0.0562233669272992" calcext:value-type="float">
            <text:p>0.0562233669272992</text:p>
          </table:table-cell>
          <table:table-cell office:value-type="float" office:value="0.00562233669272992" calcext:value-type="float">
            <text:p>0.00562233669272992</text:p>
          </table:table-cell>
          <table:table-cell office:value-type="float" office:value="0.297656567553708" calcext:value-type="float">
            <text:p>0.297656567553708</text:p>
          </table:table-cell>
          <table:table-cell office:value-type="float" office:value="0.0562233669272992" calcext:value-type="float">
            <text:p>0.0562233669272992</text:p>
          </table:table-cell>
          <table:table-cell office:value-type="float" office:value="0.00562233669272992" calcext:value-type="float">
            <text:p>0.005622336692729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04588500670628" calcext:value-type="float">
            <text:p>-0.504588500670628</text:p>
          </table:table-cell>
          <table:table-cell office:value-type="float" office:value="0.0586780503533864" calcext:value-type="float">
            <text:p>0.0586780503533864</text:p>
          </table:table-cell>
          <table:table-cell office:value-type="float" office:value="0.00586780503533864" calcext:value-type="float">
            <text:p>0.00586780503533864</text:p>
          </table:table-cell>
          <table:table-cell office:value-type="float" office:value="0.504588500670628" calcext:value-type="float">
            <text:p>0.504588500670628</text:p>
          </table:table-cell>
          <table:table-cell office:value-type="float" office:value="0.0586780503533864" calcext:value-type="float">
            <text:p>0.0586780503533864</text:p>
          </table:table-cell>
          <table:table-cell office:value-type="float" office:value="0.00586780503533864" calcext:value-type="float">
            <text:p>0.005867805035338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704482164824585" calcext:value-type="float">
            <text:p>-0.704482164824585</text:p>
          </table:table-cell>
          <table:table-cell office:value-type="float" office:value="0.0682214416882055" calcext:value-type="float">
            <text:p>0.0682214416882055</text:p>
          </table:table-cell>
          <table:table-cell office:value-type="float" office:value="0.00682214416882055" calcext:value-type="float">
            <text:p>0.00682214416882055</text:p>
          </table:table-cell>
          <table:table-cell office:value-type="float" office:value="0.704482164824585" calcext:value-type="float">
            <text:p>0.704482164824585</text:p>
          </table:table-cell>
          <table:table-cell office:value-type="float" office:value="0.0682214416882055" calcext:value-type="float">
            <text:p>0.0682214416882055</text:p>
          </table:table-cell>
          <table:table-cell office:value-type="float" office:value="0.00682214416882055" calcext:value-type="float">
            <text:p>0.006822144168820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95229281846993" calcext:value-type="float">
            <text:p>-0.295229281846993</text:p>
          </table:table-cell>
          <table:table-cell office:value-type="float" office:value="0.0909563310305209" calcext:value-type="float">
            <text:p>0.0909563310305209</text:p>
          </table:table-cell>
          <table:table-cell office:value-type="float" office:value="0.00909563310305209" calcext:value-type="float">
            <text:p>0.00909563310305209</text:p>
          </table:table-cell>
          <table:table-cell office:value-type="float" office:value="0.295229281846993" calcext:value-type="float">
            <text:p>0.295229281846993</text:p>
          </table:table-cell>
          <table:table-cell office:value-type="float" office:value="0.0909563310305209" calcext:value-type="float">
            <text:p>0.0909563310305209</text:p>
          </table:table-cell>
          <table:table-cell office:value-type="float" office:value="0.00909563310305209" calcext:value-type="float">
            <text:p>0.009095633103052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501797839775308" calcext:value-type="float">
            <text:p>-0.501797839775308</text:p>
          </table:table-cell>
          <table:table-cell office:value-type="float" office:value="0.0951034570009178" calcext:value-type="float">
            <text:p>0.0951034570009178</text:p>
          </table:table-cell>
          <table:table-cell office:value-type="float" office:value="0.00951034570009178" calcext:value-type="float">
            <text:p>0.00951034570009178</text:p>
          </table:table-cell>
          <table:table-cell office:value-type="float" office:value="0.501797839775308" calcext:value-type="float">
            <text:p>0.501797839775308</text:p>
          </table:table-cell>
          <table:table-cell office:value-type="float" office:value="0.0951034570009178" calcext:value-type="float">
            <text:p>0.0951034570009178</text:p>
          </table:table-cell>
          <table:table-cell office:value-type="float" office:value="0.00951034570009178" calcext:value-type="float">
            <text:p>0.009510345700091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</text:p>
          </table:table-cell>
          <table:table-cell office:value-type="string" calcext:value-type="string">
            <text:p>lmer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698392711036639" calcext:value-type="float">
            <text:p>-0.698392711036639</text:p>
          </table:table-cell>
          <table:table-cell office:value-type="float" office:value="0.103982265234663" calcext:value-type="float">
            <text:p>0.103982265234663</text:p>
          </table:table-cell>
          <table:table-cell office:value-type="float" office:value="0.0103982265234663" calcext:value-type="float">
            <text:p>0.0103982265234663</text:p>
          </table:table-cell>
          <table:table-cell office:value-type="float" office:value="0.698392711036639" calcext:value-type="float">
            <text:p>0.698392711036639</text:p>
          </table:table-cell>
          <table:table-cell office:value-type="float" office:value="0.103982265234663" calcext:value-type="float">
            <text:p>0.103982265234663</text:p>
          </table:table-cell>
          <table:table-cell office:value-type="float" office:value="0.0103982265234663" calcext:value-type="float">
            <text:p>0.010398226523466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10423863158361" calcext:value-type="float">
            <text:p>-0.110423863158361</text:p>
          </table:table-cell>
          <table:table-cell office:value-type="float" office:value="0.10715851187016" calcext:value-type="float">
            <text:p>0.10715851187016</text:p>
          </table:table-cell>
          <table:table-cell office:value-type="float" office:value="0.010715851187016" calcext:value-type="float">
            <text:p>0.010715851187016</text:p>
          </table:table-cell>
          <table:table-cell office:value-type="float" office:value="0.124317076603017" calcext:value-type="float">
            <text:p>0.124317076603017</text:p>
          </table:table-cell>
          <table:table-cell office:value-type="float" office:value="0.0904914261202342" calcext:value-type="float">
            <text:p>0.0904914261202342</text:p>
          </table:table-cell>
          <table:table-cell office:value-type="float" office:value="0.00904914261202342" calcext:value-type="float">
            <text:p>0.009049142612023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87345657386073" calcext:value-type="float">
            <text:p>-0.187345657386073</text:p>
          </table:table-cell>
          <table:table-cell office:value-type="float" office:value="0.100497458060478" calcext:value-type="float">
            <text:p>0.100497458060478</text:p>
          </table:table-cell>
          <table:table-cell office:value-type="float" office:value="0.0100497458060478" calcext:value-type="float">
            <text:p>0.0100497458060478</text:p>
          </table:table-cell>
          <table:table-cell office:value-type="float" office:value="0.188464966030714" calcext:value-type="float">
            <text:p>0.188464966030714</text:p>
          </table:table-cell>
          <table:table-cell office:value-type="float" office:value="0.0983607748372226" calcext:value-type="float">
            <text:p>0.0983607748372226</text:p>
          </table:table-cell>
          <table:table-cell office:value-type="float" office:value="0.00983607748372226" calcext:value-type="float">
            <text:p>0.009836077483722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37124259235384" calcext:value-type="float">
            <text:p>-0.237124259235384</text:p>
          </table:table-cell>
          <table:table-cell office:value-type="float" office:value="0.11880202151179" calcext:value-type="float">
            <text:p>0.11880202151179</text:p>
          </table:table-cell>
          <table:table-cell office:value-type="float" office:value="0.011880202151179" calcext:value-type="float">
            <text:p>0.011880202151179</text:p>
          </table:table-cell>
          <table:table-cell office:value-type="float" office:value="0.239059065442123" calcext:value-type="float">
            <text:p>0.239059065442123</text:p>
          </table:table-cell>
          <table:table-cell office:value-type="float" office:value="0.114818515822846" calcext:value-type="float">
            <text:p>0.114818515822846</text:p>
          </table:table-cell>
          <table:table-cell office:value-type="float" office:value="0.0114818515822846" calcext:value-type="float">
            <text:p>0.011481851582284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38103724662922" calcext:value-type="float">
            <text:p>-0.138103724662922</text:p>
          </table:table-cell>
          <table:table-cell office:value-type="float" office:value="0.161658203580116" calcext:value-type="float">
            <text:p>0.161658203580116</text:p>
          </table:table-cell>
          <table:table-cell office:value-type="float" office:value="0.0161658203580116" calcext:value-type="float">
            <text:p>0.0161658203580116</text:p>
          </table:table-cell>
          <table:table-cell office:value-type="float" office:value="0.169935468090206" calcext:value-type="float">
            <text:p>0.169935468090206</text:p>
          </table:table-cell>
          <table:table-cell office:value-type="float" office:value="0.127392721703668" calcext:value-type="float">
            <text:p>0.127392721703668</text:p>
          </table:table-cell>
          <table:table-cell office:value-type="float" office:value="0.0127392721703668" calcext:value-type="float">
            <text:p>0.01273927217036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84085547224801" calcext:value-type="float">
            <text:p>-0.184085547224801</text:p>
          </table:table-cell>
          <table:table-cell office:value-type="float" office:value="0.154495535104752" calcext:value-type="float">
            <text:p>0.154495535104752</text:p>
          </table:table-cell>
          <table:table-cell office:value-type="float" office:value="0.0154495535104752" calcext:value-type="float">
            <text:p>0.0154495535104752</text:p>
          </table:table-cell>
          <table:table-cell office:value-type="float" office:value="0.2019659649754" calcext:value-type="float">
            <text:p>0.2019659649754</text:p>
          </table:table-cell>
          <table:table-cell office:value-type="float" office:value="0.12998608842519" calcext:value-type="float">
            <text:p>0.12998608842519</text:p>
          </table:table-cell>
          <table:table-cell office:value-type="float" office:value="0.012998608842519" calcext:value-type="float">
            <text:p>0.0129986088425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58346762590094" calcext:value-type="float">
            <text:p>-0.258346762590094</text:p>
          </table:table-cell>
          <table:table-cell office:value-type="float" office:value="0.175817064032501" calcext:value-type="float">
            <text:p>0.175817064032501</text:p>
          </table:table-cell>
          <table:table-cell office:value-type="float" office:value="0.0175817064032501" calcext:value-type="float">
            <text:p>0.0175817064032501</text:p>
          </table:table-cell>
          <table:table-cell office:value-type="float" office:value="0.263487951879551" calcext:value-type="float">
            <text:p>0.263487951879551</text:p>
          </table:table-cell>
          <table:table-cell office:value-type="float" office:value="0.167933586440016" calcext:value-type="float">
            <text:p>0.167933586440016</text:p>
          </table:table-cell>
          <table:table-cell office:value-type="float" office:value="0.0167933586440016" calcext:value-type="float">
            <text:p>0.01679335864400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16057343968442" calcext:value-type="float">
            <text:p>-0.116057343968442</text:p>
          </table:table-cell>
          <table:table-cell office:value-type="float" office:value="0.111099868708718" calcext:value-type="float">
            <text:p>0.111099868708718</text:p>
          </table:table-cell>
          <table:table-cell office:value-type="float" office:value="0.0111099868708718" calcext:value-type="float">
            <text:p>0.0111099868708718</text:p>
          </table:table-cell>
          <table:table-cell office:value-type="float" office:value="0.131813472479335" calcext:value-type="float">
            <text:p>0.131813472479335</text:p>
          </table:table-cell>
          <table:table-cell office:value-type="float" office:value="0.0916419502808898" calcext:value-type="float">
            <text:p>0.0916419502808898</text:p>
          </table:table-cell>
          <table:table-cell office:value-type="float" office:value="0.00916419502808898" calcext:value-type="float">
            <text:p>0.009164195028088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96214417996598" calcext:value-type="float">
            <text:p>-0.196214417996598</text:p>
          </table:table-cell>
          <table:table-cell office:value-type="float" office:value="0.0959381037686088" calcext:value-type="float">
            <text:p>0.0959381037686088</text:p>
          </table:table-cell>
          <table:table-cell office:value-type="float" office:value="0.00959381037686088" calcext:value-type="float">
            <text:p>0.00959381037686088</text:p>
          </table:table-cell>
          <table:table-cell office:value-type="float" office:value="0.198693283796865" calcext:value-type="float">
            <text:p>0.198693283796865</text:p>
          </table:table-cell>
          <table:table-cell office:value-type="float" office:value="0.0906383387170412" calcext:value-type="float">
            <text:p>0.0906383387170412</text:p>
          </table:table-cell>
          <table:table-cell office:value-type="float" office:value="0.00906383387170412" calcext:value-type="float">
            <text:p>0.009063833871704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49768719887495" calcext:value-type="float">
            <text:p>-0.249768719887495</text:p>
          </table:table-cell>
          <table:table-cell office:value-type="float" office:value="0.109944432882035" calcext:value-type="float">
            <text:p>0.109944432882035</text:p>
          </table:table-cell>
          <table:table-cell office:value-type="float" office:value="0.0109944432882035" calcext:value-type="float">
            <text:p>0.0109944432882035</text:p>
          </table:table-cell>
          <table:table-cell office:value-type="float" office:value="0.249768719887495" calcext:value-type="float">
            <text:p>0.249768719887495</text:p>
          </table:table-cell>
          <table:table-cell office:value-type="float" office:value="0.109944432882035" calcext:value-type="float">
            <text:p>0.109944432882035</text:p>
          </table:table-cell>
          <table:table-cell office:value-type="float" office:value="0.0109944432882035" calcext:value-type="float">
            <text:p>0.010994443288203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04576563469533" calcext:value-type="float">
            <text:p>-0.104576563469533</text:p>
          </table:table-cell>
          <table:table-cell office:value-type="float" office:value="0.148203554599807" calcext:value-type="float">
            <text:p>0.148203554599807</text:p>
          </table:table-cell>
          <table:table-cell office:value-type="float" office:value="0.0148203554599807" calcext:value-type="float">
            <text:p>0.0148203554599807</text:p>
          </table:table-cell>
          <table:table-cell office:value-type="float" office:value="0.147626219166992" calcext:value-type="float">
            <text:p>0.147626219166992</text:p>
          </table:table-cell>
          <table:table-cell office:value-type="float" office:value="0.104868400945099" calcext:value-type="float">
            <text:p>0.104868400945099</text:p>
          </table:table-cell>
          <table:table-cell office:value-type="float" office:value="0.0104868400945099" calcext:value-type="float">
            <text:p>0.01048684009450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87567576905187" calcext:value-type="float">
            <text:p>-0.187567576905187</text:p>
          </table:table-cell>
          <table:table-cell office:value-type="float" office:value="0.144170163283121" calcext:value-type="float">
            <text:p>0.144170163283121</text:p>
          </table:table-cell>
          <table:table-cell office:value-type="float" office:value="0.0144170163283121" calcext:value-type="float">
            <text:p>0.0144170163283121</text:p>
          </table:table-cell>
          <table:table-cell office:value-type="float" office:value="0.193953457566599" calcext:value-type="float">
            <text:p>0.193953457566599</text:p>
          </table:table-cell>
          <table:table-cell office:value-type="float" office:value="0.135366460437695" calcext:value-type="float">
            <text:p>0.135366460437695</text:p>
          </table:table-cell>
          <table:table-cell office:value-type="float" office:value="0.0135366460437695" calcext:value-type="float">
            <text:p>0.01353664604376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25055081777378" calcext:value-type="float">
            <text:p>-0.225055081777378</text:p>
          </table:table-cell>
          <table:table-cell office:value-type="float" office:value="0.152163536269839" calcext:value-type="float">
            <text:p>0.152163536269839</text:p>
          </table:table-cell>
          <table:table-cell office:value-type="float" office:value="0.0152163536269839" calcext:value-type="float">
            <text:p>0.0152163536269839</text:p>
          </table:table-cell>
          <table:table-cell office:value-type="float" office:value="0.238691601281842" calcext:value-type="float">
            <text:p>0.238691601281842</text:p>
          </table:table-cell>
          <table:table-cell office:value-type="float" office:value="0.129483486969385" calcext:value-type="float">
            <text:p>0.129483486969385</text:p>
          </table:table-cell>
          <table:table-cell office:value-type="float" office:value="0.0129483486969385" calcext:value-type="float">
            <text:p>0.01294834869693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87899426511857" calcext:value-type="float">
            <text:p>-0.187899426511857</text:p>
          </table:table-cell>
          <table:table-cell office:value-type="float" office:value="0.085283870520449" calcext:value-type="float">
            <text:p>0.085283870520449</text:p>
          </table:table-cell>
          <table:table-cell office:value-type="float" office:value="0.0085283870520449" calcext:value-type="float">
            <text:p>0.0085283870520449</text:p>
          </table:table-cell>
          <table:table-cell office:value-type="float" office:value="0.188572549851593" calcext:value-type="float">
            <text:p>0.188572549851593</text:p>
          </table:table-cell>
          <table:table-cell office:value-type="float" office:value="0.0837697247159269" calcext:value-type="float">
            <text:p>0.0837697247159269</text:p>
          </table:table-cell>
          <table:table-cell office:value-type="float" office:value="0.00837697247159269" calcext:value-type="float">
            <text:p>0.0083769724715926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48834793652998" calcext:value-type="float">
            <text:p>-0.348834793652998</text:p>
          </table:table-cell>
          <table:table-cell office:value-type="float" office:value="0.0879109058403522" calcext:value-type="float">
            <text:p>0.0879109058403522</text:p>
          </table:table-cell>
          <table:table-cell office:value-type="float" office:value="0.00879109058403522" calcext:value-type="float">
            <text:p>0.00879109058403522</text:p>
          </table:table-cell>
          <table:table-cell office:value-type="float" office:value="0.348834793652998" calcext:value-type="float">
            <text:p>0.348834793652998</text:p>
          </table:table-cell>
          <table:table-cell office:value-type="float" office:value="0.0879109058403522" calcext:value-type="float">
            <text:p>0.0879109058403522</text:p>
          </table:table-cell>
          <table:table-cell office:value-type="float" office:value="0.00879109058403522" calcext:value-type="float">
            <text:p>0.008791090584035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502235943230346" calcext:value-type="float">
            <text:p>-0.502235943230346</text:p>
          </table:table-cell>
          <table:table-cell office:value-type="float" office:value="0.0969105718739508" calcext:value-type="float">
            <text:p>0.0969105718739508</text:p>
          </table:table-cell>
          <table:table-cell office:value-type="float" office:value="0.00969105718739508" calcext:value-type="float">
            <text:p>0.00969105718739508</text:p>
          </table:table-cell>
          <table:table-cell office:value-type="float" office:value="0.502235943230346" calcext:value-type="float">
            <text:p>0.502235943230346</text:p>
          </table:table-cell>
          <table:table-cell office:value-type="float" office:value="0.0969105718739508" calcext:value-type="float">
            <text:p>0.0969105718739508</text:p>
          </table:table-cell>
          <table:table-cell office:value-type="float" office:value="0.00969105718739508" calcext:value-type="float">
            <text:p>0.009691057187395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06727504405406" calcext:value-type="float">
            <text:p>-0.206727504405406</text:p>
          </table:table-cell>
          <table:table-cell office:value-type="float" office:value="0.132192477684422" calcext:value-type="float">
            <text:p>0.132192477684422</text:p>
          </table:table-cell>
          <table:table-cell office:value-type="float" office:value="0.0132192477684422" calcext:value-type="float">
            <text:p>0.0132192477684422</text:p>
          </table:table-cell>
          <table:table-cell office:value-type="float" office:value="0.209824123652868" calcext:value-type="float">
            <text:p>0.209824123652868</text:p>
          </table:table-cell>
          <table:table-cell office:value-type="float" office:value="0.127168864335338" calcext:value-type="float">
            <text:p>0.127168864335338</text:p>
          </table:table-cell>
          <table:table-cell office:value-type="float" office:value="0.0127168864335338" calcext:value-type="float">
            <text:p>0.01271688643353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336571086395996" calcext:value-type="float">
            <text:p>-0.336571086395996</text:p>
          </table:table-cell>
          <table:table-cell office:value-type="float" office:value="0.125175901449341" calcext:value-type="float">
            <text:p>0.125175901449341</text:p>
          </table:table-cell>
          <table:table-cell office:value-type="float" office:value="0.0125175901449341" calcext:value-type="float">
            <text:p>0.0125175901449341</text:p>
          </table:table-cell>
          <table:table-cell office:value-type="float" office:value="0.337565095055483" calcext:value-type="float">
            <text:p>0.337565095055483</text:p>
          </table:table-cell>
          <table:table-cell office:value-type="float" office:value="0.122442396427921" calcext:value-type="float">
            <text:p>0.122442396427921</text:p>
          </table:table-cell>
          <table:table-cell office:value-type="float" office:value="0.0122442396427921" calcext:value-type="float">
            <text:p>0.01224423964279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96194362331048" calcext:value-type="float">
            <text:p>-0.496194362331048</text:p>
          </table:table-cell>
          <table:table-cell office:value-type="float" office:value="0.123166036996744" calcext:value-type="float">
            <text:p>0.123166036996744</text:p>
          </table:table-cell>
          <table:table-cell office:value-type="float" office:value="0.0123166036996744" calcext:value-type="float">
            <text:p>0.0123166036996744</text:p>
          </table:table-cell>
          <table:table-cell office:value-type="float" office:value="0.496194362331048" calcext:value-type="float">
            <text:p>0.496194362331048</text:p>
          </table:table-cell>
          <table:table-cell office:value-type="float" office:value="0.123166036996744" calcext:value-type="float">
            <text:p>0.123166036996744</text:p>
          </table:table-cell>
          <table:table-cell office:value-type="float" office:value="0.0123166036996744" calcext:value-type="float">
            <text:p>0.01231660369967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00497769581617" calcext:value-type="float">
            <text:p>-0.200497769581617</text:p>
          </table:table-cell>
          <table:table-cell office:value-type="float" office:value="0.0891224707763938" calcext:value-type="float">
            <text:p>0.0891224707763938</text:p>
          </table:table-cell>
          <table:table-cell office:value-type="float" office:value="0.00891224707763938" calcext:value-type="float">
            <text:p>0.00891224707763938</text:p>
          </table:table-cell>
          <table:table-cell office:value-type="float" office:value="0.200497769581617" calcext:value-type="float">
            <text:p>0.200497769581617</text:p>
          </table:table-cell>
          <table:table-cell office:value-type="float" office:value="0.0891224707763938" calcext:value-type="float">
            <text:p>0.0891224707763938</text:p>
          </table:table-cell>
          <table:table-cell office:value-type="float" office:value="0.00891224707763938" calcext:value-type="float">
            <text:p>0.008912247077639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354087463489866" calcext:value-type="float">
            <text:p>-0.354087463489866</text:p>
          </table:table-cell>
          <table:table-cell office:value-type="float" office:value="0.0748019171812637" calcext:value-type="float">
            <text:p>0.0748019171812637</text:p>
          </table:table-cell>
          <table:table-cell office:value-type="float" office:value="0.00748019171812637" calcext:value-type="float">
            <text:p>0.00748019171812637</text:p>
          </table:table-cell>
          <table:table-cell office:value-type="float" office:value="0.354087463489866" calcext:value-type="float">
            <text:p>0.354087463489866</text:p>
          </table:table-cell>
          <table:table-cell office:value-type="float" office:value="0.0748019171812637" calcext:value-type="float">
            <text:p>0.0748019171812637</text:p>
          </table:table-cell>
          <table:table-cell office:value-type="float" office:value="0.00748019171812637" calcext:value-type="float">
            <text:p>0.0074801917181263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03387060508952" calcext:value-type="float">
            <text:p>-0.503387060508952</text:p>
          </table:table-cell>
          <table:table-cell office:value-type="float" office:value="0.0873180202012912" calcext:value-type="float">
            <text:p>0.0873180202012912</text:p>
          </table:table-cell>
          <table:table-cell office:value-type="float" office:value="0.00873180202012911" calcext:value-type="float">
            <text:p>0.00873180202012911</text:p>
          </table:table-cell>
          <table:table-cell office:value-type="float" office:value="0.503387060508952" calcext:value-type="float">
            <text:p>0.503387060508952</text:p>
          </table:table-cell>
          <table:table-cell office:value-type="float" office:value="0.0873180202012912" calcext:value-type="float">
            <text:p>0.0873180202012912</text:p>
          </table:table-cell>
          <table:table-cell office:value-type="float" office:value="0.00873180202012911" calcext:value-type="float">
            <text:p>0.0087318020201291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16882110871288" calcext:value-type="float">
            <text:p>-0.216882110871288</text:p>
          </table:table-cell>
          <table:table-cell office:value-type="float" office:value="0.119843020478571" calcext:value-type="float">
            <text:p>0.119843020478571</text:p>
          </table:table-cell>
          <table:table-cell office:value-type="float" office:value="0.0119843020478571" calcext:value-type="float">
            <text:p>0.0119843020478571</text:p>
          </table:table-cell>
          <table:table-cell office:value-type="float" office:value="0.217700103040777" calcext:value-type="float">
            <text:p>0.217700103040777</text:p>
          </table:table-cell>
          <table:table-cell office:value-type="float" office:value="0.118335429831507" calcext:value-type="float">
            <text:p>0.118335429831507</text:p>
          </table:table-cell>
          <table:table-cell office:value-type="float" office:value="0.0118335429831507" calcext:value-type="float">
            <text:p>0.01183354298315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44958977944749" calcext:value-type="float">
            <text:p>-0.344958977944749</text:p>
          </table:table-cell>
          <table:table-cell office:value-type="float" office:value="0.114697056945409" calcext:value-type="float">
            <text:p>0.114697056945409</text:p>
          </table:table-cell>
          <table:table-cell office:value-type="float" office:value="0.0114697056945409" calcext:value-type="float">
            <text:p>0.0114697056945409</text:p>
          </table:table-cell>
          <table:table-cell office:value-type="float" office:value="0.344958977944749" calcext:value-type="float">
            <text:p>0.344958977944749</text:p>
          </table:table-cell>
          <table:table-cell office:value-type="float" office:value="0.114697056945409" calcext:value-type="float">
            <text:p>0.114697056945409</text:p>
          </table:table-cell>
          <table:table-cell office:value-type="float" office:value="0.0114697056945409" calcext:value-type="float">
            <text:p>0.01146970569454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99511273850722" calcext:value-type="float">
            <text:p>-0.499511273850722</text:p>
          </table:table-cell>
          <table:table-cell office:value-type="float" office:value="0.106163786059644" calcext:value-type="float">
            <text:p>0.106163786059644</text:p>
          </table:table-cell>
          <table:table-cell office:value-type="float" office:value="0.0106163786059644" calcext:value-type="float">
            <text:p>0.0106163786059644</text:p>
          </table:table-cell>
          <table:table-cell office:value-type="float" office:value="0.499511273850722" calcext:value-type="float">
            <text:p>0.499511273850722</text:p>
          </table:table-cell>
          <table:table-cell office:value-type="float" office:value="0.106163786059644" calcext:value-type="float">
            <text:p>0.106163786059644</text:p>
          </table:table-cell>
          <table:table-cell office:value-type="float" office:value="0.0106163786059644" calcext:value-type="float">
            <text:p>0.01061637860596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90267339328989" calcext:value-type="float">
            <text:p>-0.290267339328989</text:p>
          </table:table-cell>
          <table:table-cell office:value-type="float" office:value="0.0771282744885006" calcext:value-type="float">
            <text:p>0.0771282744885006</text:p>
          </table:table-cell>
          <table:table-cell office:value-type="float" office:value="0.00771282744885006" calcext:value-type="float">
            <text:p>0.00771282744885006</text:p>
          </table:table-cell>
          <table:table-cell office:value-type="float" office:value="0.290267339328989" calcext:value-type="float">
            <text:p>0.290267339328989</text:p>
          </table:table-cell>
          <table:table-cell office:value-type="float" office:value="0.0771282744885006" calcext:value-type="float">
            <text:p>0.0771282744885006</text:p>
          </table:table-cell>
          <table:table-cell office:value-type="float" office:value="0.00771282744885006" calcext:value-type="float">
            <text:p>0.007712827448850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8385650658361" calcext:value-type="float">
            <text:p>-0.48385650658361</text:p>
          </table:table-cell>
          <table:table-cell office:value-type="float" office:value="0.0697206453996965" calcext:value-type="float">
            <text:p>0.0697206453996965</text:p>
          </table:table-cell>
          <table:table-cell office:value-type="float" office:value="0.00697206453996965" calcext:value-type="float">
            <text:p>0.00697206453996965</text:p>
          </table:table-cell>
          <table:table-cell office:value-type="float" office:value="0.48385650658361" calcext:value-type="float">
            <text:p>0.48385650658361</text:p>
          </table:table-cell>
          <table:table-cell office:value-type="float" office:value="0.0697206453996965" calcext:value-type="float">
            <text:p>0.0697206453996965</text:p>
          </table:table-cell>
          <table:table-cell office:value-type="float" office:value="0.00697206453996965" calcext:value-type="float">
            <text:p>0.006972064539969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707827053632647" calcext:value-type="float">
            <text:p>-0.707827053632647</text:p>
          </table:table-cell>
          <table:table-cell office:value-type="float" office:value="0.0737242777778107" calcext:value-type="float">
            <text:p>0.0737242777778107</text:p>
          </table:table-cell>
          <table:table-cell office:value-type="float" office:value="0.00737242777778107" calcext:value-type="float">
            <text:p>0.00737242777778107</text:p>
          </table:table-cell>
          <table:table-cell office:value-type="float" office:value="0.707827053632647" calcext:value-type="float">
            <text:p>0.707827053632647</text:p>
          </table:table-cell>
          <table:table-cell office:value-type="float" office:value="0.0737242777778107" calcext:value-type="float">
            <text:p>0.0737242777778107</text:p>
          </table:table-cell>
          <table:table-cell office:value-type="float" office:value="0.00737242777778107" calcext:value-type="float">
            <text:p>0.007372427777781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6903248672286" calcext:value-type="float">
            <text:p>-0.26903248672286</text:p>
          </table:table-cell>
          <table:table-cell office:value-type="float" office:value="0.0943551981086747" calcext:value-type="float">
            <text:p>0.0943551981086747</text:p>
          </table:table-cell>
          <table:table-cell office:value-type="float" office:value="0.00943551981086747" calcext:value-type="float">
            <text:p>0.00943551981086747</text:p>
          </table:table-cell>
          <table:table-cell office:value-type="float" office:value="0.26903248672286" calcext:value-type="float">
            <text:p>0.26903248672286</text:p>
          </table:table-cell>
          <table:table-cell office:value-type="float" office:value="0.0943551981086747" calcext:value-type="float">
            <text:p>0.0943551981086747</text:p>
          </table:table-cell>
          <table:table-cell office:value-type="float" office:value="0.00943551981086747" calcext:value-type="float">
            <text:p>0.009435519810867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95536671340336" calcext:value-type="float">
            <text:p>-0.495536671340336</text:p>
          </table:table-cell>
          <table:table-cell office:value-type="float" office:value="0.0901120242530554" calcext:value-type="float">
            <text:p>0.0901120242530554</text:p>
          </table:table-cell>
          <table:table-cell office:value-type="float" office:value="0.00901120242530554" calcext:value-type="float">
            <text:p>0.00901120242530554</text:p>
          </table:table-cell>
          <table:table-cell office:value-type="float" office:value="0.495536671340336" calcext:value-type="float">
            <text:p>0.495536671340336</text:p>
          </table:table-cell>
          <table:table-cell office:value-type="float" office:value="0.0901120242530554" calcext:value-type="float">
            <text:p>0.0901120242530554</text:p>
          </table:table-cell>
          <table:table-cell office:value-type="float" office:value="0.00901120242530554" calcext:value-type="float">
            <text:p>0.009011202425305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680245947912109" calcext:value-type="float">
            <text:p>-0.680245947912109</text:p>
          </table:table-cell>
          <table:table-cell office:value-type="float" office:value="0.115892566482557" calcext:value-type="float">
            <text:p>0.115892566482557</text:p>
          </table:table-cell>
          <table:table-cell office:value-type="float" office:value="0.0115892566482557" calcext:value-type="float">
            <text:p>0.0115892566482557</text:p>
          </table:table-cell>
          <table:table-cell office:value-type="float" office:value="0.680245947912109" calcext:value-type="float">
            <text:p>0.680245947912109</text:p>
          </table:table-cell>
          <table:table-cell office:value-type="float" office:value="0.115892566482557" calcext:value-type="float">
            <text:p>0.115892566482557</text:p>
          </table:table-cell>
          <table:table-cell office:value-type="float" office:value="0.0115892566482557" calcext:value-type="float">
            <text:p>0.01158925664825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96731396416486" calcext:value-type="float">
            <text:p>-0.296731396416486</text:p>
          </table:table-cell>
          <table:table-cell office:value-type="float" office:value="0.0555939172662764" calcext:value-type="float">
            <text:p>0.0555939172662764</text:p>
          </table:table-cell>
          <table:table-cell office:value-type="float" office:value="0.00555939172662764" calcext:value-type="float">
            <text:p>0.00555939172662764</text:p>
          </table:table-cell>
          <table:table-cell office:value-type="float" office:value="0.296731396416486" calcext:value-type="float">
            <text:p>0.296731396416486</text:p>
          </table:table-cell>
          <table:table-cell office:value-type="float" office:value="0.0555939172662764" calcext:value-type="float">
            <text:p>0.0555939172662764</text:p>
          </table:table-cell>
          <table:table-cell office:value-type="float" office:value="0.00555939172662764" calcext:value-type="float">
            <text:p>0.005559391726627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00801986206342" calcext:value-type="float">
            <text:p>-0.500801986206342</text:p>
          </table:table-cell>
          <table:table-cell office:value-type="float" office:value="0.059941561185729" calcext:value-type="float">
            <text:p>0.059941561185729</text:p>
          </table:table-cell>
          <table:table-cell office:value-type="float" office:value="0.0059941561185729" calcext:value-type="float">
            <text:p>0.0059941561185729</text:p>
          </table:table-cell>
          <table:table-cell office:value-type="float" office:value="0.500801986206342" calcext:value-type="float">
            <text:p>0.500801986206342</text:p>
          </table:table-cell>
          <table:table-cell office:value-type="float" office:value="0.059941561185729" calcext:value-type="float">
            <text:p>0.059941561185729</text:p>
          </table:table-cell>
          <table:table-cell office:value-type="float" office:value="0.0059941561185729" calcext:value-type="float">
            <text:p>0.005994156118572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702474435490366" calcext:value-type="float">
            <text:p>-0.702474435490366</text:p>
          </table:table-cell>
          <table:table-cell office:value-type="float" office:value="0.0676887065773389" calcext:value-type="float">
            <text:p>0.0676887065773389</text:p>
          </table:table-cell>
          <table:table-cell office:value-type="float" office:value="0.00676887065773389" calcext:value-type="float">
            <text:p>0.00676887065773389</text:p>
          </table:table-cell>
          <table:table-cell office:value-type="float" office:value="0.702474435490366" calcext:value-type="float">
            <text:p>0.702474435490366</text:p>
          </table:table-cell>
          <table:table-cell office:value-type="float" office:value="0.0676887065773389" calcext:value-type="float">
            <text:p>0.0676887065773389</text:p>
          </table:table-cell>
          <table:table-cell office:value-type="float" office:value="0.00676887065773389" calcext:value-type="float">
            <text:p>0.006768870657733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89774580522847" calcext:value-type="float">
            <text:p>-0.289774580522847</text:p>
          </table:table-cell>
          <table:table-cell office:value-type="float" office:value="0.0893077599215512" calcext:value-type="float">
            <text:p>0.0893077599215512</text:p>
          </table:table-cell>
          <table:table-cell office:value-type="float" office:value="0.00893077599215512" calcext:value-type="float">
            <text:p>0.00893077599215512</text:p>
          </table:table-cell>
          <table:table-cell office:value-type="float" office:value="0.289774580522847" calcext:value-type="float">
            <text:p>0.289774580522847</text:p>
          </table:table-cell>
          <table:table-cell office:value-type="float" office:value="0.0893077599215512" calcext:value-type="float">
            <text:p>0.0893077599215512</text:p>
          </table:table-cell>
          <table:table-cell office:value-type="float" office:value="0.00893077599215512" calcext:value-type="float">
            <text:p>0.008930775992155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9908428153458" calcext:value-type="float">
            <text:p>-0.49908428153458</text:p>
          </table:table-cell>
          <table:table-cell office:value-type="float" office:value="0.0942117754325127" calcext:value-type="float">
            <text:p>0.0942117754325127</text:p>
          </table:table-cell>
          <table:table-cell office:value-type="float" office:value="0.00942117754325127" calcext:value-type="float">
            <text:p>0.00942117754325127</text:p>
          </table:table-cell>
          <table:table-cell office:value-type="float" office:value="0.49908428153458" calcext:value-type="float">
            <text:p>0.49908428153458</text:p>
          </table:table-cell>
          <table:table-cell office:value-type="float" office:value="0.0942117754325127" calcext:value-type="float">
            <text:p>0.0942117754325127</text:p>
          </table:table-cell>
          <table:table-cell office:value-type="float" office:value="0.00942117754325127" calcext:value-type="float">
            <text:p>0.0094211775432512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MM (Rand. Slopes)</text:p>
          </table:table-cell>
          <table:table-cell office:value-type="string" calcext:value-type="string">
            <text:p>lmer_slopes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693681838737905" calcext:value-type="float">
            <text:p>-0.693681838737905</text:p>
          </table:table-cell>
          <table:table-cell office:value-type="float" office:value="0.10240313144582" calcext:value-type="float">
            <text:p>0.10240313144582</text:p>
          </table:table-cell>
          <table:table-cell office:value-type="float" office:value="0.010240313144582" calcext:value-type="float">
            <text:p>0.010240313144582</text:p>
          </table:table-cell>
          <table:table-cell office:value-type="float" office:value="0.693681838737905" calcext:value-type="float">
            <text:p>0.693681838737905</text:p>
          </table:table-cell>
          <table:table-cell office:value-type="float" office:value="0.10240313144582" calcext:value-type="float">
            <text:p>0.10240313144582</text:p>
          </table:table-cell>
          <table:table-cell office:value-type="float" office:value="0.010240313144582" calcext:value-type="float">
            <text:p>0.0102403131445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20624062743528" calcext:value-type="float">
            <text:p>0.120624062743528</text:p>
          </table:table-cell>
          <table:table-cell office:value-type="float" office:value="0.408667122036227" calcext:value-type="float">
            <text:p>0.408667122036227</text:p>
          </table:table-cell>
          <table:table-cell office:value-type="float" office:value="0.0408667122036227" calcext:value-type="float">
            <text:p>0.0408667122036227</text:p>
          </table:table-cell>
          <table:table-cell office:value-type="float" office:value="0.296903130559125" calcext:value-type="float">
            <text:p>0.296903130559125</text:p>
          </table:table-cell>
          <table:table-cell office:value-type="float" office:value="0.304407727712181" calcext:value-type="float">
            <text:p>0.304407727712181</text:p>
          </table:table-cell>
          <table:table-cell office:value-type="float" office:value="0.0304407727712181" calcext:value-type="float">
            <text:p>0.03044077277121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223049640989811" calcext:value-type="float">
            <text:p>0.0223049640989811</text:p>
          </table:table-cell>
          <table:table-cell office:value-type="float" office:value="0.400337102247906" calcext:value-type="float">
            <text:p>0.400337102247906</text:p>
          </table:table-cell>
          <table:table-cell office:value-type="float" office:value="0.0400337102247906" calcext:value-type="float">
            <text:p>0.0400337102247906</text:p>
          </table:table-cell>
          <table:table-cell office:value-type="float" office:value="0.287194414347643" calcext:value-type="float">
            <text:p>0.287194414347643</text:p>
          </table:table-cell>
          <table:table-cell office:value-type="float" office:value="0.278313784965598" calcext:value-type="float">
            <text:p>0.278313784965598</text:p>
          </table:table-cell>
          <table:table-cell office:value-type="float" office:value="0.0278313784965599" calcext:value-type="float">
            <text:p>0.02783137849655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552758655463528" calcext:value-type="float">
            <text:p>0.0552758655463528</text:p>
          </table:table-cell>
          <table:table-cell office:value-type="float" office:value="0.638723870758504" calcext:value-type="float">
            <text:p>0.638723870758504</text:p>
          </table:table-cell>
          <table:table-cell office:value-type="float" office:value="0.0638723870758504" calcext:value-type="float">
            <text:p>0.0638723870758504</text:p>
          </table:table-cell>
          <table:table-cell office:value-type="float" office:value="0.396047336037493" calcext:value-type="float">
            <text:p>0.396047336037493</text:p>
          </table:table-cell>
          <table:table-cell office:value-type="float" office:value="0.502609785158259" calcext:value-type="float">
            <text:p>0.502609785158259</text:p>
          </table:table-cell>
          <table:table-cell office:value-type="float" office:value="0.0502609785158259" calcext:value-type="float">
            <text:p>0.05026097851582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378242320244851" calcext:value-type="float">
            <text:p>0.0378242320244851</text:p>
          </table:table-cell>
          <table:table-cell office:value-type="float" office:value="0.408188441026275" calcext:value-type="float">
            <text:p>0.408188441026275</text:p>
          </table:table-cell>
          <table:table-cell office:value-type="float" office:value="0.0408188441026275" calcext:value-type="float">
            <text:p>0.0408188441026275</text:p>
          </table:table-cell>
          <table:table-cell office:value-type="float" office:value="0.278866335062498" calcext:value-type="float">
            <text:p>0.278866335062498</text:p>
          </table:table-cell>
          <table:table-cell office:value-type="float" office:value="0.29918384782375" calcext:value-type="float">
            <text:p>0.29918384782375</text:p>
          </table:table-cell>
          <table:table-cell office:value-type="float" office:value="0.029918384782375" calcext:value-type="float">
            <text:p>0.0299183847823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294795406011204" calcext:value-type="float">
            <text:p>0.0294795406011204</text:p>
          </table:table-cell>
          <table:table-cell office:value-type="float" office:value="0.612686175908732" calcext:value-type="float">
            <text:p>0.612686175908732</text:p>
          </table:table-cell>
          <table:table-cell office:value-type="float" office:value="0.0612686175908732" calcext:value-type="float">
            <text:p>0.0612686175908732</text:p>
          </table:table-cell>
          <table:table-cell office:value-type="float" office:value="0.382734521548456" calcext:value-type="float">
            <text:p>0.382734521548456</text:p>
          </table:table-cell>
          <table:table-cell office:value-type="float" office:value="0.477804148179431" calcext:value-type="float">
            <text:p>0.477804148179431</text:p>
          </table:table-cell>
          <table:table-cell office:value-type="float" office:value="0.0477804148179431" calcext:value-type="float">
            <text:p>0.04778041481794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27637974151637" calcext:value-type="float">
            <text:p>-0.127637974151637</text:p>
          </table:table-cell>
          <table:table-cell office:value-type="float" office:value="0.533331388925617" calcext:value-type="float">
            <text:p>0.533331388925617</text:p>
          </table:table-cell>
          <table:table-cell office:value-type="float" office:value="0.0533331388925617" calcext:value-type="float">
            <text:p>0.0533331388925617</text:p>
          </table:table-cell>
          <table:table-cell office:value-type="float" office:value="0.434548754759778" calcext:value-type="float">
            <text:p>0.434548754759778</text:p>
          </table:table-cell>
          <table:table-cell office:value-type="float" office:value="0.331901133647688" calcext:value-type="float">
            <text:p>0.331901133647688</text:p>
          </table:table-cell>
          <table:table-cell office:value-type="float" office:value="0.0331901133647688" calcext:value-type="float">
            <text:p>0.03319011336476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39945793315546" calcext:value-type="float">
            <text:p>0.139945793315546</text:p>
          </table:table-cell>
          <table:table-cell office:value-type="float" office:value="0.317129150102134" calcext:value-type="float">
            <text:p>0.317129150102134</text:p>
          </table:table-cell>
          <table:table-cell office:value-type="float" office:value="0.0317129150102134" calcext:value-type="float">
            <text:p>0.0317129150102134</text:p>
          </table:table-cell>
          <table:table-cell office:value-type="float" office:value="0.249389199915397" calcext:value-type="float">
            <text:p>0.249389199915397</text:p>
          </table:table-cell>
          <table:table-cell office:value-type="float" office:value="0.239854840146598" calcext:value-type="float">
            <text:p>0.239854840146598</text:p>
          </table:table-cell>
          <table:table-cell office:value-type="float" office:value="0.0239854840146598" calcext:value-type="float">
            <text:p>0.02398548401465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041125266752066" calcext:value-type="float">
            <text:p>0.041125266752066</text:p>
          </table:table-cell>
          <table:table-cell office:value-type="float" office:value="0.370004820036067" calcext:value-type="float">
            <text:p>0.370004820036067</text:p>
          </table:table-cell>
          <table:table-cell office:value-type="float" office:value="0.0370004820036067" calcext:value-type="float">
            <text:p>0.0370004820036067</text:p>
          </table:table-cell>
          <table:table-cell office:value-type="float" office:value="0.256565244881378" calcext:value-type="float">
            <text:p>0.256565244881378</text:p>
          </table:table-cell>
          <table:table-cell office:value-type="float" office:value="0.268554104297741" calcext:value-type="float">
            <text:p>0.268554104297741</text:p>
          </table:table-cell>
          <table:table-cell office:value-type="float" office:value="0.0268554104297741" calcext:value-type="float">
            <text:p>0.02685541042977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268968871095917" calcext:value-type="float">
            <text:p>-0.0268968871095917</text:p>
          </table:table-cell>
          <table:table-cell office:value-type="float" office:value="0.500555850034403" calcext:value-type="float">
            <text:p>0.500555850034403</text:p>
          </table:table-cell>
          <table:table-cell office:value-type="float" office:value="0.0500555850034403" calcext:value-type="float">
            <text:p>0.0500555850034403</text:p>
          </table:table-cell>
          <table:table-cell office:value-type="float" office:value="0.370857741250568" calcext:value-type="float">
            <text:p>0.370857741250568</text:p>
          </table:table-cell>
          <table:table-cell office:value-type="float" office:value="0.335162205627184" calcext:value-type="float">
            <text:p>0.335162205627184</text:p>
          </table:table-cell>
          <table:table-cell office:value-type="float" office:value="0.0335162205627184" calcext:value-type="float">
            <text:p>0.03351622056271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0926230381064" calcext:value-type="float">
            <text:p>0.10926230381064</text:p>
          </table:table-cell>
          <table:table-cell office:value-type="float" office:value="0.458126750602483" calcext:value-type="float">
            <text:p>0.458126750602483</text:p>
          </table:table-cell>
          <table:table-cell office:value-type="float" office:value="0.0458126750602483" calcext:value-type="float">
            <text:p>0.0458126750602483</text:p>
          </table:table-cell>
          <table:table-cell office:value-type="float" office:value="0.316100882602286" calcext:value-type="float">
            <text:p>0.316100882602286</text:p>
          </table:table-cell>
          <table:table-cell office:value-type="float" office:value="0.347864773264354" calcext:value-type="float">
            <text:p>0.347864773264354</text:p>
          </table:table-cell>
          <table:table-cell office:value-type="float" office:value="0.0347864773264354" calcext:value-type="float">
            <text:p>0.03478647732643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033059444290931" calcext:value-type="float">
            <text:p>0.033059444290931</text:p>
          </table:table-cell>
          <table:table-cell office:value-type="float" office:value="0.516226164740877" calcext:value-type="float">
            <text:p>0.516226164740877</text:p>
          </table:table-cell>
          <table:table-cell office:value-type="float" office:value="0.0516226164740877" calcext:value-type="float">
            <text:p>0.0516226164740877</text:p>
          </table:table-cell>
          <table:table-cell office:value-type="float" office:value="0.313550941803768" calcext:value-type="float">
            <text:p>0.313550941803768</text:p>
          </table:table-cell>
          <table:table-cell office:value-type="float" office:value="0.410226954162515" calcext:value-type="float">
            <text:p>0.410226954162515</text:p>
          </table:table-cell>
          <table:table-cell office:value-type="float" office:value="0.0410226954162515" calcext:value-type="float">
            <text:p>0.04102269541625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25407188672198" calcext:value-type="float">
            <text:p>-0.025407188672198</text:p>
          </table:table-cell>
          <table:table-cell office:value-type="float" office:value="1.2000021401756" calcext:value-type="float">
            <text:p>1.2000021401756</text:p>
          </table:table-cell>
          <table:table-cell office:value-type="float" office:value="0.12000021401756" calcext:value-type="float">
            <text:p>0.12000021401756</text:p>
          </table:table-cell>
          <table:table-cell office:value-type="float" office:value="0.531617309699585" calcext:value-type="float">
            <text:p>0.531617309699585</text:p>
          </table:table-cell>
          <table:table-cell office:value-type="float" office:value="1.07478204214207" calcext:value-type="float">
            <text:p>1.07478204214207</text:p>
          </table:table-cell>
          <table:table-cell office:value-type="float" office:value="0.107478204214207" calcext:value-type="float">
            <text:p>0.1074782042142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443560046014727" calcext:value-type="float">
            <text:p>0.0443560046014727</text:p>
          </table:table-cell>
          <table:table-cell office:value-type="float" office:value="0.290442883544836" calcext:value-type="float">
            <text:p>0.290442883544836</text:p>
          </table:table-cell>
          <table:table-cell office:value-type="float" office:value="0.0290442883544836" calcext:value-type="float">
            <text:p>0.0290442883544836</text:p>
          </table:table-cell>
          <table:table-cell office:value-type="float" office:value="0.211285688391303" calcext:value-type="float">
            <text:p>0.211285688391303</text:p>
          </table:table-cell>
          <table:table-cell office:value-type="float" office:value="0.203105463327243" calcext:value-type="float">
            <text:p>0.203105463327243</text:p>
          </table:table-cell>
          <table:table-cell office:value-type="float" office:value="0.0203105463327243" calcext:value-type="float">
            <text:p>0.02031054633272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18719978995518" calcext:value-type="float">
            <text:p>-0.118719978995518</text:p>
          </table:table-cell>
          <table:table-cell office:value-type="float" office:value="0.315566871531844" calcext:value-type="float">
            <text:p>0.315566871531844</text:p>
          </table:table-cell>
          <table:table-cell office:value-type="float" office:value="0.0315566871531844" calcext:value-type="float">
            <text:p>0.0315566871531844</text:p>
          </table:table-cell>
          <table:table-cell office:value-type="float" office:value="0.278688922553806" calcext:value-type="float">
            <text:p>0.278688922553806</text:p>
          </table:table-cell>
          <table:table-cell office:value-type="float" office:value="0.188061734337495" calcext:value-type="float">
            <text:p>0.188061734337495</text:p>
          </table:table-cell>
          <table:table-cell office:value-type="float" office:value="0.0188061734337495" calcext:value-type="float">
            <text:p>0.01880617343374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76681486352271" calcext:value-type="float">
            <text:p>-0.176681486352271</text:p>
          </table:table-cell>
          <table:table-cell office:value-type="float" office:value="0.523337533230879" calcext:value-type="float">
            <text:p>0.523337533230879</text:p>
          </table:table-cell>
          <table:table-cell office:value-type="float" office:value="0.0523337533230879" calcext:value-type="float">
            <text:p>0.0523337533230879</text:p>
          </table:table-cell>
          <table:table-cell office:value-type="float" office:value="0.409967587805286" calcext:value-type="float">
            <text:p>0.409967587805286</text:p>
          </table:table-cell>
          <table:table-cell office:value-type="float" office:value="0.368277880800949" calcext:value-type="float">
            <text:p>0.368277880800949</text:p>
          </table:table-cell>
          <table:table-cell office:value-type="float" office:value="0.0368277880800949" calcext:value-type="float">
            <text:p>0.03682778808009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139520464820534" calcext:value-type="float">
            <text:p>-0.0139520464820534</text:p>
          </table:table-cell>
          <table:table-cell office:value-type="float" office:value="0.313711852705544" calcext:value-type="float">
            <text:p>0.313711852705544</text:p>
          </table:table-cell>
          <table:table-cell office:value-type="float" office:value="0.0313711852705544" calcext:value-type="float">
            <text:p>0.0313711852705544</text:p>
          </table:table-cell>
          <table:table-cell office:value-type="float" office:value="0.237817303012385" calcext:value-type="float">
            <text:p>0.237817303012385</text:p>
          </table:table-cell>
          <table:table-cell office:value-type="float" office:value="0.203674738846179" calcext:value-type="float">
            <text:p>0.203674738846179</text:p>
          </table:table-cell>
          <table:table-cell office:value-type="float" office:value="0.0203674738846179" calcext:value-type="float">
            <text:p>0.02036747388461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35765266632637" calcext:value-type="float">
            <text:p>-0.135765266632637</text:p>
          </table:table-cell>
          <table:table-cell office:value-type="float" office:value="0.400279620704091" calcext:value-type="float">
            <text:p>0.400279620704091</text:p>
          </table:table-cell>
          <table:table-cell office:value-type="float" office:value="0.0400279620704091" calcext:value-type="float">
            <text:p>0.0400279620704091</text:p>
          </table:table-cell>
          <table:table-cell office:value-type="float" office:value="0.293440685852481" calcext:value-type="float">
            <text:p>0.293440685852481</text:p>
          </table:table-cell>
          <table:table-cell office:value-type="float" office:value="0.303092326024109" calcext:value-type="float">
            <text:p>0.303092326024109</text:p>
          </table:table-cell>
          <table:table-cell office:value-type="float" office:value="0.0303092326024109" calcext:value-type="float">
            <text:p>0.03030923260241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339553852727661" calcext:value-type="float">
            <text:p>-0.339553852727661</text:p>
          </table:table-cell>
          <table:table-cell office:value-type="float" office:value="0.370858091673623" calcext:value-type="float">
            <text:p>0.370858091673623</text:p>
          </table:table-cell>
          <table:table-cell office:value-type="float" office:value="0.0370858091673623" calcext:value-type="float">
            <text:p>0.0370858091673623</text:p>
          </table:table-cell>
          <table:table-cell office:value-type="float" office:value="0.435366494806947" calcext:value-type="float">
            <text:p>0.435366494806947</text:p>
          </table:table-cell>
          <table:table-cell office:value-type="float" office:value="0.250061860585922" calcext:value-type="float">
            <text:p>0.250061860585922</text:p>
          </table:table-cell>
          <table:table-cell office:value-type="float" office:value="0.0250061860585922" calcext:value-type="float">
            <text:p>0.02500618605859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0216200328576024" calcext:value-type="float">
            <text:p>0.0216200328576024</text:p>
          </table:table-cell>
          <table:table-cell office:value-type="float" office:value="0.26709177148922" calcext:value-type="float">
            <text:p>0.26709177148922</text:p>
          </table:table-cell>
          <table:table-cell office:value-type="float" office:value="0.026709177148922" calcext:value-type="float">
            <text:p>0.026709177148922</text:p>
          </table:table-cell>
          <table:table-cell office:value-type="float" office:value="0.177334864911724" calcext:value-type="float">
            <text:p>0.177334864911724</text:p>
          </table:table-cell>
          <table:table-cell office:value-type="float" office:value="0.200112104341092" calcext:value-type="float">
            <text:p>0.200112104341092</text:p>
          </table:table-cell>
          <table:table-cell office:value-type="float" office:value="0.0200112104341092" calcext:value-type="float">
            <text:p>0.02001121043410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751549793781116" calcext:value-type="float">
            <text:p>-0.0751549793781116</text:p>
          </table:table-cell>
          <table:table-cell office:value-type="float" office:value="0.313553094902557" calcext:value-type="float">
            <text:p>0.313553094902557</text:p>
          </table:table-cell>
          <table:table-cell office:value-type="float" office:value="0.0313553094902557" calcext:value-type="float">
            <text:p>0.0313553094902557</text:p>
          </table:table-cell>
          <table:table-cell office:value-type="float" office:value="0.24314405061661" calcext:value-type="float">
            <text:p>0.24314405061661</text:p>
          </table:table-cell>
          <table:table-cell office:value-type="float" office:value="0.210486760218035" calcext:value-type="float">
            <text:p>0.210486760218035</text:p>
          </table:table-cell>
          <table:table-cell office:value-type="float" office:value="0.0210486760218035" calcext:value-type="float">
            <text:p>0.021048676021803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70352756260372" calcext:value-type="float">
            <text:p>-0.270352756260372</text:p>
          </table:table-cell>
          <table:table-cell office:value-type="float" office:value="0.290837698434189" calcext:value-type="float">
            <text:p>0.290837698434189</text:p>
          </table:table-cell>
          <table:table-cell office:value-type="float" office:value="0.0290837698434189" calcext:value-type="float">
            <text:p>0.0290837698434189</text:p>
          </table:table-cell>
          <table:table-cell office:value-type="float" office:value="0.33970483167265" calcext:value-type="float">
            <text:p>0.33970483167265</text:p>
          </table:table-cell>
          <table:table-cell office:value-type="float" office:value="0.204552277436441" calcext:value-type="float">
            <text:p>0.204552277436441</text:p>
          </table:table-cell>
          <table:table-cell office:value-type="float" office:value="0.0204552277436441" calcext:value-type="float">
            <text:p>0.02045522774364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148545906064553" calcext:value-type="float">
            <text:p>-0.0148545906064553</text:p>
          </table:table-cell>
          <table:table-cell office:value-type="float" office:value="0.342680702263563" calcext:value-type="float">
            <text:p>0.342680702263563</text:p>
          </table:table-cell>
          <table:table-cell office:value-type="float" office:value="0.0342680702263563" calcext:value-type="float">
            <text:p>0.0342680702263563</text:p>
          </table:table-cell>
          <table:table-cell office:value-type="float" office:value="0.269175277638749" calcext:value-type="float">
            <text:p>0.269175277638749</text:p>
          </table:table-cell>
          <table:table-cell office:value-type="float" office:value="0.210869033597399" calcext:value-type="float">
            <text:p>0.210869033597399</text:p>
          </table:table-cell>
          <table:table-cell office:value-type="float" office:value="0.0210869033597399" calcext:value-type="float">
            <text:p>0.02108690335973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58917606980332" calcext:value-type="float">
            <text:p>-0.158917606980332</text:p>
          </table:table-cell>
          <table:table-cell office:value-type="float" office:value="0.332066069150563" calcext:value-type="float">
            <text:p>0.332066069150563</text:p>
          </table:table-cell>
          <table:table-cell office:value-type="float" office:value="0.0332066069150563" calcext:value-type="float">
            <text:p>0.0332066069150563</text:p>
          </table:table-cell>
          <table:table-cell office:value-type="float" office:value="0.30367391657869" calcext:value-type="float">
            <text:p>0.30367391657869</text:p>
          </table:table-cell>
          <table:table-cell office:value-type="float" office:value="0.206466554476954" calcext:value-type="float">
            <text:p>0.206466554476954</text:p>
          </table:table-cell>
          <table:table-cell office:value-type="float" office:value="0.0206466554476954" calcext:value-type="float">
            <text:p>0.02064665544769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08688583506362" calcext:value-type="float">
            <text:p>-0.308688583506362</text:p>
          </table:table-cell>
          <table:table-cell office:value-type="float" office:value="0.47280227485581" calcext:value-type="float">
            <text:p>0.47280227485581</text:p>
          </table:table-cell>
          <table:table-cell office:value-type="float" office:value="0.047280227485581" calcext:value-type="float">
            <text:p>0.047280227485581</text:p>
          </table:table-cell>
          <table:table-cell office:value-type="float" office:value="0.460072955394746" calcext:value-type="float">
            <text:p>0.460072955394746</text:p>
          </table:table-cell>
          <table:table-cell office:value-type="float" office:value="0.325557933678568" calcext:value-type="float">
            <text:p>0.325557933678568</text:p>
          </table:table-cell>
          <table:table-cell office:value-type="float" office:value="0.0325557933678568" calcext:value-type="float">
            <text:p>0.03255579336785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0105949596687" calcext:value-type="float">
            <text:p>-0.10105949596687</text:p>
          </table:table-cell>
          <table:table-cell office:value-type="float" office:value="0.179648083011324" calcext:value-type="float">
            <text:p>0.179648083011324</text:p>
          </table:table-cell>
          <table:table-cell office:value-type="float" office:value="0.0179648083011324" calcext:value-type="float">
            <text:p>0.0179648083011324</text:p>
          </table:table-cell>
          <table:table-cell office:value-type="float" office:value="0.173892128138887" calcext:value-type="float">
            <text:p>0.173892128138887</text:p>
          </table:table-cell>
          <table:table-cell office:value-type="float" office:value="0.109752931387896" calcext:value-type="float">
            <text:p>0.109752931387896</text:p>
          </table:table-cell>
          <table:table-cell office:value-type="float" office:value="0.0109752931387896" calcext:value-type="float">
            <text:p>0.01097529313878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61065719013049" calcext:value-type="float">
            <text:p>-0.261065719013049</text:p>
          </table:table-cell>
          <table:table-cell office:value-type="float" office:value="0.184740093928525" calcext:value-type="float">
            <text:p>0.184740093928525</text:p>
          </table:table-cell>
          <table:table-cell office:value-type="float" office:value="0.0184740093928525" calcext:value-type="float">
            <text:p>0.0184740093928525</text:p>
          </table:table-cell>
          <table:table-cell office:value-type="float" office:value="0.280994805388655" calcext:value-type="float">
            <text:p>0.280994805388655</text:p>
          </table:table-cell>
          <table:table-cell office:value-type="float" office:value="0.152371297802456" calcext:value-type="float">
            <text:p>0.152371297802456</text:p>
          </table:table-cell>
          <table:table-cell office:value-type="float" office:value="0.0152371297802456" calcext:value-type="float">
            <text:p>0.01523712978024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24438983306469" calcext:value-type="float">
            <text:p>-0.424438983306469</text:p>
          </table:table-cell>
          <table:table-cell office:value-type="float" office:value="0.340310611869004" calcext:value-type="float">
            <text:p>0.340310611869004</text:p>
          </table:table-cell>
          <table:table-cell office:value-type="float" office:value="0.0340310611869004" calcext:value-type="float">
            <text:p>0.0340310611869004</text:p>
          </table:table-cell>
          <table:table-cell office:value-type="float" office:value="0.490335747841907" calcext:value-type="float">
            <text:p>0.490335747841907</text:p>
          </table:table-cell>
          <table:table-cell office:value-type="float" office:value="0.234327051414581" calcext:value-type="float">
            <text:p>0.234327051414581</text:p>
          </table:table-cell>
          <table:table-cell office:value-type="float" office:value="0.0234327051414581" calcext:value-type="float">
            <text:p>0.02343270514145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228568421545798" calcext:value-type="float">
            <text:p>-0.0228568421545798</text:p>
          </table:table-cell>
          <table:table-cell office:value-type="float" office:value="0.288031864076083" calcext:value-type="float">
            <text:p>0.288031864076083</text:p>
          </table:table-cell>
          <table:table-cell office:value-type="float" office:value="0.0288031864076083" calcext:value-type="float">
            <text:p>0.0288031864076083</text:p>
          </table:table-cell>
          <table:table-cell office:value-type="float" office:value="0.220287790116759" calcext:value-type="float">
            <text:p>0.220287790116759</text:p>
          </table:table-cell>
          <table:table-cell office:value-type="float" office:value="0.185669566199724" calcext:value-type="float">
            <text:p>0.185669566199724</text:p>
          </table:table-cell>
          <table:table-cell office:value-type="float" office:value="0.0185669566199724" calcext:value-type="float">
            <text:p>0.018566956619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77227813768624" calcext:value-type="float">
            <text:p>-0.277227813768624</text:p>
          </table:table-cell>
          <table:table-cell office:value-type="float" office:value="0.240850629739816" calcext:value-type="float">
            <text:p>0.240850629739816</text:p>
          </table:table-cell>
          <table:table-cell office:value-type="float" office:value="0.0240850629739816" calcext:value-type="float">
            <text:p>0.0240850629739816</text:p>
          </table:table-cell>
          <table:table-cell office:value-type="float" office:value="0.313522050640179" calcext:value-type="float">
            <text:p>0.313522050640179</text:p>
          </table:table-cell>
          <table:table-cell office:value-type="float" office:value="0.190661051191182" calcext:value-type="float">
            <text:p>0.190661051191182</text:p>
          </table:table-cell>
          <table:table-cell office:value-type="float" office:value="0.0190661051191182" calcext:value-type="float">
            <text:p>0.01906610511911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58039421416478" calcext:value-type="float">
            <text:p>-0.458039421416478</text:p>
          </table:table-cell>
          <table:table-cell office:value-type="float" office:value="0.395103235464228" calcext:value-type="float">
            <text:p>0.395103235464228</text:p>
          </table:table-cell>
          <table:table-cell office:value-type="float" office:value="0.0395103235464228" calcext:value-type="float">
            <text:p>0.0395103235464228</text:p>
          </table:table-cell>
          <table:table-cell office:value-type="float" office:value="0.538904015478233" calcext:value-type="float">
            <text:p>0.538904015478233</text:p>
          </table:table-cell>
          <table:table-cell office:value-type="float" office:value="0.273266944414492" calcext:value-type="float">
            <text:p>0.273266944414492</text:p>
          </table:table-cell>
          <table:table-cell office:value-type="float" office:value="0.0273266944414492" calcext:value-type="float">
            <text:p>0.02732669444144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67115539529567" calcext:value-type="float">
            <text:p>-0.0667115539529567</text:p>
          </table:table-cell>
          <table:table-cell office:value-type="float" office:value="0.219060936046893" calcext:value-type="float">
            <text:p>0.219060936046893</text:p>
          </table:table-cell>
          <table:table-cell office:value-type="float" office:value="0.0219060936046893" calcext:value-type="float">
            <text:p>0.0219060936046893</text:p>
          </table:table-cell>
          <table:table-cell office:value-type="float" office:value="0.178780843477699" calcext:value-type="float">
            <text:p>0.178780843477699</text:p>
          </table:table-cell>
          <table:table-cell office:value-type="float" office:value="0.142118382155189" calcext:value-type="float">
            <text:p>0.142118382155189</text:p>
          </table:table-cell>
          <table:table-cell office:value-type="float" office:value="0.0142118382155189" calcext:value-type="float">
            <text:p>0.01421183821551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47050154678967" calcext:value-type="float">
            <text:p>-0.247050154678967</text:p>
          </table:table-cell>
          <table:table-cell office:value-type="float" office:value="0.224141475473058" calcext:value-type="float">
            <text:p>0.224141475473058</text:p>
          </table:table-cell>
          <table:table-cell office:value-type="float" office:value="0.0224141475473058" calcext:value-type="float">
            <text:p>0.0224141475473058</text:p>
          </table:table-cell>
          <table:table-cell office:value-type="float" office:value="0.295934756499475" calcext:value-type="float">
            <text:p>0.295934756499475</text:p>
          </table:table-cell>
          <table:table-cell office:value-type="float" office:value="0.15306104228747" calcext:value-type="float">
            <text:p>0.15306104228747</text:p>
          </table:table-cell>
          <table:table-cell office:value-type="float" office:value="0.015306104228747" calcext:value-type="float">
            <text:p>0.0153061042287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404868709086933" calcext:value-type="float">
            <text:p>-0.404868709086933</text:p>
          </table:table-cell>
          <table:table-cell office:value-type="float" office:value="0.298683133667578" calcext:value-type="float">
            <text:p>0.298683133667578</text:p>
          </table:table-cell>
          <table:table-cell office:value-type="float" office:value="0.0298683133667578" calcext:value-type="float">
            <text:p>0.0298683133667578</text:p>
          </table:table-cell>
          <table:table-cell office:value-type="float" office:value="0.454978875898577" calcext:value-type="float">
            <text:p>0.454978875898577</text:p>
          </table:table-cell>
          <table:table-cell office:value-type="float" office:value="0.213750520769395" calcext:value-type="float">
            <text:p>0.213750520769395</text:p>
          </table:table-cell>
          <table:table-cell office:value-type="float" office:value="0.0213750520769395" calcext:value-type="float">
            <text:p>0.02137505207693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814245620190748" calcext:value-type="float">
            <text:p>-0.0814245620190748</text:p>
          </table:table-cell>
          <table:table-cell office:value-type="float" office:value="0.295780447152568" calcext:value-type="float">
            <text:p>0.295780447152568</text:p>
          </table:table-cell>
          <table:table-cell office:value-type="float" office:value="0.0295780447152568" calcext:value-type="float">
            <text:p>0.0295780447152568</text:p>
          </table:table-cell>
          <table:table-cell office:value-type="float" office:value="0.234407746202019" calcext:value-type="float">
            <text:p>0.234407746202019</text:p>
          </table:table-cell>
          <table:table-cell office:value-type="float" office:value="0.196674832930309" calcext:value-type="float">
            <text:p>0.196674832930309</text:p>
          </table:table-cell>
          <table:table-cell office:value-type="float" office:value="0.0196674832930309" calcext:value-type="float">
            <text:p>0.01966748329303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44358800305727" calcext:value-type="float">
            <text:p>-0.244358800305727</text:p>
          </table:table-cell>
          <table:table-cell office:value-type="float" office:value="0.251031874935627" calcext:value-type="float">
            <text:p>0.251031874935627</text:p>
          </table:table-cell>
          <table:table-cell office:value-type="float" office:value="0.0251031874935627" calcext:value-type="float">
            <text:p>0.0251031874935627</text:p>
          </table:table-cell>
          <table:table-cell office:value-type="float" office:value="0.305248050401419" calcext:value-type="float">
            <text:p>0.305248050401419</text:p>
          </table:table-cell>
          <table:table-cell office:value-type="float" office:value="0.170920512047952" calcext:value-type="float">
            <text:p>0.170920512047952</text:p>
          </table:table-cell>
          <table:table-cell office:value-type="float" office:value="0.0170920512047952" calcext:value-type="float">
            <text:p>0.01709205120479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LME</text:p>
          </table:table-cell>
          <table:table-cell office:value-type="string" calcext:value-type="string">
            <text:p>nlme</text:p>
          </table:table-cell>
          <table:table-cell office:value-type="string" calcext:value-type="string">
            <text:p>Mixed Model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32918085435082" calcext:value-type="float">
            <text:p>-0.432918085435082</text:p>
          </table:table-cell>
          <table:table-cell office:value-type="float" office:value="0.330123210188076" calcext:value-type="float">
            <text:p>0.330123210188076</text:p>
          </table:table-cell>
          <table:table-cell office:value-type="float" office:value="0.0330123210188076" calcext:value-type="float">
            <text:p>0.0330123210188076</text:p>
          </table:table-cell>
          <table:table-cell office:value-type="float" office:value="0.493089487981316" calcext:value-type="float">
            <text:p>0.493089487981316</text:p>
          </table:table-cell>
          <table:table-cell office:value-type="float" office:value="0.229563367068729" calcext:value-type="float">
            <text:p>0.229563367068729</text:p>
          </table:table-cell>
          <table:table-cell office:value-type="float" office:value="0.0229563367068729" calcext:value-type="float">
            <text:p>0.022956336706872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79559483686654" calcext:value-type="float">
            <text:p>-0.479559483686654</text:p>
          </table:table-cell>
          <table:table-cell office:value-type="float" office:value="0.0420432874977494" calcext:value-type="float">
            <text:p>0.0420432874977494</text:p>
          </table:table-cell>
          <table:table-cell office:value-type="float" office:value="0.00420432874977494" calcext:value-type="float">
            <text:p>0.00420432874977494</text:p>
          </table:table-cell>
          <table:table-cell office:value-type="float" office:value="0.479559483686654" calcext:value-type="float">
            <text:p>0.479559483686654</text:p>
          </table:table-cell>
          <table:table-cell office:value-type="float" office:value="0.0420432874977494" calcext:value-type="float">
            <text:p>0.0420432874977494</text:p>
          </table:table-cell>
          <table:table-cell office:value-type="float" office:value="0.00420432874977494" calcext:value-type="float">
            <text:p>0.004204328749774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804315099629626" calcext:value-type="float">
            <text:p>-0.804315099629626</text:p>
          </table:table-cell>
          <table:table-cell office:value-type="float" office:value="0.0485520533506812" calcext:value-type="float">
            <text:p>0.0485520533506812</text:p>
          </table:table-cell>
          <table:table-cell office:value-type="float" office:value="0.00485520533506812" calcext:value-type="float">
            <text:p>0.00485520533506812</text:p>
          </table:table-cell>
          <table:table-cell office:value-type="float" office:value="0.804315099629626" calcext:value-type="float">
            <text:p>0.804315099629626</text:p>
          </table:table-cell>
          <table:table-cell office:value-type="float" office:value="0.0485520533506812" calcext:value-type="float">
            <text:p>0.0485520533506812</text:p>
          </table:table-cell>
          <table:table-cell office:value-type="float" office:value="0.00485520533506812" calcext:value-type="float">
            <text:p>0.004855205335068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.12653204853108" calcext:value-type="float">
            <text:p>-1.12653204853108</text:p>
          </table:table-cell>
          <table:table-cell office:value-type="float" office:value="0.0533201346133737" calcext:value-type="float">
            <text:p>0.0533201346133737</text:p>
          </table:table-cell>
          <table:table-cell office:value-type="float" office:value="0.00533201346133737" calcext:value-type="float">
            <text:p>0.00533201346133737</text:p>
          </table:table-cell>
          <table:table-cell office:value-type="float" office:value="1.12653204853108" calcext:value-type="float">
            <text:p>1.12653204853108</text:p>
          </table:table-cell>
          <table:table-cell office:value-type="float" office:value="0.0533201346133737" calcext:value-type="float">
            <text:p>0.0533201346133737</text:p>
          </table:table-cell>
          <table:table-cell office:value-type="float" office:value="0.00533201346133737" calcext:value-type="float">
            <text:p>0.0053320134613373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68332345000912" calcext:value-type="float">
            <text:p>-0.468332345000912</text:p>
          </table:table-cell>
          <table:table-cell office:value-type="float" office:value="0.0595113811296286" calcext:value-type="float">
            <text:p>0.0595113811296286</text:p>
          </table:table-cell>
          <table:table-cell office:value-type="float" office:value="0.00595113811296286" calcext:value-type="float">
            <text:p>0.00595113811296286</text:p>
          </table:table-cell>
          <table:table-cell office:value-type="float" office:value="0.468332345000912" calcext:value-type="float">
            <text:p>0.468332345000912</text:p>
          </table:table-cell>
          <table:table-cell office:value-type="float" office:value="0.0595113811296286" calcext:value-type="float">
            <text:p>0.0595113811296286</text:p>
          </table:table-cell>
          <table:table-cell office:value-type="float" office:value="0.00595113811296286" calcext:value-type="float">
            <text:p>0.005951138112962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782067845621202" calcext:value-type="float">
            <text:p>-0.782067845621202</text:p>
          </table:table-cell>
          <table:table-cell office:value-type="float" office:value="0.0624892983704688" calcext:value-type="float">
            <text:p>0.0624892983704688</text:p>
          </table:table-cell>
          <table:table-cell office:value-type="float" office:value="0.00624892983704688" calcext:value-type="float">
            <text:p>0.00624892983704688</text:p>
          </table:table-cell>
          <table:table-cell office:value-type="float" office:value="0.782067845621202" calcext:value-type="float">
            <text:p>0.782067845621202</text:p>
          </table:table-cell>
          <table:table-cell office:value-type="float" office:value="0.0624892983704688" calcext:value-type="float">
            <text:p>0.0624892983704688</text:p>
          </table:table-cell>
          <table:table-cell office:value-type="float" office:value="0.00624892983704688" calcext:value-type="float">
            <text:p>0.006248929837046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1.10926321355939" calcext:value-type="float">
            <text:p>-1.10926321355939</text:p>
          </table:table-cell>
          <table:table-cell office:value-type="float" office:value="0.0573060581482429" calcext:value-type="float">
            <text:p>0.0573060581482429</text:p>
          </table:table-cell>
          <table:table-cell office:value-type="float" office:value="0.00573060581482429" calcext:value-type="float">
            <text:p>0.00573060581482429</text:p>
          </table:table-cell>
          <table:table-cell office:value-type="float" office:value="1.10926321355939" calcext:value-type="float">
            <text:p>1.10926321355939</text:p>
          </table:table-cell>
          <table:table-cell office:value-type="float" office:value="0.0573060581482429" calcext:value-type="float">
            <text:p>0.0573060581482429</text:p>
          </table:table-cell>
          <table:table-cell office:value-type="float" office:value="0.00573060581482429" calcext:value-type="float">
            <text:p>0.0057306058148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4727652894567" calcext:value-type="float">
            <text:p>-0.4727652894567</text:p>
          </table:table-cell>
          <table:table-cell office:value-type="float" office:value="0.0401273663211084" calcext:value-type="float">
            <text:p>0.0401273663211084</text:p>
          </table:table-cell>
          <table:table-cell office:value-type="float" office:value="0.00401273663211084" calcext:value-type="float">
            <text:p>0.00401273663211084</text:p>
          </table:table-cell>
          <table:table-cell office:value-type="float" office:value="0.4727652894567" calcext:value-type="float">
            <text:p>0.4727652894567</text:p>
          </table:table-cell>
          <table:table-cell office:value-type="float" office:value="0.0401273663211084" calcext:value-type="float">
            <text:p>0.0401273663211084</text:p>
          </table:table-cell>
          <table:table-cell office:value-type="float" office:value="0.00401273663211084" calcext:value-type="float">
            <text:p>0.004012736632110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813085905142095" calcext:value-type="float">
            <text:p>-0.813085905142095</text:p>
          </table:table-cell>
          <table:table-cell office:value-type="float" office:value="0.0419579774505433" calcext:value-type="float">
            <text:p>0.0419579774505433</text:p>
          </table:table-cell>
          <table:table-cell office:value-type="float" office:value="0.00419579774505433" calcext:value-type="float">
            <text:p>0.00419579774505433</text:p>
          </table:table-cell>
          <table:table-cell office:value-type="float" office:value="0.813085905142095" calcext:value-type="float">
            <text:p>0.813085905142095</text:p>
          </table:table-cell>
          <table:table-cell office:value-type="float" office:value="0.0419579774505433" calcext:value-type="float">
            <text:p>0.0419579774505433</text:p>
          </table:table-cell>
          <table:table-cell office:value-type="float" office:value="0.00419579774505433" calcext:value-type="float">
            <text:p>0.004195797745054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.1349990401154" calcext:value-type="float">
            <text:p>-1.1349990401154</text:p>
          </table:table-cell>
          <table:table-cell office:value-type="float" office:value="0.050087335886541" calcext:value-type="float">
            <text:p>0.050087335886541</text:p>
          </table:table-cell>
          <table:table-cell office:value-type="float" office:value="0.0050087335886541" calcext:value-type="float">
            <text:p>0.0050087335886541</text:p>
          </table:table-cell>
          <table:table-cell office:value-type="float" office:value="1.1349990401154" calcext:value-type="float">
            <text:p>1.1349990401154</text:p>
          </table:table-cell>
          <table:table-cell office:value-type="float" office:value="0.050087335886541" calcext:value-type="float">
            <text:p>0.050087335886541</text:p>
          </table:table-cell>
          <table:table-cell office:value-type="float" office:value="0.0050087335886541" calcext:value-type="float">
            <text:p>0.00500873358865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67099106812784" calcext:value-type="float">
            <text:p>-0.467099106812784</text:p>
          </table:table-cell>
          <table:table-cell office:value-type="float" office:value="0.0539153900506714" calcext:value-type="float">
            <text:p>0.0539153900506714</text:p>
          </table:table-cell>
          <table:table-cell office:value-type="float" office:value="0.00539153900506714" calcext:value-type="float">
            <text:p>0.00539153900506714</text:p>
          </table:table-cell>
          <table:table-cell office:value-type="float" office:value="0.467099106812784" calcext:value-type="float">
            <text:p>0.467099106812784</text:p>
          </table:table-cell>
          <table:table-cell office:value-type="float" office:value="0.0539153900506714" calcext:value-type="float">
            <text:p>0.0539153900506714</text:p>
          </table:table-cell>
          <table:table-cell office:value-type="float" office:value="0.00539153900506714" calcext:value-type="float">
            <text:p>0.005391539005067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789916786178299" calcext:value-type="float">
            <text:p>-0.789916786178299</text:p>
          </table:table-cell>
          <table:table-cell office:value-type="float" office:value="0.0557750769229797" calcext:value-type="float">
            <text:p>0.0557750769229797</text:p>
          </table:table-cell>
          <table:table-cell office:value-type="float" office:value="0.00557750769229797" calcext:value-type="float">
            <text:p>0.00557750769229797</text:p>
          </table:table-cell>
          <table:table-cell office:value-type="float" office:value="0.789916786178299" calcext:value-type="float">
            <text:p>0.789916786178299</text:p>
          </table:table-cell>
          <table:table-cell office:value-type="float" office:value="0.0557750769229797" calcext:value-type="float">
            <text:p>0.0557750769229797</text:p>
          </table:table-cell>
          <table:table-cell office:value-type="float" office:value="0.00557750769229797" calcext:value-type="float">
            <text:p>0.005577507692297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1.11187008331784" calcext:value-type="float">
            <text:p>-1.11187008331784</text:p>
          </table:table-cell>
          <table:table-cell office:value-type="float" office:value="0.0578215645161234" calcext:value-type="float">
            <text:p>0.0578215645161234</text:p>
          </table:table-cell>
          <table:table-cell office:value-type="float" office:value="0.00578215645161234" calcext:value-type="float">
            <text:p>0.00578215645161234</text:p>
          </table:table-cell>
          <table:table-cell office:value-type="float" office:value="1.11187008331784" calcext:value-type="float">
            <text:p>1.11187008331784</text:p>
          </table:table-cell>
          <table:table-cell office:value-type="float" office:value="0.0578215645161234" calcext:value-type="float">
            <text:p>0.0578215645161234</text:p>
          </table:table-cell>
          <table:table-cell office:value-type="float" office:value="0.00578215645161234" calcext:value-type="float">
            <text:p>0.0057821564516123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84249851738292" calcext:value-type="float">
            <text:p>-0.484249851738292</text:p>
          </table:table-cell>
          <table:table-cell office:value-type="float" office:value="0.0335386417156168" calcext:value-type="float">
            <text:p>0.0335386417156168</text:p>
          </table:table-cell>
          <table:table-cell office:value-type="float" office:value="0.00335386417156168" calcext:value-type="float">
            <text:p>0.00335386417156168</text:p>
          </table:table-cell>
          <table:table-cell office:value-type="float" office:value="0.484249851738292" calcext:value-type="float">
            <text:p>0.484249851738292</text:p>
          </table:table-cell>
          <table:table-cell office:value-type="float" office:value="0.0335386417156168" calcext:value-type="float">
            <text:p>0.0335386417156168</text:p>
          </table:table-cell>
          <table:table-cell office:value-type="float" office:value="0.00335386417156168" calcext:value-type="float">
            <text:p>0.003353864171561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820311096312602" calcext:value-type="float">
            <text:p>-0.820311096312602</text:p>
          </table:table-cell>
          <table:table-cell office:value-type="float" office:value="0.0460199723829391" calcext:value-type="float">
            <text:p>0.0460199723829391</text:p>
          </table:table-cell>
          <table:table-cell office:value-type="float" office:value="0.00460199723829391" calcext:value-type="float">
            <text:p>0.00460199723829391</text:p>
          </table:table-cell>
          <table:table-cell office:value-type="float" office:value="0.820311096312602" calcext:value-type="float">
            <text:p>0.820311096312602</text:p>
          </table:table-cell>
          <table:table-cell office:value-type="float" office:value="0.0460199723829391" calcext:value-type="float">
            <text:p>0.0460199723829391</text:p>
          </table:table-cell>
          <table:table-cell office:value-type="float" office:value="0.00460199723829391" calcext:value-type="float">
            <text:p>0.004601997238293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.15066191040135" calcext:value-type="float">
            <text:p>-1.15066191040135</text:p>
          </table:table-cell>
          <table:table-cell office:value-type="float" office:value="0.0575455463809387" calcext:value-type="float">
            <text:p>0.0575455463809387</text:p>
          </table:table-cell>
          <table:table-cell office:value-type="float" office:value="0.00575455463809387" calcext:value-type="float">
            <text:p>0.00575455463809387</text:p>
          </table:table-cell>
          <table:table-cell office:value-type="float" office:value="1.15066191040135" calcext:value-type="float">
            <text:p>1.15066191040135</text:p>
          </table:table-cell>
          <table:table-cell office:value-type="float" office:value="0.0575455463809387" calcext:value-type="float">
            <text:p>0.0575455463809387</text:p>
          </table:table-cell>
          <table:table-cell office:value-type="float" office:value="0.00575455463809387" calcext:value-type="float">
            <text:p>0.0057545546380938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72875582669514" calcext:value-type="float">
            <text:p>-0.472875582669514</text:p>
          </table:table-cell>
          <table:table-cell office:value-type="float" office:value="0.0570057860235362" calcext:value-type="float">
            <text:p>0.0570057860235362</text:p>
          </table:table-cell>
          <table:table-cell office:value-type="float" office:value="0.00570057860235362" calcext:value-type="float">
            <text:p>0.00570057860235362</text:p>
          </table:table-cell>
          <table:table-cell office:value-type="float" office:value="0.472875582669514" calcext:value-type="float">
            <text:p>0.472875582669514</text:p>
          </table:table-cell>
          <table:table-cell office:value-type="float" office:value="0.0570057860235362" calcext:value-type="float">
            <text:p>0.0570057860235362</text:p>
          </table:table-cell>
          <table:table-cell office:value-type="float" office:value="0.00570057860235362" calcext:value-type="float">
            <text:p>0.0057005786023536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799356483712402" calcext:value-type="float">
            <text:p>-0.799356483712402</text:p>
          </table:table-cell>
          <table:table-cell office:value-type="float" office:value="0.0561204605376038" calcext:value-type="float">
            <text:p>0.0561204605376038</text:p>
          </table:table-cell>
          <table:table-cell office:value-type="float" office:value="0.00561204605376038" calcext:value-type="float">
            <text:p>0.00561204605376038</text:p>
          </table:table-cell>
          <table:table-cell office:value-type="float" office:value="0.799356483712402" calcext:value-type="float">
            <text:p>0.799356483712402</text:p>
          </table:table-cell>
          <table:table-cell office:value-type="float" office:value="0.0561204605376038" calcext:value-type="float">
            <text:p>0.0561204605376038</text:p>
          </table:table-cell>
          <table:table-cell office:value-type="float" office:value="0.00561204605376038" calcext:value-type="float">
            <text:p>0.005612046053760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1.11933079533915" calcext:value-type="float">
            <text:p>-1.11933079533915</text:p>
          </table:table-cell>
          <table:table-cell office:value-type="float" office:value="0.0668357677195577" calcext:value-type="float">
            <text:p>0.0668357677195577</text:p>
          </table:table-cell>
          <table:table-cell office:value-type="float" office:value="0.00668357677195577" calcext:value-type="float">
            <text:p>0.00668357677195577</text:p>
          </table:table-cell>
          <table:table-cell office:value-type="float" office:value="1.11933079533915" calcext:value-type="float">
            <text:p>1.11933079533915</text:p>
          </table:table-cell>
          <table:table-cell office:value-type="float" office:value="0.0668357677195577" calcext:value-type="float">
            <text:p>0.0668357677195577</text:p>
          </table:table-cell>
          <table:table-cell office:value-type="float" office:value="0.00668357677195577" calcext:value-type="float">
            <text:p>0.0066835767719557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489526603872489" calcext:value-type="float">
            <text:p>-0.489526603872489</text:p>
          </table:table-cell>
          <table:table-cell office:value-type="float" office:value="0.0291342348282797" calcext:value-type="float">
            <text:p>0.0291342348282797</text:p>
          </table:table-cell>
          <table:table-cell office:value-type="float" office:value="0.00291342348282797" calcext:value-type="float">
            <text:p>0.00291342348282797</text:p>
          </table:table-cell>
          <table:table-cell office:value-type="float" office:value="0.489526603872489" calcext:value-type="float">
            <text:p>0.489526603872489</text:p>
          </table:table-cell>
          <table:table-cell office:value-type="float" office:value="0.0291342348282797" calcext:value-type="float">
            <text:p>0.0291342348282797</text:p>
          </table:table-cell>
          <table:table-cell office:value-type="float" office:value="0.00291342348282797" calcext:value-type="float">
            <text:p>0.002913423482827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825489958114304" calcext:value-type="float">
            <text:p>-0.825489958114304</text:p>
          </table:table-cell>
          <table:table-cell office:value-type="float" office:value="0.0337132845211608" calcext:value-type="float">
            <text:p>0.0337132845211608</text:p>
          </table:table-cell>
          <table:table-cell office:value-type="float" office:value="0.00337132845211608" calcext:value-type="float">
            <text:p>0.00337132845211608</text:p>
          </table:table-cell>
          <table:table-cell office:value-type="float" office:value="0.825489958114304" calcext:value-type="float">
            <text:p>0.825489958114304</text:p>
          </table:table-cell>
          <table:table-cell office:value-type="float" office:value="0.0337132845211608" calcext:value-type="float">
            <text:p>0.0337132845211608</text:p>
          </table:table-cell>
          <table:table-cell office:value-type="float" office:value="0.00337132845211608" calcext:value-type="float">
            <text:p>0.003371328452116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.15981013753482" calcext:value-type="float">
            <text:p>-1.15981013753482</text:p>
          </table:table-cell>
          <table:table-cell office:value-type="float" office:value="0.0439542214873003" calcext:value-type="float">
            <text:p>0.0439542214873003</text:p>
          </table:table-cell>
          <table:table-cell office:value-type="float" office:value="0.00439542214873003" calcext:value-type="float">
            <text:p>0.00439542214873003</text:p>
          </table:table-cell>
          <table:table-cell office:value-type="float" office:value="1.15981013753482" calcext:value-type="float">
            <text:p>1.15981013753482</text:p>
          </table:table-cell>
          <table:table-cell office:value-type="float" office:value="0.0439542214873003" calcext:value-type="float">
            <text:p>0.0439542214873003</text:p>
          </table:table-cell>
          <table:table-cell office:value-type="float" office:value="0.00439542214873003" calcext:value-type="float">
            <text:p>0.004395422148730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89204966740689" calcext:value-type="float">
            <text:p>-0.489204966740689</text:p>
          </table:table-cell>
          <table:table-cell office:value-type="float" office:value="0.0501517990820515" calcext:value-type="float">
            <text:p>0.0501517990820515</text:p>
          </table:table-cell>
          <table:table-cell office:value-type="float" office:value="0.00501517990820515" calcext:value-type="float">
            <text:p>0.00501517990820515</text:p>
          </table:table-cell>
          <table:table-cell office:value-type="float" office:value="0.489204966740689" calcext:value-type="float">
            <text:p>0.489204966740689</text:p>
          </table:table-cell>
          <table:table-cell office:value-type="float" office:value="0.0501517990820515" calcext:value-type="float">
            <text:p>0.0501517990820515</text:p>
          </table:table-cell>
          <table:table-cell office:value-type="float" office:value="0.00501517990820515" calcext:value-type="float">
            <text:p>0.005015179908205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808605067316734" calcext:value-type="float">
            <text:p>-0.808605067316734</text:p>
          </table:table-cell>
          <table:table-cell office:value-type="float" office:value="0.052469075574213" calcext:value-type="float">
            <text:p>0.052469075574213</text:p>
          </table:table-cell>
          <table:table-cell office:value-type="float" office:value="0.0052469075574213" calcext:value-type="float">
            <text:p>0.0052469075574213</text:p>
          </table:table-cell>
          <table:table-cell office:value-type="float" office:value="0.808605067316734" calcext:value-type="float">
            <text:p>0.808605067316734</text:p>
          </table:table-cell>
          <table:table-cell office:value-type="float" office:value="0.052469075574213" calcext:value-type="float">
            <text:p>0.052469075574213</text:p>
          </table:table-cell>
          <table:table-cell office:value-type="float" office:value="0.0052469075574213" calcext:value-type="float">
            <text:p>0.005246907557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1.13074206999693" calcext:value-type="float">
            <text:p>-1.13074206999693</text:p>
          </table:table-cell>
          <table:table-cell office:value-type="float" office:value="0.0588056945964484" calcext:value-type="float">
            <text:p>0.0588056945964484</text:p>
          </table:table-cell>
          <table:table-cell office:value-type="float" office:value="0.00588056945964484" calcext:value-type="float">
            <text:p>0.00588056945964484</text:p>
          </table:table-cell>
          <table:table-cell office:value-type="float" office:value="1.13074206999693" calcext:value-type="float">
            <text:p>1.13074206999693</text:p>
          </table:table-cell>
          <table:table-cell office:value-type="float" office:value="0.0588056945964484" calcext:value-type="float">
            <text:p>0.0588056945964484</text:p>
          </table:table-cell>
          <table:table-cell office:value-type="float" office:value="0.00588056945964484" calcext:value-type="float">
            <text:p>0.005880569459644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501353021618685" calcext:value-type="float">
            <text:p>-0.501353021618685</text:p>
          </table:table-cell>
          <table:table-cell office:value-type="float" office:value="0.03004967436504" calcext:value-type="float">
            <text:p>0.03004967436504</text:p>
          </table:table-cell>
          <table:table-cell office:value-type="float" office:value="0.003004967436504" calcext:value-type="float">
            <text:p>0.003004967436504</text:p>
          </table:table-cell>
          <table:table-cell office:value-type="float" office:value="0.501353021618685" calcext:value-type="float">
            <text:p>0.501353021618685</text:p>
          </table:table-cell>
          <table:table-cell office:value-type="float" office:value="0.03004967436504" calcext:value-type="float">
            <text:p>0.03004967436504</text:p>
          </table:table-cell>
          <table:table-cell office:value-type="float" office:value="0.003004967436504" calcext:value-type="float">
            <text:p>0.0030049674365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828723930492629" calcext:value-type="float">
            <text:p>-0.828723930492629</text:p>
          </table:table-cell>
          <table:table-cell office:value-type="float" office:value="0.0406689250274043" calcext:value-type="float">
            <text:p>0.0406689250274043</text:p>
          </table:table-cell>
          <table:table-cell office:value-type="float" office:value="0.00406689250274043" calcext:value-type="float">
            <text:p>0.00406689250274043</text:p>
          </table:table-cell>
          <table:table-cell office:value-type="float" office:value="0.828723930492629" calcext:value-type="float">
            <text:p>0.828723930492629</text:p>
          </table:table-cell>
          <table:table-cell office:value-type="float" office:value="0.0406689250274043" calcext:value-type="float">
            <text:p>0.0406689250274043</text:p>
          </table:table-cell>
          <table:table-cell office:value-type="float" office:value="0.00406689250274043" calcext:value-type="float">
            <text:p>0.004066892502740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.18267211656813" calcext:value-type="float">
            <text:p>-1.18267211656813</text:p>
          </table:table-cell>
          <table:table-cell office:value-type="float" office:value="0.0420085776847974" calcext:value-type="float">
            <text:p>0.0420085776847974</text:p>
          </table:table-cell>
          <table:table-cell office:value-type="float" office:value="0.00420085776847974" calcext:value-type="float">
            <text:p>0.00420085776847974</text:p>
          </table:table-cell>
          <table:table-cell office:value-type="float" office:value="1.18267211656813" calcext:value-type="float">
            <text:p>1.18267211656813</text:p>
          </table:table-cell>
          <table:table-cell office:value-type="float" office:value="0.0420085776847974" calcext:value-type="float">
            <text:p>0.0420085776847974</text:p>
          </table:table-cell>
          <table:table-cell office:value-type="float" office:value="0.00420085776847974" calcext:value-type="float">
            <text:p>0.0042008577684797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76239943496592" calcext:value-type="float">
            <text:p>-0.476239943496592</text:p>
          </table:table-cell>
          <table:table-cell office:value-type="float" office:value="0.0508937993685007" calcext:value-type="float">
            <text:p>0.0508937993685007</text:p>
          </table:table-cell>
          <table:table-cell office:value-type="float" office:value="0.00508937993685007" calcext:value-type="float">
            <text:p>0.00508937993685007</text:p>
          </table:table-cell>
          <table:table-cell office:value-type="float" office:value="0.476239943496592" calcext:value-type="float">
            <text:p>0.476239943496592</text:p>
          </table:table-cell>
          <table:table-cell office:value-type="float" office:value="0.0508937993685007" calcext:value-type="float">
            <text:p>0.0508937993685007</text:p>
          </table:table-cell>
          <table:table-cell office:value-type="float" office:value="0.00508937993685007" calcext:value-type="float">
            <text:p>0.0050893799368500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816583933384992" calcext:value-type="float">
            <text:p>-0.816583933384992</text:p>
          </table:table-cell>
          <table:table-cell office:value-type="float" office:value="0.0515103237563567" calcext:value-type="float">
            <text:p>0.0515103237563567</text:p>
          </table:table-cell>
          <table:table-cell office:value-type="float" office:value="0.00515103237563567" calcext:value-type="float">
            <text:p>0.00515103237563567</text:p>
          </table:table-cell>
          <table:table-cell office:value-type="float" office:value="0.816583933384992" calcext:value-type="float">
            <text:p>0.816583933384992</text:p>
          </table:table-cell>
          <table:table-cell office:value-type="float" office:value="0.0515103237563567" calcext:value-type="float">
            <text:p>0.0515103237563567</text:p>
          </table:table-cell>
          <table:table-cell office:value-type="float" office:value="0.00515103237563567" calcext:value-type="float">
            <text:p>0.0051510323756356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1.1517594809641" calcext:value-type="float">
            <text:p>-1.1517594809641</text:p>
          </table:table-cell>
          <table:table-cell office:value-type="float" office:value="0.0600938098258149" calcext:value-type="float">
            <text:p>0.0600938098258149</text:p>
          </table:table-cell>
          <table:table-cell office:value-type="float" office:value="0.00600938098258149" calcext:value-type="float">
            <text:p>0.00600938098258149</text:p>
          </table:table-cell>
          <table:table-cell office:value-type="float" office:value="1.1517594809641" calcext:value-type="float">
            <text:p>1.1517594809641</text:p>
          </table:table-cell>
          <table:table-cell office:value-type="float" office:value="0.0600938098258149" calcext:value-type="float">
            <text:p>0.0600938098258149</text:p>
          </table:table-cell>
          <table:table-cell office:value-type="float" office:value="0.00600938098258149" calcext:value-type="float">
            <text:p>0.006009380982581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02884289042899" calcext:value-type="float">
            <text:p>-0.502884289042899</text:p>
          </table:table-cell>
          <table:table-cell office:value-type="float" office:value="0.0293844417008655" calcext:value-type="float">
            <text:p>0.0293844417008655</text:p>
          </table:table-cell>
          <table:table-cell office:value-type="float" office:value="0.00293844417008655" calcext:value-type="float">
            <text:p>0.00293844417008655</text:p>
          </table:table-cell>
          <table:table-cell office:value-type="float" office:value="0.502884289042899" calcext:value-type="float">
            <text:p>0.502884289042899</text:p>
          </table:table-cell>
          <table:table-cell office:value-type="float" office:value="0.0293844417008655" calcext:value-type="float">
            <text:p>0.0293844417008655</text:p>
          </table:table-cell>
          <table:table-cell office:value-type="float" office:value="0.00293844417008655" calcext:value-type="float">
            <text:p>0.002938444170086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855623596364695" calcext:value-type="float">
            <text:p>-0.855623596364695</text:p>
          </table:table-cell>
          <table:table-cell office:value-type="float" office:value="0.0308866281315159" calcext:value-type="float">
            <text:p>0.0308866281315159</text:p>
          </table:table-cell>
          <table:table-cell office:value-type="float" office:value="0.00308866281315159" calcext:value-type="float">
            <text:p>0.00308866281315159</text:p>
          </table:table-cell>
          <table:table-cell office:value-type="float" office:value="0.855623596364695" calcext:value-type="float">
            <text:p>0.855623596364695</text:p>
          </table:table-cell>
          <table:table-cell office:value-type="float" office:value="0.0308866281315159" calcext:value-type="float">
            <text:p>0.0308866281315159</text:p>
          </table:table-cell>
          <table:table-cell office:value-type="float" office:value="0.00308866281315159" calcext:value-type="float">
            <text:p>0.003088662813151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.18304092950635" calcext:value-type="float">
            <text:p>-1.18304092950635</text:p>
          </table:table-cell>
          <table:table-cell office:value-type="float" office:value="0.0440886376964261" calcext:value-type="float">
            <text:p>0.0440886376964261</text:p>
          </table:table-cell>
          <table:table-cell office:value-type="float" office:value="0.00440886376964261" calcext:value-type="float">
            <text:p>0.00440886376964261</text:p>
          </table:table-cell>
          <table:table-cell office:value-type="float" office:value="1.18304092950635" calcext:value-type="float">
            <text:p>1.18304092950635</text:p>
          </table:table-cell>
          <table:table-cell office:value-type="float" office:value="0.0440886376964261" calcext:value-type="float">
            <text:p>0.0440886376964261</text:p>
          </table:table-cell>
          <table:table-cell office:value-type="float" office:value="0.00440886376964261" calcext:value-type="float">
            <text:p>0.0044088637696426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93117106680243" calcext:value-type="float">
            <text:p>-0.493117106680243</text:p>
          </table:table-cell>
          <table:table-cell office:value-type="float" office:value="0.0529161274460384" calcext:value-type="float">
            <text:p>0.0529161274460384</text:p>
          </table:table-cell>
          <table:table-cell office:value-type="float" office:value="0.00529161274460384" calcext:value-type="float">
            <text:p>0.00529161274460384</text:p>
          </table:table-cell>
          <table:table-cell office:value-type="float" office:value="0.493117106680243" calcext:value-type="float">
            <text:p>0.493117106680243</text:p>
          </table:table-cell>
          <table:table-cell office:value-type="float" office:value="0.0529161274460384" calcext:value-type="float">
            <text:p>0.0529161274460384</text:p>
          </table:table-cell>
          <table:table-cell office:value-type="float" office:value="0.00529161274460384" calcext:value-type="float">
            <text:p>0.005291612744603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830868387198376" calcext:value-type="float">
            <text:p>-0.830868387198376</text:p>
          </table:table-cell>
          <table:table-cell office:value-type="float" office:value="0.0448276750515613" calcext:value-type="float">
            <text:p>0.0448276750515613</text:p>
          </table:table-cell>
          <table:table-cell office:value-type="float" office:value="0.00448276750515613" calcext:value-type="float">
            <text:p>0.00448276750515613</text:p>
          </table:table-cell>
          <table:table-cell office:value-type="float" office:value="0.830868387198376" calcext:value-type="float">
            <text:p>0.830868387198376</text:p>
          </table:table-cell>
          <table:table-cell office:value-type="float" office:value="0.0448276750515613" calcext:value-type="float">
            <text:p>0.0448276750515613</text:p>
          </table:table-cell>
          <table:table-cell office:value-type="float" office:value="0.00448276750515613" calcext:value-type="float">
            <text:p>0.004482767505156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1.15768200483941" calcext:value-type="float">
            <text:p>-1.15768200483941</text:p>
          </table:table-cell>
          <table:table-cell office:value-type="float" office:value="0.0587498415132575" calcext:value-type="float">
            <text:p>0.0587498415132575</text:p>
          </table:table-cell>
          <table:table-cell office:value-type="float" office:value="0.00587498415132575" calcext:value-type="float">
            <text:p>0.00587498415132575</text:p>
          </table:table-cell>
          <table:table-cell office:value-type="float" office:value="1.15768200483941" calcext:value-type="float">
            <text:p>1.15768200483941</text:p>
          </table:table-cell>
          <table:table-cell office:value-type="float" office:value="0.0587498415132575" calcext:value-type="float">
            <text:p>0.0587498415132575</text:p>
          </table:table-cell>
          <table:table-cell office:value-type="float" office:value="0.00587498415132575" calcext:value-type="float">
            <text:p>0.005874984151325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27230943439224" calcext:value-type="float">
            <text:p>-0.227230943439224</text:p>
          </table:table-cell>
          <table:table-cell office:value-type="float" office:value="0.108723550473193" calcext:value-type="float">
            <text:p>0.108723550473193</text:p>
          </table:table-cell>
          <table:table-cell office:value-type="float" office:value="0.0108723550473193" calcext:value-type="float">
            <text:p>0.0108723550473193</text:p>
          </table:table-cell>
          <table:table-cell office:value-type="float" office:value="0.227906702337906" calcext:value-type="float">
            <text:p>0.227906702337906</text:p>
          </table:table-cell>
          <table:table-cell office:value-type="float" office:value="0.107285322449503" calcext:value-type="float">
            <text:p>0.107285322449503</text:p>
          </table:table-cell>
          <table:table-cell office:value-type="float" office:value="0.0107285322449503" calcext:value-type="float">
            <text:p>0.01072853224495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08801959820999" calcext:value-type="float">
            <text:p>-0.408801959820999</text:p>
          </table:table-cell>
          <table:table-cell office:value-type="float" office:value="0.0995896389941058" calcext:value-type="float">
            <text:p>0.0995896389941058</text:p>
          </table:table-cell>
          <table:table-cell office:value-type="float" office:value="0.00995896389941058" calcext:value-type="float">
            <text:p>0.00995896389941058</text:p>
          </table:table-cell>
          <table:table-cell office:value-type="float" office:value="0.408801959820999" calcext:value-type="float">
            <text:p>0.408801959820999</text:p>
          </table:table-cell>
          <table:table-cell office:value-type="float" office:value="0.0995896389941058" calcext:value-type="float">
            <text:p>0.0995896389941058</text:p>
          </table:table-cell>
          <table:table-cell office:value-type="float" office:value="0.00995896389941058" calcext:value-type="float">
            <text:p>0.0099589638994105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558179700758347" calcext:value-type="float">
            <text:p>-0.558179700758347</text:p>
          </table:table-cell>
          <table:table-cell office:value-type="float" office:value="0.101430684525097" calcext:value-type="float">
            <text:p>0.101430684525097</text:p>
          </table:table-cell>
          <table:table-cell office:value-type="float" office:value="0.0101430684525097" calcext:value-type="float">
            <text:p>0.0101430684525097</text:p>
          </table:table-cell>
          <table:table-cell office:value-type="float" office:value="0.558179700758347" calcext:value-type="float">
            <text:p>0.558179700758347</text:p>
          </table:table-cell>
          <table:table-cell office:value-type="float" office:value="0.101430684525097" calcext:value-type="float">
            <text:p>0.101430684525097</text:p>
          </table:table-cell>
          <table:table-cell office:value-type="float" office:value="0.0101430684525097" calcext:value-type="float">
            <text:p>0.01014306845250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64989418197033" calcext:value-type="float">
            <text:p>-0.264989418197033</text:p>
          </table:table-cell>
          <table:table-cell office:value-type="float" office:value="0.156910554822621" calcext:value-type="float">
            <text:p>0.156910554822621</text:p>
          </table:table-cell>
          <table:table-cell office:value-type="float" office:value="0.0156910554822621" calcext:value-type="float">
            <text:p>0.0156910554822621</text:p>
          </table:table-cell>
          <table:table-cell office:value-type="float" office:value="0.270564672540203" calcext:value-type="float">
            <text:p>0.270564672540203</text:p>
          </table:table-cell>
          <table:table-cell office:value-type="float" office:value="0.146986094038233" calcext:value-type="float">
            <text:p>0.146986094038233</text:p>
          </table:table-cell>
          <table:table-cell office:value-type="float" office:value="0.0146986094038233" calcext:value-type="float">
            <text:p>0.01469860940382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10147399714521" calcext:value-type="float">
            <text:p>-0.410147399714521</text:p>
          </table:table-cell>
          <table:table-cell office:value-type="float" office:value="0.136626231355043" calcext:value-type="float">
            <text:p>0.136626231355043</text:p>
          </table:table-cell>
          <table:table-cell office:value-type="float" office:value="0.0136626231355043" calcext:value-type="float">
            <text:p>0.0136626231355043</text:p>
          </table:table-cell>
          <table:table-cell office:value-type="float" office:value="0.410147399714521" calcext:value-type="float">
            <text:p>0.410147399714521</text:p>
          </table:table-cell>
          <table:table-cell office:value-type="float" office:value="0.136626231355043" calcext:value-type="float">
            <text:p>0.136626231355043</text:p>
          </table:table-cell>
          <table:table-cell office:value-type="float" office:value="0.0136626231355043" calcext:value-type="float">
            <text:p>0.01366262313550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594965619962483" calcext:value-type="float">
            <text:p>-0.594965619962483</text:p>
          </table:table-cell>
          <table:table-cell office:value-type="float" office:value="0.13912328874132" calcext:value-type="float">
            <text:p>0.13912328874132</text:p>
          </table:table-cell>
          <table:table-cell office:value-type="float" office:value="0.013912328874132" calcext:value-type="float">
            <text:p>0.013912328874132</text:p>
          </table:table-cell>
          <table:table-cell office:value-type="float" office:value="0.594965619962483" calcext:value-type="float">
            <text:p>0.594965619962483</text:p>
          </table:table-cell>
          <table:table-cell office:value-type="float" office:value="0.13912328874132" calcext:value-type="float">
            <text:p>0.13912328874132</text:p>
          </table:table-cell>
          <table:table-cell office:value-type="float" office:value="0.013912328874132" calcext:value-type="float">
            <text:p>0.0139123288741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10438332964789" calcext:value-type="float">
            <text:p>-0.210438332964789</text:p>
          </table:table-cell>
          <table:table-cell office:value-type="float" office:value="0.132170114411534" calcext:value-type="float">
            <text:p>0.132170114411534</text:p>
          </table:table-cell>
          <table:table-cell office:value-type="float" office:value="0.0132170114411534" calcext:value-type="float">
            <text:p>0.0132170114411534</text:p>
          </table:table-cell>
          <table:table-cell office:value-type="float" office:value="0.220045287446063" calcext:value-type="float">
            <text:p>0.220045287446063</text:p>
          </table:table-cell>
          <table:table-cell office:value-type="float" office:value="0.115288891445834" calcext:value-type="float">
            <text:p>0.115288891445834</text:p>
          </table:table-cell>
          <table:table-cell office:value-type="float" office:value="0.0115288891445834" calcext:value-type="float">
            <text:p>0.011528889144583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407395142602755" calcext:value-type="float">
            <text:p>-0.407395142602755</text:p>
          </table:table-cell>
          <table:table-cell office:value-type="float" office:value="0.106198988294231" calcext:value-type="float">
            <text:p>0.106198988294231</text:p>
          </table:table-cell>
          <table:table-cell office:value-type="float" office:value="0.0106198988294231" calcext:value-type="float">
            <text:p>0.0106198988294231</text:p>
          </table:table-cell>
          <table:table-cell office:value-type="float" office:value="0.40814999860267" calcext:value-type="float">
            <text:p>0.40814999860267</text:p>
          </table:table-cell>
          <table:table-cell office:value-type="float" office:value="0.103229780569832" calcext:value-type="float">
            <text:p>0.103229780569832</text:p>
          </table:table-cell>
          <table:table-cell office:value-type="float" office:value="0.0103229780569832" calcext:value-type="float">
            <text:p>0.01032297805698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71966204280758" calcext:value-type="float">
            <text:p>-0.571966204280758</text:p>
          </table:table-cell>
          <table:table-cell office:value-type="float" office:value="0.0889952573272902" calcext:value-type="float">
            <text:p>0.0889952573272902</text:p>
          </table:table-cell>
          <table:table-cell office:value-type="float" office:value="0.00889952573272902" calcext:value-type="float">
            <text:p>0.00889952573272902</text:p>
          </table:table-cell>
          <table:table-cell office:value-type="float" office:value="0.571966204280758" calcext:value-type="float">
            <text:p>0.571966204280758</text:p>
          </table:table-cell>
          <table:table-cell office:value-type="float" office:value="0.0889952573272902" calcext:value-type="float">
            <text:p>0.0889952573272902</text:p>
          </table:table-cell>
          <table:table-cell office:value-type="float" office:value="0.00889952573272902" calcext:value-type="float">
            <text:p>0.008899525732729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2845620184912" calcext:value-type="float">
            <text:p>-0.22845620184912</text:p>
          </table:table-cell>
          <table:table-cell office:value-type="float" office:value="0.13752749516802" calcext:value-type="float">
            <text:p>0.13752749516802</text:p>
          </table:table-cell>
          <table:table-cell office:value-type="float" office:value="0.013752749516802" calcext:value-type="float">
            <text:p>0.013752749516802</text:p>
          </table:table-cell>
          <table:table-cell office:value-type="float" office:value="0.233455134296259" calcext:value-type="float">
            <text:p>0.233455134296259</text:p>
          </table:table-cell>
          <table:table-cell office:value-type="float" office:value="0.128768880117938" calcext:value-type="float">
            <text:p>0.128768880117938</text:p>
          </table:table-cell>
          <table:table-cell office:value-type="float" office:value="0.0128768880117938" calcext:value-type="float">
            <text:p>0.01287688801179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04795440585317" calcext:value-type="float">
            <text:p>-0.404795440585317</text:p>
          </table:table-cell>
          <table:table-cell office:value-type="float" office:value="0.130133598712074" calcext:value-type="float">
            <text:p>0.130133598712074</text:p>
          </table:table-cell>
          <table:table-cell office:value-type="float" office:value="0.0130133598712074" calcext:value-type="float">
            <text:p>0.0130133598712074</text:p>
          </table:table-cell>
          <table:table-cell office:value-type="float" office:value="0.405721652266595" calcext:value-type="float">
            <text:p>0.405721652266595</text:p>
          </table:table-cell>
          <table:table-cell office:value-type="float" office:value="0.127186713854686" calcext:value-type="float">
            <text:p>0.127186713854686</text:p>
          </table:table-cell>
          <table:table-cell office:value-type="float" office:value="0.0127186713854686" calcext:value-type="float">
            <text:p>0.01271867138546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564404502037799" calcext:value-type="float">
            <text:p>-0.564404502037799</text:p>
          </table:table-cell>
          <table:table-cell office:value-type="float" office:value="0.121828272661985" calcext:value-type="float">
            <text:p>0.121828272661985</text:p>
          </table:table-cell>
          <table:table-cell office:value-type="float" office:value="0.0121828272661985" calcext:value-type="float">
            <text:p>0.0121828272661985</text:p>
          </table:table-cell>
          <table:table-cell office:value-type="float" office:value="0.564404502037799" calcext:value-type="float">
            <text:p>0.564404502037799</text:p>
          </table:table-cell>
          <table:table-cell office:value-type="float" office:value="0.121828272661985" calcext:value-type="float">
            <text:p>0.121828272661985</text:p>
          </table:table-cell>
          <table:table-cell office:value-type="float" office:value="0.0121828272661985" calcext:value-type="float">
            <text:p>0.01218282726619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53146856779907" calcext:value-type="float">
            <text:p>-0.253146856779907</text:p>
          </table:table-cell>
          <table:table-cell office:value-type="float" office:value="0.0927546300971749" calcext:value-type="float">
            <text:p>0.0927546300971749</text:p>
          </table:table-cell>
          <table:table-cell office:value-type="float" office:value="0.00927546300971749" calcext:value-type="float">
            <text:p>0.00927546300971749</text:p>
          </table:table-cell>
          <table:table-cell office:value-type="float" office:value="0.253387985704346" calcext:value-type="float">
            <text:p>0.253387985704346</text:p>
          </table:table-cell>
          <table:table-cell office:value-type="float" office:value="0.0920871731746228" calcext:value-type="float">
            <text:p>0.0920871731746228</text:p>
          </table:table-cell>
          <table:table-cell office:value-type="float" office:value="0.00920871731746228" calcext:value-type="float">
            <text:p>0.009208717317462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36254022659067" calcext:value-type="float">
            <text:p>-0.436254022659067</text:p>
          </table:table-cell>
          <table:table-cell office:value-type="float" office:value="0.101835792547952" calcext:value-type="float">
            <text:p>0.101835792547952</text:p>
          </table:table-cell>
          <table:table-cell office:value-type="float" office:value="0.0101835792547952" calcext:value-type="float">
            <text:p>0.0101835792547952</text:p>
          </table:table-cell>
          <table:table-cell office:value-type="float" office:value="0.436254022659067" calcext:value-type="float">
            <text:p>0.436254022659067</text:p>
          </table:table-cell>
          <table:table-cell office:value-type="float" office:value="0.101835792547952" calcext:value-type="float">
            <text:p>0.101835792547952</text:p>
          </table:table-cell>
          <table:table-cell office:value-type="float" office:value="0.0101835792547952" calcext:value-type="float">
            <text:p>0.01018357925479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660679953894454" calcext:value-type="float">
            <text:p>-0.660679953894454</text:p>
          </table:table-cell>
          <table:table-cell office:value-type="float" office:value="0.110815748346666" calcext:value-type="float">
            <text:p>0.110815748346666</text:p>
          </table:table-cell>
          <table:table-cell office:value-type="float" office:value="0.0110815748346666" calcext:value-type="float">
            <text:p>0.0110815748346666</text:p>
          </table:table-cell>
          <table:table-cell office:value-type="float" office:value="0.660679953894454" calcext:value-type="float">
            <text:p>0.660679953894454</text:p>
          </table:table-cell>
          <table:table-cell office:value-type="float" office:value="0.110815748346666" calcext:value-type="float">
            <text:p>0.110815748346666</text:p>
          </table:table-cell>
          <table:table-cell office:value-type="float" office:value="0.0110815748346666" calcext:value-type="float">
            <text:p>0.011081574834666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703312330196" calcext:value-type="float">
            <text:p>-0.2703312330196</text:p>
          </table:table-cell>
          <table:table-cell office:value-type="float" office:value="0.135927650308614" calcext:value-type="float">
            <text:p>0.135927650308614</text:p>
          </table:table-cell>
          <table:table-cell office:value-type="float" office:value="0.0135927650308614" calcext:value-type="float">
            <text:p>0.0135927650308614</text:p>
          </table:table-cell>
          <table:table-cell office:value-type="float" office:value="0.276918205684867" calcext:value-type="float">
            <text:p>0.276918205684867</text:p>
          </table:table-cell>
          <table:table-cell office:value-type="float" office:value="0.121799826522109" calcext:value-type="float">
            <text:p>0.121799826522109</text:p>
          </table:table-cell>
          <table:table-cell office:value-type="float" office:value="0.0121799826522109" calcext:value-type="float">
            <text:p>0.01217998265221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469237956172921" calcext:value-type="float">
            <text:p>-0.469237956172921</text:p>
          </table:table-cell>
          <table:table-cell office:value-type="float" office:value="0.125711954302181" calcext:value-type="float">
            <text:p>0.125711954302181</text:p>
          </table:table-cell>
          <table:table-cell office:value-type="float" office:value="0.0125711954302181" calcext:value-type="float">
            <text:p>0.0125711954302181</text:p>
          </table:table-cell>
          <table:table-cell office:value-type="float" office:value="0.469237956172921" calcext:value-type="float">
            <text:p>0.469237956172921</text:p>
          </table:table-cell>
          <table:table-cell office:value-type="float" office:value="0.125711954302181" calcext:value-type="float">
            <text:p>0.125711954302181</text:p>
          </table:table-cell>
          <table:table-cell office:value-type="float" office:value="0.0125711954302181" calcext:value-type="float">
            <text:p>0.01257119543021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684774565961622" calcext:value-type="float">
            <text:p>-0.684774565961622</text:p>
          </table:table-cell>
          <table:table-cell office:value-type="float" office:value="0.130537031539515" calcext:value-type="float">
            <text:p>0.130537031539515</text:p>
          </table:table-cell>
          <table:table-cell office:value-type="float" office:value="0.0130537031539515" calcext:value-type="float">
            <text:p>0.0130537031539515</text:p>
          </table:table-cell>
          <table:table-cell office:value-type="float" office:value="0.684774565961622" calcext:value-type="float">
            <text:p>0.684774565961622</text:p>
          </table:table-cell>
          <table:table-cell office:value-type="float" office:value="0.130537031539515" calcext:value-type="float">
            <text:p>0.130537031539515</text:p>
          </table:table-cell>
          <table:table-cell office:value-type="float" office:value="0.0130537031539515" calcext:value-type="float">
            <text:p>0.01305370315395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43395477293839" calcext:value-type="float">
            <text:p>-0.243395477293839</text:p>
          </table:table-cell>
          <table:table-cell office:value-type="float" office:value="0.106464894428962" calcext:value-type="float">
            <text:p>0.106464894428962</text:p>
          </table:table-cell>
          <table:table-cell office:value-type="float" office:value="0.0106464894428962" calcext:value-type="float">
            <text:p>0.0106464894428962</text:p>
          </table:table-cell>
          <table:table-cell office:value-type="float" office:value="0.244638186502383" calcext:value-type="float">
            <text:p>0.244638186502383</text:p>
          </table:table-cell>
          <table:table-cell office:value-type="float" office:value="0.103547881279182" calcext:value-type="float">
            <text:p>0.103547881279182</text:p>
          </table:table-cell>
          <table:table-cell office:value-type="float" office:value="0.0103547881279182" calcext:value-type="float">
            <text:p>0.01035478812791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440639995442939" calcext:value-type="float">
            <text:p>-0.440639995442939</text:p>
          </table:table-cell>
          <table:table-cell office:value-type="float" office:value="0.0941707134337369" calcext:value-type="float">
            <text:p>0.0941707134337369</text:p>
          </table:table-cell>
          <table:table-cell office:value-type="float" office:value="0.00941707134337369" calcext:value-type="float">
            <text:p>0.00941707134337369</text:p>
          </table:table-cell>
          <table:table-cell office:value-type="float" office:value="0.440639995442939" calcext:value-type="float">
            <text:p>0.440639995442939</text:p>
          </table:table-cell>
          <table:table-cell office:value-type="float" office:value="0.0941707134337369" calcext:value-type="float">
            <text:p>0.0941707134337369</text:p>
          </table:table-cell>
          <table:table-cell office:value-type="float" office:value="0.00941707134337369" calcext:value-type="float">
            <text:p>0.0094170713433736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651264563020411" calcext:value-type="float">
            <text:p>-0.651264563020411</text:p>
          </table:table-cell>
          <table:table-cell office:value-type="float" office:value="0.0799412800296113" calcext:value-type="float">
            <text:p>0.0799412800296113</text:p>
          </table:table-cell>
          <table:table-cell office:value-type="float" office:value="0.00799412800296113" calcext:value-type="float">
            <text:p>0.00799412800296113</text:p>
          </table:table-cell>
          <table:table-cell office:value-type="float" office:value="0.651264563020411" calcext:value-type="float">
            <text:p>0.651264563020411</text:p>
          </table:table-cell>
          <table:table-cell office:value-type="float" office:value="0.0799412800296113" calcext:value-type="float">
            <text:p>0.0799412800296113</text:p>
          </table:table-cell>
          <table:table-cell office:value-type="float" office:value="0.00799412800296113" calcext:value-type="float">
            <text:p>0.007994128002961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8549962685937" calcext:value-type="float">
            <text:p>-0.28549962685937</text:p>
          </table:table-cell>
          <table:table-cell office:value-type="float" office:value="0.116482959872544" calcext:value-type="float">
            <text:p>0.116482959872544</text:p>
          </table:table-cell>
          <table:table-cell office:value-type="float" office:value="0.0116482959872544" calcext:value-type="float">
            <text:p>0.0116482959872544</text:p>
          </table:table-cell>
          <table:table-cell office:value-type="float" office:value="0.28549962685937" calcext:value-type="float">
            <text:p>0.28549962685937</text:p>
          </table:table-cell>
          <table:table-cell office:value-type="float" office:value="0.116482959872544" calcext:value-type="float">
            <text:p>0.116482959872544</text:p>
          </table:table-cell>
          <table:table-cell office:value-type="float" office:value="0.0116482959872544" calcext:value-type="float">
            <text:p>0.01164829598725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451267530495006" calcext:value-type="float">
            <text:p>-0.451267530495006</text:p>
          </table:table-cell>
          <table:table-cell office:value-type="float" office:value="0.117903873359762" calcext:value-type="float">
            <text:p>0.117903873359762</text:p>
          </table:table-cell>
          <table:table-cell office:value-type="float" office:value="0.0117903873359762" calcext:value-type="float">
            <text:p>0.0117903873359762</text:p>
          </table:table-cell>
          <table:table-cell office:value-type="float" office:value="0.451267530495006" calcext:value-type="float">
            <text:p>0.451267530495006</text:p>
          </table:table-cell>
          <table:table-cell office:value-type="float" office:value="0.117903873359762" calcext:value-type="float">
            <text:p>0.117903873359762</text:p>
          </table:table-cell>
          <table:table-cell office:value-type="float" office:value="0.0117903873359762" calcext:value-type="float">
            <text:p>0.011790387335976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634003779636778" calcext:value-type="float">
            <text:p>-0.634003779636778</text:p>
          </table:table-cell>
          <table:table-cell office:value-type="float" office:value="0.114387057142256" calcext:value-type="float">
            <text:p>0.114387057142256</text:p>
          </table:table-cell>
          <table:table-cell office:value-type="float" office:value="0.0114387057142256" calcext:value-type="float">
            <text:p>0.0114387057142256</text:p>
          </table:table-cell>
          <table:table-cell office:value-type="float" office:value="0.634003779636778" calcext:value-type="float">
            <text:p>0.634003779636778</text:p>
          </table:table-cell>
          <table:table-cell office:value-type="float" office:value="0.114387057142256" calcext:value-type="float">
            <text:p>0.114387057142256</text:p>
          </table:table-cell>
          <table:table-cell office:value-type="float" office:value="0.0114387057142256" calcext:value-type="float">
            <text:p>0.01143870571422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89842526694949" calcext:value-type="float">
            <text:p>-0.289842526694949</text:p>
          </table:table-cell>
          <table:table-cell office:value-type="float" office:value="0.0910766717107536" calcext:value-type="float">
            <text:p>0.0910766717107536</text:p>
          </table:table-cell>
          <table:table-cell office:value-type="float" office:value="0.00910766717107536" calcext:value-type="float">
            <text:p>0.00910766717107536</text:p>
          </table:table-cell>
          <table:table-cell office:value-type="float" office:value="0.289842526694949" calcext:value-type="float">
            <text:p>0.289842526694949</text:p>
          </table:table-cell>
          <table:table-cell office:value-type="float" office:value="0.0910766717107536" calcext:value-type="float">
            <text:p>0.0910766717107536</text:p>
          </table:table-cell>
          <table:table-cell office:value-type="float" office:value="0.00910766717107536" calcext:value-type="float">
            <text:p>0.009107667171075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495452217674465" calcext:value-type="float">
            <text:p>-0.495452217674465</text:p>
          </table:table-cell>
          <table:table-cell office:value-type="float" office:value="0.0872787935843374" calcext:value-type="float">
            <text:p>0.0872787935843374</text:p>
          </table:table-cell>
          <table:table-cell office:value-type="float" office:value="0.00872787935843374" calcext:value-type="float">
            <text:p>0.00872787935843374</text:p>
          </table:table-cell>
          <table:table-cell office:value-type="float" office:value="0.495452217674465" calcext:value-type="float">
            <text:p>0.495452217674465</text:p>
          </table:table-cell>
          <table:table-cell office:value-type="float" office:value="0.0872787935843374" calcext:value-type="float">
            <text:p>0.0872787935843374</text:p>
          </table:table-cell>
          <table:table-cell office:value-type="float" office:value="0.00872787935843374" calcext:value-type="float">
            <text:p>0.0087278793584337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734275726294947" calcext:value-type="float">
            <text:p>-0.734275726294947</text:p>
          </table:table-cell>
          <table:table-cell office:value-type="float" office:value="0.0725241295214239" calcext:value-type="float">
            <text:p>0.0725241295214239</text:p>
          </table:table-cell>
          <table:table-cell office:value-type="float" office:value="0.00725241295214239" calcext:value-type="float">
            <text:p>0.00725241295214239</text:p>
          </table:table-cell>
          <table:table-cell office:value-type="float" office:value="0.734275726294947" calcext:value-type="float">
            <text:p>0.734275726294947</text:p>
          </table:table-cell>
          <table:table-cell office:value-type="float" office:value="0.0725241295214239" calcext:value-type="float">
            <text:p>0.0725241295214239</text:p>
          </table:table-cell>
          <table:table-cell office:value-type="float" office:value="0.00725241295214239" calcext:value-type="float">
            <text:p>0.0072524129521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83688901873321" calcext:value-type="float">
            <text:p>-0.283688901873321</text:p>
          </table:table-cell>
          <table:table-cell office:value-type="float" office:value="0.103029493965913" calcext:value-type="float">
            <text:p>0.103029493965913</text:p>
          </table:table-cell>
          <table:table-cell office:value-type="float" office:value="0.0103029493965913" calcext:value-type="float">
            <text:p>0.0103029493965913</text:p>
          </table:table-cell>
          <table:table-cell office:value-type="float" office:value="0.283720411383773" calcext:value-type="float">
            <text:p>0.283720411383773</text:p>
          </table:table-cell>
          <table:table-cell office:value-type="float" office:value="0.102941814843875" calcext:value-type="float">
            <text:p>0.102941814843875</text:p>
          </table:table-cell>
          <table:table-cell office:value-type="float" office:value="0.0102941814843875" calcext:value-type="float">
            <text:p>0.01029418148438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529876742118039" calcext:value-type="float">
            <text:p>-0.529876742118039</text:p>
          </table:table-cell>
          <table:table-cell office:value-type="float" office:value="0.101214896582094" calcext:value-type="float">
            <text:p>0.101214896582094</text:p>
          </table:table-cell>
          <table:table-cell office:value-type="float" office:value="0.0101214896582094" calcext:value-type="float">
            <text:p>0.0101214896582094</text:p>
          </table:table-cell>
          <table:table-cell office:value-type="float" office:value="0.529876742118039" calcext:value-type="float">
            <text:p>0.529876742118039</text:p>
          </table:table-cell>
          <table:table-cell office:value-type="float" office:value="0.101214896582094" calcext:value-type="float">
            <text:p>0.101214896582094</text:p>
          </table:table-cell>
          <table:table-cell office:value-type="float" office:value="0.0101214896582094" calcext:value-type="float">
            <text:p>0.01012148965820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71459364998225" calcext:value-type="float">
            <text:p>-0.71459364998225</text:p>
          </table:table-cell>
          <table:table-cell office:value-type="float" office:value="0.1366517317609" calcext:value-type="float">
            <text:p>0.1366517317609</text:p>
          </table:table-cell>
          <table:table-cell office:value-type="float" office:value="0.01366517317609" calcext:value-type="float">
            <text:p>0.01366517317609</text:p>
          </table:table-cell>
          <table:table-cell office:value-type="float" office:value="0.71459364998225" calcext:value-type="float">
            <text:p>0.71459364998225</text:p>
          </table:table-cell>
          <table:table-cell office:value-type="float" office:value="0.1366517317609" calcext:value-type="float">
            <text:p>0.1366517317609</text:p>
          </table:table-cell>
          <table:table-cell office:value-type="float" office:value="0.01366517317609" calcext:value-type="float">
            <text:p>0.013665173176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98924103006893" calcext:value-type="float">
            <text:p>-0.298924103006893</text:p>
          </table:table-cell>
          <table:table-cell office:value-type="float" office:value="0.0799337668960842" calcext:value-type="float">
            <text:p>0.0799337668960842</text:p>
          </table:table-cell>
          <table:table-cell office:value-type="float" office:value="0.00799337668960842" calcext:value-type="float">
            <text:p>0.00799337668960842</text:p>
          </table:table-cell>
          <table:table-cell office:value-type="float" office:value="0.298924103006893" calcext:value-type="float">
            <text:p>0.298924103006893</text:p>
          </table:table-cell>
          <table:table-cell office:value-type="float" office:value="0.0799337668960842" calcext:value-type="float">
            <text:p>0.0799337668960842</text:p>
          </table:table-cell>
          <table:table-cell office:value-type="float" office:value="0.00799337668960842" calcext:value-type="float">
            <text:p>0.007993376689608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505687204241878" calcext:value-type="float">
            <text:p>-0.505687204241878</text:p>
          </table:table-cell>
          <table:table-cell office:value-type="float" office:value="0.0810311616458591" calcext:value-type="float">
            <text:p>0.0810311616458591</text:p>
          </table:table-cell>
          <table:table-cell office:value-type="float" office:value="0.00810311616458591" calcext:value-type="float">
            <text:p>0.00810311616458591</text:p>
          </table:table-cell>
          <table:table-cell office:value-type="float" office:value="0.505687204241878" calcext:value-type="float">
            <text:p>0.505687204241878</text:p>
          </table:table-cell>
          <table:table-cell office:value-type="float" office:value="0.0810311616458591" calcext:value-type="float">
            <text:p>0.0810311616458591</text:p>
          </table:table-cell>
          <table:table-cell office:value-type="float" office:value="0.00810311616458591" calcext:value-type="float">
            <text:p>0.008103116164585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704818282918151" calcext:value-type="float">
            <text:p>-0.704818282918151</text:p>
          </table:table-cell>
          <table:table-cell office:value-type="float" office:value="0.0831607813937832" calcext:value-type="float">
            <text:p>0.0831607813937832</text:p>
          </table:table-cell>
          <table:table-cell office:value-type="float" office:value="0.00831607813937832" calcext:value-type="float">
            <text:p>0.00831607813937832</text:p>
          </table:table-cell>
          <table:table-cell office:value-type="float" office:value="0.704818282918151" calcext:value-type="float">
            <text:p>0.704818282918151</text:p>
          </table:table-cell>
          <table:table-cell office:value-type="float" office:value="0.0831607813937832" calcext:value-type="float">
            <text:p>0.0831607813937832</text:p>
          </table:table-cell>
          <table:table-cell office:value-type="float" office:value="0.00831607813937832" calcext:value-type="float">
            <text:p>0.008316078139378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05331007013802" calcext:value-type="float">
            <text:p>-0.305331007013802</text:p>
          </table:table-cell>
          <table:table-cell office:value-type="float" office:value="0.0962600788015038" calcext:value-type="float">
            <text:p>0.0962600788015038</text:p>
          </table:table-cell>
          <table:table-cell office:value-type="float" office:value="0.00962600788015038" calcext:value-type="float">
            <text:p>0.00962600788015038</text:p>
          </table:table-cell>
          <table:table-cell office:value-type="float" office:value="0.305331007013802" calcext:value-type="float">
            <text:p>0.305331007013802</text:p>
          </table:table-cell>
          <table:table-cell office:value-type="float" office:value="0.0962600788015038" calcext:value-type="float">
            <text:p>0.0962600788015038</text:p>
          </table:table-cell>
          <table:table-cell office:value-type="float" office:value="0.00962600788015038" calcext:value-type="float">
            <text:p>0.009626007880150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524288749364327" calcext:value-type="float">
            <text:p>-0.524288749364327</text:p>
          </table:table-cell>
          <table:table-cell office:value-type="float" office:value="0.103847721656546" calcext:value-type="float">
            <text:p>0.103847721656546</text:p>
          </table:table-cell>
          <table:table-cell office:value-type="float" office:value="0.0103847721656546" calcext:value-type="float">
            <text:p>0.0103847721656546</text:p>
          </table:table-cell>
          <table:table-cell office:value-type="float" office:value="0.524288749364327" calcext:value-type="float">
            <text:p>0.524288749364327</text:p>
          </table:table-cell>
          <table:table-cell office:value-type="float" office:value="0.103847721656546" calcext:value-type="float">
            <text:p>0.103847721656546</text:p>
          </table:table-cell>
          <table:table-cell office:value-type="float" office:value="0.0103847721656546" calcext:value-type="float">
            <text:p>0.010384772165654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LMNET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724924543816984" calcext:value-type="float">
            <text:p>-0.724924543816984</text:p>
          </table:table-cell>
          <table:table-cell office:value-type="float" office:value="0.101783964818732" calcext:value-type="float">
            <text:p>0.101783964818732</text:p>
          </table:table-cell>
          <table:table-cell office:value-type="float" office:value="0.0101783964818732" calcext:value-type="float">
            <text:p>0.0101783964818732</text:p>
          </table:table-cell>
          <table:table-cell office:value-type="float" office:value="0.724924543816984" calcext:value-type="float">
            <text:p>0.724924543816984</text:p>
          </table:table-cell>
          <table:table-cell office:value-type="float" office:value="0.101783964818732" calcext:value-type="float">
            <text:p>0.101783964818732</text:p>
          </table:table-cell>
          <table:table-cell office:value-type="float" office:value="0.0101783964818732" calcext:value-type="float">
            <text:p>0.01017839648187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17738827790818" calcext:value-type="float">
            <text:p>-0.317738827790818</text:p>
          </table:table-cell>
          <table:table-cell office:value-type="float" office:value="0.0392791287939473" calcext:value-type="float">
            <text:p>0.0392791287939473</text:p>
          </table:table-cell>
          <table:table-cell office:value-type="float" office:value="0.00392791287939473" calcext:value-type="float">
            <text:p>0.00392791287939473</text:p>
          </table:table-cell>
          <table:table-cell office:value-type="float" office:value="0.317738827790818" calcext:value-type="float">
            <text:p>0.317738827790818</text:p>
          </table:table-cell>
          <table:table-cell office:value-type="float" office:value="0.0392791287939473" calcext:value-type="float">
            <text:p>0.0392791287939473</text:p>
          </table:table-cell>
          <table:table-cell office:value-type="float" office:value="0.00392791287939473" calcext:value-type="float">
            <text:p>0.0039279128793947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699246796636767" calcext:value-type="float">
            <text:p>-0.699246796636767</text:p>
          </table:table-cell>
          <table:table-cell office:value-type="float" office:value="0.0425042537630794" calcext:value-type="float">
            <text:p>0.0425042537630794</text:p>
          </table:table-cell>
          <table:table-cell office:value-type="float" office:value="0.00425042537630794" calcext:value-type="float">
            <text:p>0.00425042537630794</text:p>
          </table:table-cell>
          <table:table-cell office:value-type="float" office:value="0.699246796636767" calcext:value-type="float">
            <text:p>0.699246796636767</text:p>
          </table:table-cell>
          <table:table-cell office:value-type="float" office:value="0.0425042537630794" calcext:value-type="float">
            <text:p>0.0425042537630794</text:p>
          </table:table-cell>
          <table:table-cell office:value-type="float" office:value="0.00425042537630794" calcext:value-type="float">
            <text:p>0.004250425376307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.09308952931399" calcext:value-type="float">
            <text:p>-1.09308952931399</text:p>
          </table:table-cell>
          <table:table-cell office:value-type="float" office:value="0.0428947717395902" calcext:value-type="float">
            <text:p>0.0428947717395902</text:p>
          </table:table-cell>
          <table:table-cell office:value-type="float" office:value="0.00428947717395902" calcext:value-type="float">
            <text:p>0.00428947717395902</text:p>
          </table:table-cell>
          <table:table-cell office:value-type="float" office:value="1.09308952931399" calcext:value-type="float">
            <text:p>1.09308952931399</text:p>
          </table:table-cell>
          <table:table-cell office:value-type="float" office:value="0.0428947717395902" calcext:value-type="float">
            <text:p>0.0428947717395902</text:p>
          </table:table-cell>
          <table:table-cell office:value-type="float" office:value="0.00428947717395902" calcext:value-type="float">
            <text:p>0.004289477173959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311364565701042" calcext:value-type="float">
            <text:p>-0.311364565701042</text:p>
          </table:table-cell>
          <table:table-cell office:value-type="float" office:value="0.0441626320188979" calcext:value-type="float">
            <text:p>0.0441626320188979</text:p>
          </table:table-cell>
          <table:table-cell office:value-type="float" office:value="0.00441626320188979" calcext:value-type="float">
            <text:p>0.00441626320188979</text:p>
          </table:table-cell>
          <table:table-cell office:value-type="float" office:value="0.311364565701042" calcext:value-type="float">
            <text:p>0.311364565701042</text:p>
          </table:table-cell>
          <table:table-cell office:value-type="float" office:value="0.0441626320188979" calcext:value-type="float">
            <text:p>0.0441626320188979</text:p>
          </table:table-cell>
          <table:table-cell office:value-type="float" office:value="0.00441626320188979" calcext:value-type="float">
            <text:p>0.004416263201889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704938989066231" calcext:value-type="float">
            <text:p>-0.704938989066231</text:p>
          </table:table-cell>
          <table:table-cell office:value-type="float" office:value="0.03868628602105" calcext:value-type="float">
            <text:p>0.03868628602105</text:p>
          </table:table-cell>
          <table:table-cell office:value-type="float" office:value="0.003868628602105" calcext:value-type="float">
            <text:p>0.003868628602105</text:p>
          </table:table-cell>
          <table:table-cell office:value-type="float" office:value="0.704938989066231" calcext:value-type="float">
            <text:p>0.704938989066231</text:p>
          </table:table-cell>
          <table:table-cell office:value-type="float" office:value="0.03868628602105" calcext:value-type="float">
            <text:p>0.03868628602105</text:p>
          </table:table-cell>
          <table:table-cell office:value-type="float" office:value="0.003868628602105" calcext:value-type="float">
            <text:p>0.0038686286021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1.09147293255837" calcext:value-type="float">
            <text:p>-1.09147293255837</text:p>
          </table:table-cell>
          <table:table-cell office:value-type="float" office:value="0.0354185416581636" calcext:value-type="float">
            <text:p>0.0354185416581636</text:p>
          </table:table-cell>
          <table:table-cell office:value-type="float" office:value="0.00354185416581636" calcext:value-type="float">
            <text:p>0.00354185416581636</text:p>
          </table:table-cell>
          <table:table-cell office:value-type="float" office:value="1.09147293255837" calcext:value-type="float">
            <text:p>1.09147293255837</text:p>
          </table:table-cell>
          <table:table-cell office:value-type="float" office:value="0.0354185416581636" calcext:value-type="float">
            <text:p>0.0354185416581636</text:p>
          </table:table-cell>
          <table:table-cell office:value-type="float" office:value="0.00354185416581636" calcext:value-type="float">
            <text:p>0.003541854165816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311061723233124" calcext:value-type="float">
            <text:p>-0.311061723233124</text:p>
          </table:table-cell>
          <table:table-cell office:value-type="float" office:value="0.0416107252520094" calcext:value-type="float">
            <text:p>0.0416107252520094</text:p>
          </table:table-cell>
          <table:table-cell office:value-type="float" office:value="0.00416107252520094" calcext:value-type="float">
            <text:p>0.00416107252520094</text:p>
          </table:table-cell>
          <table:table-cell office:value-type="float" office:value="0.311061723233124" calcext:value-type="float">
            <text:p>0.311061723233124</text:p>
          </table:table-cell>
          <table:table-cell office:value-type="float" office:value="0.0416107252520094" calcext:value-type="float">
            <text:p>0.0416107252520094</text:p>
          </table:table-cell>
          <table:table-cell office:value-type="float" office:value="0.00416107252520094" calcext:value-type="float">
            <text:p>0.004161072525200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704236558774283" calcext:value-type="float">
            <text:p>-0.704236558774283</text:p>
          </table:table-cell>
          <table:table-cell office:value-type="float" office:value="0.0431753789519509" calcext:value-type="float">
            <text:p>0.0431753789519509</text:p>
          </table:table-cell>
          <table:table-cell office:value-type="float" office:value="0.00431753789519509" calcext:value-type="float">
            <text:p>0.00431753789519509</text:p>
          </table:table-cell>
          <table:table-cell office:value-type="float" office:value="0.704236558774283" calcext:value-type="float">
            <text:p>0.704236558774283</text:p>
          </table:table-cell>
          <table:table-cell office:value-type="float" office:value="0.0431753789519509" calcext:value-type="float">
            <text:p>0.0431753789519509</text:p>
          </table:table-cell>
          <table:table-cell office:value-type="float" office:value="0.00431753789519509" calcext:value-type="float">
            <text:p>0.0043175378951950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.09662969042242" calcext:value-type="float">
            <text:p>-1.09662969042242</text:p>
          </table:table-cell>
          <table:table-cell office:value-type="float" office:value="0.0450388078657597" calcext:value-type="float">
            <text:p>0.0450388078657597</text:p>
          </table:table-cell>
          <table:table-cell office:value-type="float" office:value="0.00450388078657597" calcext:value-type="float">
            <text:p>0.00450388078657597</text:p>
          </table:table-cell>
          <table:table-cell office:value-type="float" office:value="1.09662969042242" calcext:value-type="float">
            <text:p>1.09662969042242</text:p>
          </table:table-cell>
          <table:table-cell office:value-type="float" office:value="0.0450388078657597" calcext:value-type="float">
            <text:p>0.0450388078657597</text:p>
          </table:table-cell>
          <table:table-cell office:value-type="float" office:value="0.00450388078657597" calcext:value-type="float">
            <text:p>0.004503880786575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12454310673929" calcext:value-type="float">
            <text:p>-0.312454310673929</text:p>
          </table:table-cell>
          <table:table-cell office:value-type="float" office:value="0.0358941886688241" calcext:value-type="float">
            <text:p>0.0358941886688241</text:p>
          </table:table-cell>
          <table:table-cell office:value-type="float" office:value="0.00358941886688241" calcext:value-type="float">
            <text:p>0.00358941886688241</text:p>
          </table:table-cell>
          <table:table-cell office:value-type="float" office:value="0.312454310673929" calcext:value-type="float">
            <text:p>0.312454310673929</text:p>
          </table:table-cell>
          <table:table-cell office:value-type="float" office:value="0.0358941886688241" calcext:value-type="float">
            <text:p>0.0358941886688241</text:p>
          </table:table-cell>
          <table:table-cell office:value-type="float" office:value="0.00358941886688241" calcext:value-type="float">
            <text:p>0.00358941886688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700004789272716" calcext:value-type="float">
            <text:p>-0.700004789272716</text:p>
          </table:table-cell>
          <table:table-cell office:value-type="float" office:value="0.0458758533059526" calcext:value-type="float">
            <text:p>0.0458758533059526</text:p>
          </table:table-cell>
          <table:table-cell office:value-type="float" office:value="0.00458758533059526" calcext:value-type="float">
            <text:p>0.00458758533059526</text:p>
          </table:table-cell>
          <table:table-cell office:value-type="float" office:value="0.700004789272716" calcext:value-type="float">
            <text:p>0.700004789272716</text:p>
          </table:table-cell>
          <table:table-cell office:value-type="float" office:value="0.0458758533059526" calcext:value-type="float">
            <text:p>0.0458758533059526</text:p>
          </table:table-cell>
          <table:table-cell office:value-type="float" office:value="0.00458758533059526" calcext:value-type="float">
            <text:p>0.004587585330595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1.09681953358979" calcext:value-type="float">
            <text:p>-1.09681953358979</text:p>
          </table:table-cell>
          <table:table-cell office:value-type="float" office:value="0.0453171116308066" calcext:value-type="float">
            <text:p>0.0453171116308066</text:p>
          </table:table-cell>
          <table:table-cell office:value-type="float" office:value="0.00453171116308066" calcext:value-type="float">
            <text:p>0.00453171116308066</text:p>
          </table:table-cell>
          <table:table-cell office:value-type="float" office:value="1.09681953358979" calcext:value-type="float">
            <text:p>1.09681953358979</text:p>
          </table:table-cell>
          <table:table-cell office:value-type="float" office:value="0.0453171116308066" calcext:value-type="float">
            <text:p>0.0453171116308066</text:p>
          </table:table-cell>
          <table:table-cell office:value-type="float" office:value="0.00453171116308066" calcext:value-type="float">
            <text:p>0.0045317111630806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10233052314543" calcext:value-type="float">
            <text:p>-0.310233052314543</text:p>
          </table:table-cell>
          <table:table-cell office:value-type="float" office:value="0.0420098149753249" calcext:value-type="float">
            <text:p>0.0420098149753249</text:p>
          </table:table-cell>
          <table:table-cell office:value-type="float" office:value="0.00420098149753249" calcext:value-type="float">
            <text:p>0.00420098149753249</text:p>
          </table:table-cell>
          <table:table-cell office:value-type="float" office:value="0.310233052314543" calcext:value-type="float">
            <text:p>0.310233052314543</text:p>
          </table:table-cell>
          <table:table-cell office:value-type="float" office:value="0.0420098149753249" calcext:value-type="float">
            <text:p>0.0420098149753249</text:p>
          </table:table-cell>
          <table:table-cell office:value-type="float" office:value="0.00420098149753249" calcext:value-type="float">
            <text:p>0.004200981497532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713985427536918" calcext:value-type="float">
            <text:p>-0.713985427536918</text:p>
          </table:table-cell>
          <table:table-cell office:value-type="float" office:value="0.0419936993200715" calcext:value-type="float">
            <text:p>0.0419936993200715</text:p>
          </table:table-cell>
          <table:table-cell office:value-type="float" office:value="0.00419936993200715" calcext:value-type="float">
            <text:p>0.00419936993200715</text:p>
          </table:table-cell>
          <table:table-cell office:value-type="float" office:value="0.713985427536918" calcext:value-type="float">
            <text:p>0.713985427536918</text:p>
          </table:table-cell>
          <table:table-cell office:value-type="float" office:value="0.0419936993200715" calcext:value-type="float">
            <text:p>0.0419936993200715</text:p>
          </table:table-cell>
          <table:table-cell office:value-type="float" office:value="0.00419936993200715" calcext:value-type="float">
            <text:p>0.004199369932007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.1015851315776" calcext:value-type="float">
            <text:p>-1.1015851315776</text:p>
          </table:table-cell>
          <table:table-cell office:value-type="float" office:value="0.0424606784342464" calcext:value-type="float">
            <text:p>0.0424606784342464</text:p>
          </table:table-cell>
          <table:table-cell office:value-type="float" office:value="0.00424606784342464" calcext:value-type="float">
            <text:p>0.00424606784342464</text:p>
          </table:table-cell>
          <table:table-cell office:value-type="float" office:value="1.1015851315776" calcext:value-type="float">
            <text:p>1.1015851315776</text:p>
          </table:table-cell>
          <table:table-cell office:value-type="float" office:value="0.0424606784342464" calcext:value-type="float">
            <text:p>0.0424606784342464</text:p>
          </table:table-cell>
          <table:table-cell office:value-type="float" office:value="0.00424606784342464" calcext:value-type="float">
            <text:p>0.004246067843424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311445718980322" calcext:value-type="float">
            <text:p>-0.311445718980322</text:p>
          </table:table-cell>
          <table:table-cell office:value-type="float" office:value="0.0453642758952427" calcext:value-type="float">
            <text:p>0.0453642758952427</text:p>
          </table:table-cell>
          <table:table-cell office:value-type="float" office:value="0.00453642758952427" calcext:value-type="float">
            <text:p>0.00453642758952427</text:p>
          </table:table-cell>
          <table:table-cell office:value-type="float" office:value="0.311445718980322" calcext:value-type="float">
            <text:p>0.311445718980322</text:p>
          </table:table-cell>
          <table:table-cell office:value-type="float" office:value="0.0453642758952427" calcext:value-type="float">
            <text:p>0.0453642758952427</text:p>
          </table:table-cell>
          <table:table-cell office:value-type="float" office:value="0.00453642758952427" calcext:value-type="float">
            <text:p>0.0045364275895242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700818375440449" calcext:value-type="float">
            <text:p>-0.700818375440449</text:p>
          </table:table-cell>
          <table:table-cell office:value-type="float" office:value="0.0423631418063365" calcext:value-type="float">
            <text:p>0.0423631418063365</text:p>
          </table:table-cell>
          <table:table-cell office:value-type="float" office:value="0.00423631418063365" calcext:value-type="float">
            <text:p>0.00423631418063365</text:p>
          </table:table-cell>
          <table:table-cell office:value-type="float" office:value="0.700818375440449" calcext:value-type="float">
            <text:p>0.700818375440449</text:p>
          </table:table-cell>
          <table:table-cell office:value-type="float" office:value="0.0423631418063365" calcext:value-type="float">
            <text:p>0.0423631418063365</text:p>
          </table:table-cell>
          <table:table-cell office:value-type="float" office:value="0.00423631418063365" calcext:value-type="float">
            <text:p>0.004236314180633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1.09959426810745" calcext:value-type="float">
            <text:p>-1.09959426810745</text:p>
          </table:table-cell>
          <table:table-cell office:value-type="float" office:value="0.0322834180003554" calcext:value-type="float">
            <text:p>0.0322834180003554</text:p>
          </table:table-cell>
          <table:table-cell office:value-type="float" office:value="0.00322834180003554" calcext:value-type="float">
            <text:p>0.00322834180003554</text:p>
          </table:table-cell>
          <table:table-cell office:value-type="float" office:value="1.09959426810745" calcext:value-type="float">
            <text:p>1.09959426810745</text:p>
          </table:table-cell>
          <table:table-cell office:value-type="float" office:value="0.0322834180003554" calcext:value-type="float">
            <text:p>0.0322834180003554</text:p>
          </table:table-cell>
          <table:table-cell office:value-type="float" office:value="0.00322834180003554" calcext:value-type="float">
            <text:p>0.003228341800035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313407087138985" calcext:value-type="float">
            <text:p>-0.313407087138985</text:p>
          </table:table-cell>
          <table:table-cell office:value-type="float" office:value="0.0423507857035276" calcext:value-type="float">
            <text:p>0.0423507857035276</text:p>
          </table:table-cell>
          <table:table-cell office:value-type="float" office:value="0.00423507857035276" calcext:value-type="float">
            <text:p>0.00423507857035276</text:p>
          </table:table-cell>
          <table:table-cell office:value-type="float" office:value="0.313407087138985" calcext:value-type="float">
            <text:p>0.313407087138985</text:p>
          </table:table-cell>
          <table:table-cell office:value-type="float" office:value="0.0423507857035276" calcext:value-type="float">
            <text:p>0.0423507857035276</text:p>
          </table:table-cell>
          <table:table-cell office:value-type="float" office:value="0.00423507857035276" calcext:value-type="float">
            <text:p>0.004235078570352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700304639713322" calcext:value-type="float">
            <text:p>-0.700304639713322</text:p>
          </table:table-cell>
          <table:table-cell office:value-type="float" office:value="0.0426595884538875" calcext:value-type="float">
            <text:p>0.0426595884538875</text:p>
          </table:table-cell>
          <table:table-cell office:value-type="float" office:value="0.00426595884538875" calcext:value-type="float">
            <text:p>0.00426595884538875</text:p>
          </table:table-cell>
          <table:table-cell office:value-type="float" office:value="0.700304639713322" calcext:value-type="float">
            <text:p>0.700304639713322</text:p>
          </table:table-cell>
          <table:table-cell office:value-type="float" office:value="0.0426595884538875" calcext:value-type="float">
            <text:p>0.0426595884538875</text:p>
          </table:table-cell>
          <table:table-cell office:value-type="float" office:value="0.00426595884538875" calcext:value-type="float">
            <text:p>0.004265958845388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.09193419347575" calcext:value-type="float">
            <text:p>-1.09193419347575</text:p>
          </table:table-cell>
          <table:table-cell office:value-type="float" office:value="0.0364466335705827" calcext:value-type="float">
            <text:p>0.0364466335705827</text:p>
          </table:table-cell>
          <table:table-cell office:value-type="float" office:value="0.00364466335705827" calcext:value-type="float">
            <text:p>0.00364466335705827</text:p>
          </table:table-cell>
          <table:table-cell office:value-type="float" office:value="1.09193419347575" calcext:value-type="float">
            <text:p>1.09193419347575</text:p>
          </table:table-cell>
          <table:table-cell office:value-type="float" office:value="0.0364466335705827" calcext:value-type="float">
            <text:p>0.0364466335705827</text:p>
          </table:table-cell>
          <table:table-cell office:value-type="float" office:value="0.00364466335705827" calcext:value-type="float">
            <text:p>0.0036446633570582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13010717490106" calcext:value-type="float">
            <text:p>-0.313010717490106</text:p>
          </table:table-cell>
          <table:table-cell office:value-type="float" office:value="0.0424753391879984" calcext:value-type="float">
            <text:p>0.0424753391879984</text:p>
          </table:table-cell>
          <table:table-cell office:value-type="float" office:value="0.00424753391879984" calcext:value-type="float">
            <text:p>0.00424753391879984</text:p>
          </table:table-cell>
          <table:table-cell office:value-type="float" office:value="0.313010717490106" calcext:value-type="float">
            <text:p>0.313010717490106</text:p>
          </table:table-cell>
          <table:table-cell office:value-type="float" office:value="0.0424753391879984" calcext:value-type="float">
            <text:p>0.0424753391879984</text:p>
          </table:table-cell>
          <table:table-cell office:value-type="float" office:value="0.00424753391879984" calcext:value-type="float">
            <text:p>0.004247533918799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699391989461874" calcext:value-type="float">
            <text:p>-0.699391989461874</text:p>
          </table:table-cell>
          <table:table-cell office:value-type="float" office:value="0.0449636954951655" calcext:value-type="float">
            <text:p>0.0449636954951655</text:p>
          </table:table-cell>
          <table:table-cell office:value-type="float" office:value="0.00449636954951655" calcext:value-type="float">
            <text:p>0.00449636954951655</text:p>
          </table:table-cell>
          <table:table-cell office:value-type="float" office:value="0.699391989461874" calcext:value-type="float">
            <text:p>0.699391989461874</text:p>
          </table:table-cell>
          <table:table-cell office:value-type="float" office:value="0.0449636954951655" calcext:value-type="float">
            <text:p>0.0449636954951655</text:p>
          </table:table-cell>
          <table:table-cell office:value-type="float" office:value="0.00449636954951655" calcext:value-type="float">
            <text:p>0.004496369549516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1.08978816845651" calcext:value-type="float">
            <text:p>-1.08978816845651</text:p>
          </table:table-cell>
          <table:table-cell office:value-type="float" office:value="0.0411822539212321" calcext:value-type="float">
            <text:p>0.0411822539212321</text:p>
          </table:table-cell>
          <table:table-cell office:value-type="float" office:value="0.00411822539212321" calcext:value-type="float">
            <text:p>0.00411822539212321</text:p>
          </table:table-cell>
          <table:table-cell office:value-type="float" office:value="1.08978816845651" calcext:value-type="float">
            <text:p>1.08978816845651</text:p>
          </table:table-cell>
          <table:table-cell office:value-type="float" office:value="0.0411822539212321" calcext:value-type="float">
            <text:p>0.0411822539212321</text:p>
          </table:table-cell>
          <table:table-cell office:value-type="float" office:value="0.00411822539212321" calcext:value-type="float">
            <text:p>0.0041182253921232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310449241676988" calcext:value-type="float">
            <text:p>-0.310449241676988</text:p>
          </table:table-cell>
          <table:table-cell office:value-type="float" office:value="0.0406978560220401" calcext:value-type="float">
            <text:p>0.0406978560220401</text:p>
          </table:table-cell>
          <table:table-cell office:value-type="float" office:value="0.00406978560220401" calcext:value-type="float">
            <text:p>0.00406978560220401</text:p>
          </table:table-cell>
          <table:table-cell office:value-type="float" office:value="0.310449241676988" calcext:value-type="float">
            <text:p>0.310449241676988</text:p>
          </table:table-cell>
          <table:table-cell office:value-type="float" office:value="0.0406978560220401" calcext:value-type="float">
            <text:p>0.0406978560220401</text:p>
          </table:table-cell>
          <table:table-cell office:value-type="float" office:value="0.00406978560220401" calcext:value-type="float">
            <text:p>0.0040697856022040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703881929608688" calcext:value-type="float">
            <text:p>-0.703881929608688</text:p>
          </table:table-cell>
          <table:table-cell office:value-type="float" office:value="0.0437636898084586" calcext:value-type="float">
            <text:p>0.0437636898084586</text:p>
          </table:table-cell>
          <table:table-cell office:value-type="float" office:value="0.00437636898084586" calcext:value-type="float">
            <text:p>0.00437636898084586</text:p>
          </table:table-cell>
          <table:table-cell office:value-type="float" office:value="0.703881929608688" calcext:value-type="float">
            <text:p>0.703881929608688</text:p>
          </table:table-cell>
          <table:table-cell office:value-type="float" office:value="0.0437636898084586" calcext:value-type="float">
            <text:p>0.0437636898084586</text:p>
          </table:table-cell>
          <table:table-cell office:value-type="float" office:value="0.00437636898084586" calcext:value-type="float">
            <text:p>0.004376368980845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.09648266996546" calcext:value-type="float">
            <text:p>-1.09648266996546</text:p>
          </table:table-cell>
          <table:table-cell office:value-type="float" office:value="0.0429253214885153" calcext:value-type="float">
            <text:p>0.0429253214885153</text:p>
          </table:table-cell>
          <table:table-cell office:value-type="float" office:value="0.00429253214885153" calcext:value-type="float">
            <text:p>0.00429253214885153</text:p>
          </table:table-cell>
          <table:table-cell office:value-type="float" office:value="1.09648266996546" calcext:value-type="float">
            <text:p>1.09648266996546</text:p>
          </table:table-cell>
          <table:table-cell office:value-type="float" office:value="0.0429253214885153" calcext:value-type="float">
            <text:p>0.0429253214885153</text:p>
          </table:table-cell>
          <table:table-cell office:value-type="float" office:value="0.00429253214885153" calcext:value-type="float">
            <text:p>0.0042925321488515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314714137342526" calcext:value-type="float">
            <text:p>-0.314714137342526</text:p>
          </table:table-cell>
          <table:table-cell office:value-type="float" office:value="0.0442823975426951" calcext:value-type="float">
            <text:p>0.0442823975426951</text:p>
          </table:table-cell>
          <table:table-cell office:value-type="float" office:value="0.00442823975426951" calcext:value-type="float">
            <text:p>0.00442823975426951</text:p>
          </table:table-cell>
          <table:table-cell office:value-type="float" office:value="0.314714137342526" calcext:value-type="float">
            <text:p>0.314714137342526</text:p>
          </table:table-cell>
          <table:table-cell office:value-type="float" office:value="0.0442823975426951" calcext:value-type="float">
            <text:p>0.0442823975426951</text:p>
          </table:table-cell>
          <table:table-cell office:value-type="float" office:value="0.00442823975426951" calcext:value-type="float">
            <text:p>0.0044282397542695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709695084720515" calcext:value-type="float">
            <text:p>-0.709695084720515</text:p>
          </table:table-cell>
          <table:table-cell office:value-type="float" office:value="0.0421665587454739" calcext:value-type="float">
            <text:p>0.0421665587454739</text:p>
          </table:table-cell>
          <table:table-cell office:value-type="float" office:value="0.00421665587454739" calcext:value-type="float">
            <text:p>0.00421665587454739</text:p>
          </table:table-cell>
          <table:table-cell office:value-type="float" office:value="0.709695084720515" calcext:value-type="float">
            <text:p>0.709695084720515</text:p>
          </table:table-cell>
          <table:table-cell office:value-type="float" office:value="0.0421665587454739" calcext:value-type="float">
            <text:p>0.0421665587454739</text:p>
          </table:table-cell>
          <table:table-cell office:value-type="float" office:value="0.00421665587454739" calcext:value-type="float">
            <text:p>0.004216655874547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1.10210026313917" calcext:value-type="float">
            <text:p>-1.10210026313917</text:p>
          </table:table-cell>
          <table:table-cell office:value-type="float" office:value="0.0448756393413189" calcext:value-type="float">
            <text:p>0.0448756393413189</text:p>
          </table:table-cell>
          <table:table-cell office:value-type="float" office:value="0.00448756393413189" calcext:value-type="float">
            <text:p>0.00448756393413189</text:p>
          </table:table-cell>
          <table:table-cell office:value-type="float" office:value="1.10210026313917" calcext:value-type="float">
            <text:p>1.10210026313917</text:p>
          </table:table-cell>
          <table:table-cell office:value-type="float" office:value="0.0448756393413189" calcext:value-type="float">
            <text:p>0.0448756393413189</text:p>
          </table:table-cell>
          <table:table-cell office:value-type="float" office:value="0.00448756393413189" calcext:value-type="float">
            <text:p>0.004487563934131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318003283928629" calcext:value-type="float">
            <text:p>-0.318003283928629</text:p>
          </table:table-cell>
          <table:table-cell office:value-type="float" office:value="0.0404228066385759" calcext:value-type="float">
            <text:p>0.0404228066385759</text:p>
          </table:table-cell>
          <table:table-cell office:value-type="float" office:value="0.00404228066385759" calcext:value-type="float">
            <text:p>0.00404228066385759</text:p>
          </table:table-cell>
          <table:table-cell office:value-type="float" office:value="0.318003283928629" calcext:value-type="float">
            <text:p>0.318003283928629</text:p>
          </table:table-cell>
          <table:table-cell office:value-type="float" office:value="0.0404228066385759" calcext:value-type="float">
            <text:p>0.0404228066385759</text:p>
          </table:table-cell>
          <table:table-cell office:value-type="float" office:value="0.00404228066385759" calcext:value-type="float">
            <text:p>0.004042280663857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708293958748163" calcext:value-type="float">
            <text:p>-0.708293958748163</text:p>
          </table:table-cell>
          <table:table-cell office:value-type="float" office:value="0.0436312617447925" calcext:value-type="float">
            <text:p>0.0436312617447925</text:p>
          </table:table-cell>
          <table:table-cell office:value-type="float" office:value="0.00436312617447925" calcext:value-type="float">
            <text:p>0.00436312617447925</text:p>
          </table:table-cell>
          <table:table-cell office:value-type="float" office:value="0.708293958748163" calcext:value-type="float">
            <text:p>0.708293958748163</text:p>
          </table:table-cell>
          <table:table-cell office:value-type="float" office:value="0.0436312617447925" calcext:value-type="float">
            <text:p>0.0436312617447925</text:p>
          </table:table-cell>
          <table:table-cell office:value-type="float" office:value="0.00436312617447925" calcext:value-type="float">
            <text:p>0.0043631261744792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.09852601127259" calcext:value-type="float">
            <text:p>-1.09852601127259</text:p>
          </table:table-cell>
          <table:table-cell office:value-type="float" office:value="0.0470327963442289" calcext:value-type="float">
            <text:p>0.0470327963442289</text:p>
          </table:table-cell>
          <table:table-cell office:value-type="float" office:value="0.00470327963442289" calcext:value-type="float">
            <text:p>0.00470327963442289</text:p>
          </table:table-cell>
          <table:table-cell office:value-type="float" office:value="1.09852601127259" calcext:value-type="float">
            <text:p>1.09852601127259</text:p>
          </table:table-cell>
          <table:table-cell office:value-type="float" office:value="0.0470327963442289" calcext:value-type="float">
            <text:p>0.0470327963442289</text:p>
          </table:table-cell>
          <table:table-cell office:value-type="float" office:value="0.00470327963442289" calcext:value-type="float">
            <text:p>0.004703279634422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319200578003365" calcext:value-type="float">
            <text:p>-0.319200578003365</text:p>
          </table:table-cell>
          <table:table-cell office:value-type="float" office:value="0.0408594771006148" calcext:value-type="float">
            <text:p>0.0408594771006148</text:p>
          </table:table-cell>
          <table:table-cell office:value-type="float" office:value="0.00408594771006148" calcext:value-type="float">
            <text:p>0.00408594771006148</text:p>
          </table:table-cell>
          <table:table-cell office:value-type="float" office:value="0.319200578003365" calcext:value-type="float">
            <text:p>0.319200578003365</text:p>
          </table:table-cell>
          <table:table-cell office:value-type="float" office:value="0.0408594771006148" calcext:value-type="float">
            <text:p>0.0408594771006148</text:p>
          </table:table-cell>
          <table:table-cell office:value-type="float" office:value="0.00408594771006148" calcext:value-type="float">
            <text:p>0.004085947710061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702623797448614" calcext:value-type="float">
            <text:p>-0.702623797448614</text:p>
          </table:table-cell>
          <table:table-cell office:value-type="float" office:value="0.041133992746485" calcext:value-type="float">
            <text:p>0.041133992746485</text:p>
          </table:table-cell>
          <table:table-cell office:value-type="float" office:value="0.0041133992746485" calcext:value-type="float">
            <text:p>0.0041133992746485</text:p>
          </table:table-cell>
          <table:table-cell office:value-type="float" office:value="0.702623797448614" calcext:value-type="float">
            <text:p>0.702623797448614</text:p>
          </table:table-cell>
          <table:table-cell office:value-type="float" office:value="0.041133992746485" calcext:value-type="float">
            <text:p>0.041133992746485</text:p>
          </table:table-cell>
          <table:table-cell office:value-type="float" office:value="0.0041133992746485" calcext:value-type="float">
            <text:p>0.00411339927464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1.10545725000149" calcext:value-type="float">
            <text:p>-1.10545725000149</text:p>
          </table:table-cell>
          <table:table-cell office:value-type="float" office:value="0.0489676931773596" calcext:value-type="float">
            <text:p>0.0489676931773596</text:p>
          </table:table-cell>
          <table:table-cell office:value-type="float" office:value="0.00489676931773596" calcext:value-type="float">
            <text:p>0.00489676931773596</text:p>
          </table:table-cell>
          <table:table-cell office:value-type="float" office:value="1.10545725000149" calcext:value-type="float">
            <text:p>1.10545725000149</text:p>
          </table:table-cell>
          <table:table-cell office:value-type="float" office:value="0.0489676931773596" calcext:value-type="float">
            <text:p>0.0489676931773596</text:p>
          </table:table-cell>
          <table:table-cell office:value-type="float" office:value="0.00489676931773596" calcext:value-type="float">
            <text:p>0.004896769317735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29767307975037" calcext:value-type="float">
            <text:p>0.129767307975037</text:p>
          </table:table-cell>
          <table:table-cell office:value-type="float" office:value="0.313340410889735" calcext:value-type="float">
            <text:p>0.313340410889735</text:p>
          </table:table-cell>
          <table:table-cell office:value-type="float" office:value="0.0313340410889735" calcext:value-type="float">
            <text:p>0.0313340410889735</text:p>
          </table:table-cell>
          <table:table-cell office:value-type="float" office:value="0.264220769188286" calcext:value-type="float">
            <text:p>0.264220769188286</text:p>
          </table:table-cell>
          <table:table-cell office:value-type="float" office:value="0.211362416300689" calcext:value-type="float">
            <text:p>0.211362416300689</text:p>
          </table:table-cell>
          <table:table-cell office:value-type="float" office:value="0.0211362416300689" calcext:value-type="float">
            <text:p>0.02113624163006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28715110673309" calcext:value-type="float">
            <text:p>0.228715110673309</text:p>
          </table:table-cell>
          <table:table-cell office:value-type="float" office:value="0.306985144015959" calcext:value-type="float">
            <text:p>0.306985144015959</text:p>
          </table:table-cell>
          <table:table-cell office:value-type="float" office:value="0.0306985144015959" calcext:value-type="float">
            <text:p>0.0306985144015959</text:p>
          </table:table-cell>
          <table:table-cell office:value-type="float" office:value="0.298539307256473" calcext:value-type="float">
            <text:p>0.298539307256473</text:p>
          </table:table-cell>
          <table:table-cell office:value-type="float" office:value="0.238857473527125" calcext:value-type="float">
            <text:p>0.238857473527125</text:p>
          </table:table-cell>
          <table:table-cell office:value-type="float" office:value="0.0238857473527125" calcext:value-type="float">
            <text:p>0.023885747352712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24849556067335" calcext:value-type="float">
            <text:p>0.24849556067335</text:p>
          </table:table-cell>
          <table:table-cell office:value-type="float" office:value="0.2978106133445" calcext:value-type="float">
            <text:p>0.2978106133445</text:p>
          </table:table-cell>
          <table:table-cell office:value-type="float" office:value="0.02978106133445" calcext:value-type="float">
            <text:p>0.02978106133445</text:p>
          </table:table-cell>
          <table:table-cell office:value-type="float" office:value="0.304348715034015" calcext:value-type="float">
            <text:p>0.304348715034015</text:p>
          </table:table-cell>
          <table:table-cell office:value-type="float" office:value="0.239794004899591" calcext:value-type="float">
            <text:p>0.239794004899591</text:p>
          </table:table-cell>
          <table:table-cell office:value-type="float" office:value="0.0239794004899591" calcext:value-type="float">
            <text:p>0.02397940048995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31718013095138" calcext:value-type="float">
            <text:p>0.231718013095138</text:p>
          </table:table-cell>
          <table:table-cell office:value-type="float" office:value="0.489941280589138" calcext:value-type="float">
            <text:p>0.489941280589138</text:p>
          </table:table-cell>
          <table:table-cell office:value-type="float" office:value="0.0489941280589138" calcext:value-type="float">
            <text:p>0.0489941280589138</text:p>
          </table:table-cell>
          <table:table-cell office:value-type="float" office:value="0.414120812389019" calcext:value-type="float">
            <text:p>0.414120812389019</text:p>
          </table:table-cell>
          <table:table-cell office:value-type="float" office:value="0.347922004756855" calcext:value-type="float">
            <text:p>0.347922004756855</text:p>
          </table:table-cell>
          <table:table-cell office:value-type="float" office:value="0.0347922004756855" calcext:value-type="float">
            <text:p>0.034792200475685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83482318931862" calcext:value-type="float">
            <text:p>0.283482318931862</text:p>
          </table:table-cell>
          <table:table-cell office:value-type="float" office:value="0.808309931262492" calcext:value-type="float">
            <text:p>0.808309931262492</text:p>
          </table:table-cell>
          <table:table-cell office:value-type="float" office:value="0.0808309931262492" calcext:value-type="float">
            <text:p>0.0808309931262492</text:p>
          </table:table-cell>
          <table:table-cell office:value-type="float" office:value="0.441600742362052" calcext:value-type="float">
            <text:p>0.441600742362052</text:p>
          </table:table-cell>
          <table:table-cell office:value-type="float" office:value="0.733183390331953" calcext:value-type="float">
            <text:p>0.733183390331953</text:p>
          </table:table-cell>
          <table:table-cell office:value-type="float" office:value="0.0733183390331953" calcext:value-type="float">
            <text:p>0.073318339033195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67038378395274" calcext:value-type="float">
            <text:p>0.167038378395274</text:p>
          </table:table-cell>
          <table:table-cell office:value-type="float" office:value="1.07206829072325" calcext:value-type="float">
            <text:p>1.07206829072325</text:p>
          </table:table-cell>
          <table:table-cell office:value-type="float" office:value="0.107206829072325" calcext:value-type="float">
            <text:p>0.107206829072325</text:p>
          </table:table-cell>
          <table:table-cell office:value-type="float" office:value="0.480940863104524" calcext:value-type="float">
            <text:p>0.480940863104524</text:p>
          </table:table-cell>
          <table:table-cell office:value-type="float" office:value="0.971531552447859" calcext:value-type="float">
            <text:p>0.971531552447859</text:p>
          </table:table-cell>
          <table:table-cell office:value-type="float" office:value="0.0971531552447859" calcext:value-type="float">
            <text:p>0.09715315524478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0459462669448588" calcext:value-type="float">
            <text:p>0.0459462669448588</text:p>
          </table:table-cell>
          <table:table-cell office:value-type="float" office:value="0.215000832182086" calcext:value-type="float">
            <text:p>0.215000832182086</text:p>
          </table:table-cell>
          <table:table-cell office:value-type="float" office:value="0.0215000832182086" calcext:value-type="float">
            <text:p>0.0215000832182086</text:p>
          </table:table-cell>
          <table:table-cell office:value-type="float" office:value="0.163624974429067" calcext:value-type="float">
            <text:p>0.163624974429067</text:p>
          </table:table-cell>
          <table:table-cell office:value-type="float" office:value="0.145993743638799" calcext:value-type="float">
            <text:p>0.145993743638799</text:p>
          </table:table-cell>
          <table:table-cell office:value-type="float" office:value="0.0145993743638799" calcext:value-type="float">
            <text:p>0.01459937436387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069925845708768" calcext:value-type="float">
            <text:p>0.069925845708768</text:p>
          </table:table-cell>
          <table:table-cell office:value-type="float" office:value="0.28285021400448" calcext:value-type="float">
            <text:p>0.28285021400448</text:p>
          </table:table-cell>
          <table:table-cell office:value-type="float" office:value="0.028285021400448" calcext:value-type="float">
            <text:p>0.028285021400448</text:p>
          </table:table-cell>
          <table:table-cell office:value-type="float" office:value="0.215931228726453" calcext:value-type="float">
            <text:p>0.215931228726453</text:p>
          </table:table-cell>
          <table:table-cell office:value-type="float" office:value="0.194540456921743" calcext:value-type="float">
            <text:p>0.194540456921743</text:p>
          </table:table-cell>
          <table:table-cell office:value-type="float" office:value="0.0194540456921743" calcext:value-type="float">
            <text:p>0.01945404569217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129070709298769" calcext:value-type="float">
            <text:p>0.129070709298769</text:p>
          </table:table-cell>
          <table:table-cell office:value-type="float" office:value="0.295283125026342" calcext:value-type="float">
            <text:p>0.295283125026342</text:p>
          </table:table-cell>
          <table:table-cell office:value-type="float" office:value="0.0295283125026342" calcext:value-type="float">
            <text:p>0.0295283125026342</text:p>
          </table:table-cell>
          <table:table-cell office:value-type="float" office:value="0.248022711819341" calcext:value-type="float">
            <text:p>0.248022711819341</text:p>
          </table:table-cell>
          <table:table-cell office:value-type="float" office:value="0.204653402755316" calcext:value-type="float">
            <text:p>0.204653402755316</text:p>
          </table:table-cell>
          <table:table-cell office:value-type="float" office:value="0.0204653402755316" calcext:value-type="float">
            <text:p>0.02046534027553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73130118942667" calcext:value-type="float">
            <text:p>0.173130118942667</text:p>
          </table:table-cell>
          <table:table-cell office:value-type="float" office:value="0.360734041210908" calcext:value-type="float">
            <text:p>0.360734041210908</text:p>
          </table:table-cell>
          <table:table-cell office:value-type="float" office:value="0.0360734041210908" calcext:value-type="float">
            <text:p>0.0360734041210908</text:p>
          </table:table-cell>
          <table:table-cell office:value-type="float" office:value="0.320207000241691" calcext:value-type="float">
            <text:p>0.320207000241691</text:p>
          </table:table-cell>
          <table:table-cell office:value-type="float" office:value="0.238406479737014" calcext:value-type="float">
            <text:p>0.238406479737014</text:p>
          </table:table-cell>
          <table:table-cell office:value-type="float" office:value="0.0238406479737014" calcext:value-type="float">
            <text:p>0.02384064797370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59381032772597" calcext:value-type="float">
            <text:p>0.259381032772597</text:p>
          </table:table-cell>
          <table:table-cell office:value-type="float" office:value="0.36443075069067" calcext:value-type="float">
            <text:p>0.36443075069067</text:p>
          </table:table-cell>
          <table:table-cell office:value-type="float" office:value="0.036443075069067" calcext:value-type="float">
            <text:p>0.036443075069067</text:p>
          </table:table-cell>
          <table:table-cell office:value-type="float" office:value="0.338499976059144" calcext:value-type="float">
            <text:p>0.338499976059144</text:p>
          </table:table-cell>
          <table:table-cell office:value-type="float" office:value="0.291596027287604" calcext:value-type="float">
            <text:p>0.291596027287604</text:p>
          </table:table-cell>
          <table:table-cell office:value-type="float" office:value="0.0291596027287604" calcext:value-type="float">
            <text:p>0.02915960272876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240123505429025" calcext:value-type="float">
            <text:p>0.240123505429025</text:p>
          </table:table-cell>
          <table:table-cell office:value-type="float" office:value="0.500734625075235" calcext:value-type="float">
            <text:p>0.500734625075235</text:p>
          </table:table-cell>
          <table:table-cell office:value-type="float" office:value="0.0500734625075235" calcext:value-type="float">
            <text:p>0.0500734625075235</text:p>
          </table:table-cell>
          <table:table-cell office:value-type="float" office:value="0.349555834453459" calcext:value-type="float">
            <text:p>0.349555834453459</text:p>
          </table:table-cell>
          <table:table-cell office:value-type="float" office:value="0.430759054684565" calcext:value-type="float">
            <text:p>0.430759054684565</text:p>
          </table:table-cell>
          <table:table-cell office:value-type="float" office:value="0.0430759054684565" calcext:value-type="float">
            <text:p>0.043075905468456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0023725698916" calcext:value-type="float">
            <text:p>0.10023725698916</text:p>
          </table:table-cell>
          <table:table-cell office:value-type="float" office:value="0.286192888979398" calcext:value-type="float">
            <text:p>0.286192888979398</text:p>
          </table:table-cell>
          <table:table-cell office:value-type="float" office:value="0.0286192888979398" calcext:value-type="float">
            <text:p>0.0286192888979398</text:p>
          </table:table-cell>
          <table:table-cell office:value-type="float" office:value="0.238985090082861" calcext:value-type="float">
            <text:p>0.238985090082861</text:p>
          </table:table-cell>
          <table:table-cell office:value-type="float" office:value="0.185376876321985" calcext:value-type="float">
            <text:p>0.185376876321985</text:p>
          </table:table-cell>
          <table:table-cell office:value-type="float" office:value="0.0185376876321985" calcext:value-type="float">
            <text:p>0.01853768763219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71653377689797" calcext:value-type="float">
            <text:p>0.171653377689797</text:p>
          </table:table-cell>
          <table:table-cell office:value-type="float" office:value="0.321470195808674" calcext:value-type="float">
            <text:p>0.321470195808674</text:p>
          </table:table-cell>
          <table:table-cell office:value-type="float" office:value="0.0321470195808674" calcext:value-type="float">
            <text:p>0.0321470195808674</text:p>
          </table:table-cell>
          <table:table-cell office:value-type="float" office:value="0.295604357554314" calcext:value-type="float">
            <text:p>0.295604357554314</text:p>
          </table:table-cell>
          <table:table-cell office:value-type="float" office:value="0.211756964257775" calcext:value-type="float">
            <text:p>0.211756964257775</text:p>
          </table:table-cell>
          <table:table-cell office:value-type="float" office:value="0.0211756964257775" calcext:value-type="float">
            <text:p>0.02117569642577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27395406588796" calcext:value-type="float">
            <text:p>0.127395406588796</text:p>
          </table:table-cell>
          <table:table-cell office:value-type="float" office:value="0.306874568266219" calcext:value-type="float">
            <text:p>0.306874568266219</text:p>
          </table:table-cell>
          <table:table-cell office:value-type="float" office:value="0.0306874568266219" calcext:value-type="float">
            <text:p>0.0306874568266219</text:p>
          </table:table-cell>
          <table:table-cell office:value-type="float" office:value="0.269427805793739" calcext:value-type="float">
            <text:p>0.269427805793739</text:p>
          </table:table-cell>
          <table:table-cell office:value-type="float" office:value="0.192979110522798" calcext:value-type="float">
            <text:p>0.192979110522798</text:p>
          </table:table-cell>
          <table:table-cell office:value-type="float" office:value="0.0192979110522798" calcext:value-type="float">
            <text:p>0.01929791105227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9700864012597" calcext:value-type="float">
            <text:p>0.29700864012597</text:p>
          </table:table-cell>
          <table:table-cell office:value-type="float" office:value="0.501974346842637" calcext:value-type="float">
            <text:p>0.501974346842637</text:p>
          </table:table-cell>
          <table:table-cell office:value-type="float" office:value="0.0501974346842637" calcext:value-type="float">
            <text:p>0.0501974346842637</text:p>
          </table:table-cell>
          <table:table-cell office:value-type="float" office:value="0.392252481788806" calcext:value-type="float">
            <text:p>0.392252481788806</text:p>
          </table:table-cell>
          <table:table-cell office:value-type="float" office:value="0.4308912366918" calcext:value-type="float">
            <text:p>0.4308912366918</text:p>
          </table:table-cell>
          <table:table-cell office:value-type="float" office:value="0.04308912366918" calcext:value-type="float">
            <text:p>0.0430891236691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50635638263661" calcext:value-type="float">
            <text:p>0.250635638263661</text:p>
          </table:table-cell>
          <table:table-cell office:value-type="float" office:value="1.1423717126974" calcext:value-type="float">
            <text:p>1.1423717126974</text:p>
          </table:table-cell>
          <table:table-cell office:value-type="float" office:value="0.11423717126974" calcext:value-type="float">
            <text:p>0.11423717126974</text:p>
          </table:table-cell>
          <table:table-cell office:value-type="float" office:value="0.531828711763871" calcext:value-type="float">
            <text:p>0.531828711763871</text:p>
          </table:table-cell>
          <table:table-cell office:value-type="float" office:value="1.04056096136947" calcext:value-type="float">
            <text:p>1.04056096136947</text:p>
          </table:table-cell>
          <table:table-cell office:value-type="float" office:value="0.104056096136947" calcext:value-type="float">
            <text:p>0.1040560961369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46677932328917" calcext:value-type="float">
            <text:p>0.146677932328917</text:p>
          </table:table-cell>
          <table:table-cell office:value-type="float" office:value="0.50983451826632" calcext:value-type="float">
            <text:p>0.50983451826632</text:p>
          </table:table-cell>
          <table:table-cell office:value-type="float" office:value="0.050983451826632" calcext:value-type="float">
            <text:p>0.050983451826632</text:p>
          </table:table-cell>
          <table:table-cell office:value-type="float" office:value="0.396087803542503" calcext:value-type="float">
            <text:p>0.396087803542503</text:p>
          </table:table-cell>
          <table:table-cell office:value-type="float" office:value="0.350988202876447" calcext:value-type="float">
            <text:p>0.350988202876447</text:p>
          </table:table-cell>
          <table:table-cell office:value-type="float" office:value="0.0350988202876447" calcext:value-type="float">
            <text:p>0.03509882028764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247305673097978" calcext:value-type="float">
            <text:p>-0.0247305673097978</text:p>
          </table:table-cell>
          <table:table-cell office:value-type="float" office:value="0.195579620191864" calcext:value-type="float">
            <text:p>0.195579620191864</text:p>
          </table:table-cell>
          <table:table-cell office:value-type="float" office:value="0.0195579620191864" calcext:value-type="float">
            <text:p>0.0195579620191864</text:p>
          </table:table-cell>
          <table:table-cell office:value-type="float" office:value="0.147198659458393" calcext:value-type="float">
            <text:p>0.147198659458393</text:p>
          </table:table-cell>
          <table:table-cell office:value-type="float" office:value="0.130318295533179" calcext:value-type="float">
            <text:p>0.130318295533179</text:p>
          </table:table-cell>
          <table:table-cell office:value-type="float" office:value="0.0130318295533179" calcext:value-type="float">
            <text:p>0.01303182955331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17892977324089" calcext:value-type="float">
            <text:p>-0.017892977324089</text:p>
          </table:table-cell>
          <table:table-cell office:value-type="float" office:value="0.250820051889063" calcext:value-type="float">
            <text:p>0.250820051889063</text:p>
          </table:table-cell>
          <table:table-cell office:value-type="float" office:value="0.0250820051889063" calcext:value-type="float">
            <text:p>0.0250820051889063</text:p>
          </table:table-cell>
          <table:table-cell office:value-type="float" office:value="0.185752704007414" calcext:value-type="float">
            <text:p>0.185752704007414</text:p>
          </table:table-cell>
          <table:table-cell office:value-type="float" office:value="0.168468091984685" calcext:value-type="float">
            <text:p>0.168468091984685</text:p>
          </table:table-cell>
          <table:table-cell office:value-type="float" office:value="0.0168468091984685" calcext:value-type="float">
            <text:p>0.01684680919846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506899503813905" calcext:value-type="float">
            <text:p>-0.0506899503813905</text:p>
          </table:table-cell>
          <table:table-cell office:value-type="float" office:value="0.270887260286816" calcext:value-type="float">
            <text:p>0.270887260286816</text:p>
          </table:table-cell>
          <table:table-cell office:value-type="float" office:value="0.0270887260286816" calcext:value-type="float">
            <text:p>0.0270887260286816</text:p>
          </table:table-cell>
          <table:table-cell office:value-type="float" office:value="0.22164877065154" calcext:value-type="float">
            <text:p>0.22164877065154</text:p>
          </table:table-cell>
          <table:table-cell office:value-type="float" office:value="0.162329637958589" calcext:value-type="float">
            <text:p>0.162329637958589</text:p>
          </table:table-cell>
          <table:table-cell office:value-type="float" office:value="0.0162329637958589" calcext:value-type="float">
            <text:p>0.01623296379585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063929509670915" calcext:value-type="float">
            <text:p>0.063929509670915</text:p>
          </table:table-cell>
          <table:table-cell office:value-type="float" office:value="0.313697974131993" calcext:value-type="float">
            <text:p>0.313697974131993</text:p>
          </table:table-cell>
          <table:table-cell office:value-type="float" office:value="0.0313697974131993" calcext:value-type="float">
            <text:p>0.0313697974131993</text:p>
          </table:table-cell>
          <table:table-cell office:value-type="float" office:value="0.261353227127639" calcext:value-type="float">
            <text:p>0.261353227127639</text:p>
          </table:table-cell>
          <table:table-cell office:value-type="float" office:value="0.183137161330259" calcext:value-type="float">
            <text:p>0.183137161330259</text:p>
          </table:table-cell>
          <table:table-cell office:value-type="float" office:value="0.0183137161330259" calcext:value-type="float">
            <text:p>0.01831371613302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46670579104893" calcext:value-type="float">
            <text:p>0.146670579104893</text:p>
          </table:table-cell>
          <table:table-cell office:value-type="float" office:value="0.290251559143365" calcext:value-type="float">
            <text:p>0.290251559143365</text:p>
          </table:table-cell>
          <table:table-cell office:value-type="float" office:value="0.0290251559143365" calcext:value-type="float">
            <text:p>0.0290251559143365</text:p>
          </table:table-cell>
          <table:table-cell office:value-type="float" office:value="0.252348912027006" calcext:value-type="float">
            <text:p>0.252348912027006</text:p>
          </table:table-cell>
          <table:table-cell office:value-type="float" office:value="0.204088991490303" calcext:value-type="float">
            <text:p>0.204088991490303</text:p>
          </table:table-cell>
          <table:table-cell office:value-type="float" office:value="0.0204088991490303" calcext:value-type="float">
            <text:p>0.020408899149030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122694348459027" calcext:value-type="float">
            <text:p>0.122694348459027</text:p>
          </table:table-cell>
          <table:table-cell office:value-type="float" office:value="0.295753177983571" calcext:value-type="float">
            <text:p>0.295753177983571</text:p>
          </table:table-cell>
          <table:table-cell office:value-type="float" office:value="0.0295753177983571" calcext:value-type="float">
            <text:p>0.0295753177983571</text:p>
          </table:table-cell>
          <table:table-cell office:value-type="float" office:value="0.252889743697063" calcext:value-type="float">
            <text:p>0.252889743697063</text:p>
          </table:table-cell>
          <table:table-cell office:value-type="float" office:value="0.195132494591706" calcext:value-type="float">
            <text:p>0.195132494591706</text:p>
          </table:table-cell>
          <table:table-cell office:value-type="float" office:value="0.0195132494591706" calcext:value-type="float">
            <text:p>0.01951324945917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547277437820894" calcext:value-type="float">
            <text:p>0.0547277437820894</text:p>
          </table:table-cell>
          <table:table-cell office:value-type="float" office:value="0.27459982625617" calcext:value-type="float">
            <text:p>0.27459982625617</text:p>
          </table:table-cell>
          <table:table-cell office:value-type="float" office:value="0.027459982625617" calcext:value-type="float">
            <text:p>0.027459982625617</text:p>
          </table:table-cell>
          <table:table-cell office:value-type="float" office:value="0.22161188485279" calcext:value-type="float">
            <text:p>0.22161188485279</text:p>
          </table:table-cell>
          <table:table-cell office:value-type="float" office:value="0.169772016961045" calcext:value-type="float">
            <text:p>0.169772016961045</text:p>
          </table:table-cell>
          <table:table-cell office:value-type="float" office:value="0.0169772016961045" calcext:value-type="float">
            <text:p>0.016977201696104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183490784270227" calcext:value-type="float">
            <text:p>0.183490784270227</text:p>
          </table:table-cell>
          <table:table-cell office:value-type="float" office:value="0.59372793585949" calcext:value-type="float">
            <text:p>0.59372793585949</text:p>
          </table:table-cell>
          <table:table-cell office:value-type="float" office:value="0.059372793585949" calcext:value-type="float">
            <text:p>0.059372793585949</text:p>
          </table:table-cell>
          <table:table-cell office:value-type="float" office:value="0.316034602836213" calcext:value-type="float">
            <text:p>0.316034602836213</text:p>
          </table:table-cell>
          <table:table-cell office:value-type="float" office:value="0.534448390157034" calcext:value-type="float">
            <text:p>0.534448390157034</text:p>
          </table:table-cell>
          <table:table-cell office:value-type="float" office:value="0.0534448390157034" calcext:value-type="float">
            <text:p>0.053444839015703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489111778449372" calcext:value-type="float">
            <text:p>0.0489111778449372</text:p>
          </table:table-cell>
          <table:table-cell office:value-type="float" office:value="0.301475863898336" calcext:value-type="float">
            <text:p>0.301475863898336</text:p>
          </table:table-cell>
          <table:table-cell office:value-type="float" office:value="0.0301475863898336" calcext:value-type="float">
            <text:p>0.0301475863898336</text:p>
          </table:table-cell>
          <table:table-cell office:value-type="float" office:value="0.24004462453316" calcext:value-type="float">
            <text:p>0.24004462453316</text:p>
          </table:table-cell>
          <table:table-cell office:value-type="float" office:value="0.187351829937252" calcext:value-type="float">
            <text:p>0.187351829937252</text:p>
          </table:table-cell>
          <table:table-cell office:value-type="float" office:value="0.0187351829937252" calcext:value-type="float">
            <text:p>0.01873518299372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63034053995968" calcext:value-type="float">
            <text:p>0.163034053995968</text:p>
          </table:table-cell>
          <table:table-cell office:value-type="float" office:value="0.50090115105673" calcext:value-type="float">
            <text:p>0.50090115105673</text:p>
          </table:table-cell>
          <table:table-cell office:value-type="float" office:value="0.050090115105673" calcext:value-type="float">
            <text:p>0.050090115105673</text:p>
          </table:table-cell>
          <table:table-cell office:value-type="float" office:value="0.387533063357729" calcext:value-type="float">
            <text:p>0.387533063357729</text:p>
          </table:table-cell>
          <table:table-cell office:value-type="float" office:value="0.35503758666519" calcext:value-type="float">
            <text:p>0.35503758666519</text:p>
          </table:table-cell>
          <table:table-cell office:value-type="float" office:value="0.035503758666519" calcext:value-type="float">
            <text:p>0.03550375866651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231154341251297" calcext:value-type="float">
            <text:p>0.231154341251297</text:p>
          </table:table-cell>
          <table:table-cell office:value-type="float" office:value="0.61765483012316" calcext:value-type="float">
            <text:p>0.61765483012316</text:p>
          </table:table-cell>
          <table:table-cell office:value-type="float" office:value="0.061765483012316" calcext:value-type="float">
            <text:p>0.061765483012316</text:p>
          </table:table-cell>
          <table:table-cell office:value-type="float" office:value="0.369181520378815" calcext:value-type="float">
            <text:p>0.369181520378815</text:p>
          </table:table-cell>
          <table:table-cell office:value-type="float" office:value="0.545708555039469" calcext:value-type="float">
            <text:p>0.545708555039469</text:p>
          </table:table-cell>
          <table:table-cell office:value-type="float" office:value="0.0545708555039468" calcext:value-type="float">
            <text:p>0.05457085550394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132310651469504" calcext:value-type="float">
            <text:p>0.132310651469504</text:p>
          </table:table-cell>
          <table:table-cell office:value-type="float" office:value="1.06263163664656" calcext:value-type="float">
            <text:p>1.06263163664656</text:p>
          </table:table-cell>
          <table:table-cell office:value-type="float" office:value="0.106263163664656" calcext:value-type="float">
            <text:p>0.106263163664656</text:p>
          </table:table-cell>
          <table:table-cell office:value-type="float" office:value="0.51927859465243" calcext:value-type="float">
            <text:p>0.51927859465243</text:p>
          </table:table-cell>
          <table:table-cell office:value-type="float" office:value="0.935144338709493" calcext:value-type="float">
            <text:p>0.935144338709493</text:p>
          </table:table-cell>
          <table:table-cell office:value-type="float" office:value="0.0935144338709493" calcext:value-type="float">
            <text:p>0.09351443387094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894724224950354" calcext:value-type="float">
            <text:p>-0.0894724224950354</text:p>
          </table:table-cell>
          <table:table-cell office:value-type="float" office:value="0.171584790718939" calcext:value-type="float">
            <text:p>0.171584790718939</text:p>
          </table:table-cell>
          <table:table-cell office:value-type="float" office:value="0.0171584790718939" calcext:value-type="float">
            <text:p>0.0171584790718939</text:p>
          </table:table-cell>
          <table:table-cell office:value-type="float" office:value="0.152853135896158" calcext:value-type="float">
            <text:p>0.152853135896158</text:p>
          </table:table-cell>
          <table:table-cell office:value-type="float" office:value="0.118014552414773" calcext:value-type="float">
            <text:p>0.118014552414773</text:p>
          </table:table-cell>
          <table:table-cell office:value-type="float" office:value="0.0118014552414773" calcext:value-type="float">
            <text:p>0.011801455241477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36231773548938" calcext:value-type="float">
            <text:p>-0.136231773548938</text:p>
          </table:table-cell>
          <table:table-cell office:value-type="float" office:value="0.240838967067333" calcext:value-type="float">
            <text:p>0.240838967067333</text:p>
          </table:table-cell>
          <table:table-cell office:value-type="float" office:value="0.0240838967067333" calcext:value-type="float">
            <text:p>0.0240838967067333</text:p>
          </table:table-cell>
          <table:table-cell office:value-type="float" office:value="0.23310918385869" calcext:value-type="float">
            <text:p>0.23310918385869</text:p>
          </table:table-cell>
          <table:table-cell office:value-type="float" office:value="0.147855302260588" calcext:value-type="float">
            <text:p>0.147855302260588</text:p>
          </table:table-cell>
          <table:table-cell office:value-type="float" office:value="0.0147855302260588" calcext:value-type="float">
            <text:p>0.01478553022605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57644640671146" calcext:value-type="float">
            <text:p>-0.157644640671146</text:p>
          </table:table-cell>
          <table:table-cell office:value-type="float" office:value="0.270755064353507" calcext:value-type="float">
            <text:p>0.270755064353507</text:p>
          </table:table-cell>
          <table:table-cell office:value-type="float" office:value="0.0270755064353507" calcext:value-type="float">
            <text:p>0.0270755064353507</text:p>
          </table:table-cell>
          <table:table-cell office:value-type="float" office:value="0.261781122876053" calcext:value-type="float">
            <text:p>0.261781122876053</text:p>
          </table:table-cell>
          <table:table-cell office:value-type="float" office:value="0.170849624537115" calcext:value-type="float">
            <text:p>0.170849624537115</text:p>
          </table:table-cell>
          <table:table-cell office:value-type="float" office:value="0.0170849624537115" calcext:value-type="float">
            <text:p>0.01708496245371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0617112103312397" calcext:value-type="float">
            <text:p>0.0617112103312397</text:p>
          </table:table-cell>
          <table:table-cell office:value-type="float" office:value="0.347639027651133" calcext:value-type="float">
            <text:p>0.347639027651133</text:p>
          </table:table-cell>
          <table:table-cell office:value-type="float" office:value="0.0347639027651133" calcext:value-type="float">
            <text:p>0.0347639027651133</text:p>
          </table:table-cell>
          <table:table-cell office:value-type="float" office:value="0.271137335628228" calcext:value-type="float">
            <text:p>0.271137335628228</text:p>
          </table:table-cell>
          <table:table-cell office:value-type="float" office:value="0.224592073130073" calcext:value-type="float">
            <text:p>0.224592073130073</text:p>
          </table:table-cell>
          <table:table-cell office:value-type="float" office:value="0.0224592073130073" calcext:value-type="float">
            <text:p>0.022459207313007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447729492309627" calcext:value-type="float">
            <text:p>-0.0447729492309627</text:p>
          </table:table-cell>
          <table:table-cell office:value-type="float" office:value="0.716945362583944" calcext:value-type="float">
            <text:p>0.716945362583944</text:p>
          </table:table-cell>
          <table:table-cell office:value-type="float" office:value="0.0716945362583944" calcext:value-type="float">
            <text:p>0.0716945362583944</text:p>
          </table:table-cell>
          <table:table-cell office:value-type="float" office:value="0.298290519798115" calcext:value-type="float">
            <text:p>0.298290519798115</text:p>
          </table:table-cell>
          <table:table-cell office:value-type="float" office:value="0.652808949407862" calcext:value-type="float">
            <text:p>0.652808949407862</text:p>
          </table:table-cell>
          <table:table-cell office:value-type="float" office:value="0.0652808949407862" calcext:value-type="float">
            <text:p>0.065280894940786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ras (Denoised)</text:p>
          </table:table-cell>
          <table:table-cell office:value-type="string" calcext:value-type="string">
            <text:p>keras_denoised</text:p>
          </table:table-cell>
          <table:table-cell office:value-type="string" calcext:value-type="string">
            <text:p>Machine Learning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0325925131486723" calcext:value-type="float">
            <text:p>0.0325925131486723</text:p>
          </table:table-cell>
          <table:table-cell office:value-type="float" office:value="0.334593951706674" calcext:value-type="float">
            <text:p>0.334593951706674</text:p>
          </table:table-cell>
          <table:table-cell office:value-type="float" office:value="0.0334593951706674" calcext:value-type="float">
            <text:p>0.0334593951706674</text:p>
          </table:table-cell>
          <table:table-cell office:value-type="float" office:value="0.246469021171312" calcext:value-type="float">
            <text:p>0.246469021171312</text:p>
          </table:table-cell>
          <table:table-cell office:value-type="float" office:value="0.227300528401983" calcext:value-type="float">
            <text:p>0.227300528401983</text:p>
          </table:table-cell>
          <table:table-cell office:value-type="float" office:value="0.0227300528401983" calcext:value-type="float">
            <text:p>0.022730052840198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42005746944841" calcext:value-type="float">
            <text:p>-0.042005746944841</text:p>
          </table:table-cell>
          <table:table-cell office:value-type="float" office:value="0.176070619081495" calcext:value-type="float">
            <text:p>0.176070619081495</text:p>
          </table:table-cell>
          <table:table-cell office:value-type="float" office:value="0.0176070619081495" calcext:value-type="float">
            <text:p>0.0176070619081495</text:p>
          </table:table-cell>
          <table:table-cell office:value-type="float" office:value="0.148212763108161" calcext:value-type="float">
            <text:p>0.148212763108161</text:p>
          </table:table-cell>
          <table:table-cell office:value-type="float" office:value="0.10292840457142" calcext:value-type="float">
            <text:p>0.10292840457142</text:p>
          </table:table-cell>
          <table:table-cell office:value-type="float" office:value="0.010292840457142" calcext:value-type="float">
            <text:p>0.0102928404571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1016060595537" calcext:value-type="float">
            <text:p>-0.11016060595537</text:p>
          </table:table-cell>
          <table:table-cell office:value-type="float" office:value="0.150279036727541" calcext:value-type="float">
            <text:p>0.150279036727541</text:p>
          </table:table-cell>
          <table:table-cell office:value-type="float" office:value="0.0150279036727541" calcext:value-type="float">
            <text:p>0.0150279036727541</text:p>
          </table:table-cell>
          <table:table-cell office:value-type="float" office:value="0.149378272863168" calcext:value-type="float">
            <text:p>0.149378272863168</text:p>
          </table:table-cell>
          <table:table-cell office:value-type="float" office:value="0.110916483695549" calcext:value-type="float">
            <text:p>0.110916483695549</text:p>
          </table:table-cell>
          <table:table-cell office:value-type="float" office:value="0.0110916483695549" calcext:value-type="float">
            <text:p>0.011091648369554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60478014340778" calcext:value-type="float">
            <text:p>-0.160478014340778</text:p>
          </table:table-cell>
          <table:table-cell office:value-type="float" office:value="0.150925538835893" calcext:value-type="float">
            <text:p>0.150925538835893</text:p>
          </table:table-cell>
          <table:table-cell office:value-type="float" office:value="0.0150925538835893" calcext:value-type="float">
            <text:p>0.0150925538835893</text:p>
          </table:table-cell>
          <table:table-cell office:value-type="float" office:value="0.187338850143429" calcext:value-type="float">
            <text:p>0.187338850143429</text:p>
          </table:table-cell>
          <table:table-cell office:value-type="float" office:value="0.115505395404491" calcext:value-type="float">
            <text:p>0.115505395404491</text:p>
          </table:table-cell>
          <table:table-cell office:value-type="float" office:value="0.0115505395404491" calcext:value-type="float">
            <text:p>0.01155053954044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437090823324065" calcext:value-type="float">
            <text:p>-0.0437090823324065</text:p>
          </table:table-cell>
          <table:table-cell office:value-type="float" office:value="0.228703582426473" calcext:value-type="float">
            <text:p>0.228703582426473</text:p>
          </table:table-cell>
          <table:table-cell office:value-type="float" office:value="0.0228703582426473" calcext:value-type="float">
            <text:p>0.0228703582426473</text:p>
          </table:table-cell>
          <table:table-cell office:value-type="float" office:value="0.176240641020095" calcext:value-type="float">
            <text:p>0.176240641020095</text:p>
          </table:table-cell>
          <table:table-cell office:value-type="float" office:value="0.151197227740748" calcext:value-type="float">
            <text:p>0.151197227740748</text:p>
          </table:table-cell>
          <table:table-cell office:value-type="float" office:value="0.0151197227740748" calcext:value-type="float">
            <text:p>0.01511972277407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27066029269716" calcext:value-type="float">
            <text:p>-0.127066029269716</text:p>
          </table:table-cell>
          <table:table-cell office:value-type="float" office:value="0.187940136605356" calcext:value-type="float">
            <text:p>0.187940136605356</text:p>
          </table:table-cell>
          <table:table-cell office:value-type="float" office:value="0.0187940136605356" calcext:value-type="float">
            <text:p>0.0187940136605356</text:p>
          </table:table-cell>
          <table:table-cell office:value-type="float" office:value="0.181490293955381" calcext:value-type="float">
            <text:p>0.181490293955381</text:p>
          </table:table-cell>
          <table:table-cell office:value-type="float" office:value="0.135495085423302" calcext:value-type="float">
            <text:p>0.135495085423302</text:p>
          </table:table-cell>
          <table:table-cell office:value-type="float" office:value="0.0135495085423302" calcext:value-type="float">
            <text:p>0.01354950854233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20733258369239" calcext:value-type="float">
            <text:p>-0.220733258369239</text:p>
          </table:table-cell>
          <table:table-cell office:value-type="float" office:value="0.17360141963382" calcext:value-type="float">
            <text:p>0.17360141963382</text:p>
          </table:table-cell>
          <table:table-cell office:value-type="float" office:value="0.017360141963382" calcext:value-type="float">
            <text:p>0.017360141963382</text:p>
          </table:table-cell>
          <table:table-cell office:value-type="float" office:value="0.236930128649958" calcext:value-type="float">
            <text:p>0.236930128649958</text:p>
          </table:table-cell>
          <table:table-cell office:value-type="float" office:value="0.150498712562381" calcext:value-type="float">
            <text:p>0.150498712562381</text:p>
          </table:table-cell>
          <table:table-cell office:value-type="float" office:value="0.0150498712562381" calcext:value-type="float">
            <text:p>0.01504987125623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31656164546087" calcext:value-type="float">
            <text:p>-0.031656164546087</text:p>
          </table:table-cell>
          <table:table-cell office:value-type="float" office:value="0.151168786470244" calcext:value-type="float">
            <text:p>0.151168786470244</text:p>
          </table:table-cell>
          <table:table-cell office:value-type="float" office:value="0.0151168786470244" calcext:value-type="float">
            <text:p>0.0151168786470244</text:p>
          </table:table-cell>
          <table:table-cell office:value-type="float" office:value="0.118383558915122" calcext:value-type="float">
            <text:p>0.118383558915122</text:p>
          </table:table-cell>
          <table:table-cell office:value-type="float" office:value="0.0985292230414297" calcext:value-type="float">
            <text:p>0.0985292230414297</text:p>
          </table:table-cell>
          <table:table-cell office:value-type="float" office:value="0.00985292230414297" calcext:value-type="float">
            <text:p>0.009852922304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16504653453093" calcext:value-type="float">
            <text:p>-0.116504653453093</text:p>
          </table:table-cell>
          <table:table-cell office:value-type="float" office:value="0.162836140785833" calcext:value-type="float">
            <text:p>0.162836140785833</text:p>
          </table:table-cell>
          <table:table-cell office:value-type="float" office:value="0.0162836140785833" calcext:value-type="float">
            <text:p>0.0162836140785833</text:p>
          </table:table-cell>
          <table:table-cell office:value-type="float" office:value="0.155267262984348" calcext:value-type="float">
            <text:p>0.155267262984348</text:p>
          </table:table-cell>
          <table:table-cell office:value-type="float" office:value="0.125994484327479" calcext:value-type="float">
            <text:p>0.125994484327479</text:p>
          </table:table-cell>
          <table:table-cell office:value-type="float" office:value="0.0125994484327479" calcext:value-type="float">
            <text:p>0.012599448432747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72938744061066" calcext:value-type="float">
            <text:p>-0.172938744061066</text:p>
          </table:table-cell>
          <table:table-cell office:value-type="float" office:value="0.175244909445965" calcext:value-type="float">
            <text:p>0.175244909445965</text:p>
          </table:table-cell>
          <table:table-cell office:value-type="float" office:value="0.0175244909445965" calcext:value-type="float">
            <text:p>0.0175244909445965</text:p>
          </table:table-cell>
          <table:table-cell office:value-type="float" office:value="0.200919938566576" calcext:value-type="float">
            <text:p>0.200919938566576</text:p>
          </table:table-cell>
          <table:table-cell office:value-type="float" office:value="0.141929908678382" calcext:value-type="float">
            <text:p>0.141929908678382</text:p>
          </table:table-cell>
          <table:table-cell office:value-type="float" office:value="0.0141929908678382" calcext:value-type="float">
            <text:p>0.01419299086783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172953545186168" calcext:value-type="float">
            <text:p>-0.0172953545186168</text:p>
          </table:table-cell>
          <table:table-cell office:value-type="float" office:value="0.225196956547219" calcext:value-type="float">
            <text:p>0.225196956547219</text:p>
          </table:table-cell>
          <table:table-cell office:value-type="float" office:value="0.0225196956547219" calcext:value-type="float">
            <text:p>0.0225196956547219</text:p>
          </table:table-cell>
          <table:table-cell office:value-type="float" office:value="0.183024385822853" calcext:value-type="float">
            <text:p>0.183024385822853</text:p>
          </table:table-cell>
          <table:table-cell office:value-type="float" office:value="0.131070711225862" calcext:value-type="float">
            <text:p>0.131070711225862</text:p>
          </table:table-cell>
          <table:table-cell office:value-type="float" office:value="0.0131070711225862" calcext:value-type="float">
            <text:p>0.013107071122586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845507096098758" calcext:value-type="float">
            <text:p>-0.0845507096098758</text:p>
          </table:table-cell>
          <table:table-cell office:value-type="float" office:value="0.19979756626008" calcext:value-type="float">
            <text:p>0.19979756626008</text:p>
          </table:table-cell>
          <table:table-cell office:value-type="float" office:value="0.019979756626008" calcext:value-type="float">
            <text:p>0.019979756626008</text:p>
          </table:table-cell>
          <table:table-cell office:value-type="float" office:value="0.170303726059221" calcext:value-type="float">
            <text:p>0.170303726059221</text:p>
          </table:table-cell>
          <table:table-cell office:value-type="float" office:value="0.133580604783173" calcext:value-type="float">
            <text:p>0.133580604783173</text:p>
          </table:table-cell>
          <table:table-cell office:value-type="float" office:value="0.0133580604783173" calcext:value-type="float">
            <text:p>0.013358060478317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7410197711524" calcext:value-type="float">
            <text:p>-0.17410197711524</text:p>
          </table:table-cell>
          <table:table-cell office:value-type="float" office:value="0.209286032006997" calcext:value-type="float">
            <text:p>0.209286032006997</text:p>
          </table:table-cell>
          <table:table-cell office:value-type="float" office:value="0.0209286032006997" calcext:value-type="float">
            <text:p>0.0209286032006997</text:p>
          </table:table-cell>
          <table:table-cell office:value-type="float" office:value="0.233359306163597" calcext:value-type="float">
            <text:p>0.233359306163597</text:p>
          </table:table-cell>
          <table:table-cell office:value-type="float" office:value="0.139325827779513" calcext:value-type="float">
            <text:p>0.139325827779513</text:p>
          </table:table-cell>
          <table:table-cell office:value-type="float" office:value="0.0139325827779513" calcext:value-type="float">
            <text:p>0.01393258277795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.0316160505482908" calcext:value-type="float">
            <text:p>0.0316160505482908</text:p>
          </table:table-cell>
          <table:table-cell office:value-type="float" office:value="0.165332898895737" calcext:value-type="float">
            <text:p>0.165332898895737</text:p>
          </table:table-cell>
          <table:table-cell office:value-type="float" office:value="0.0165332898895737" calcext:value-type="float">
            <text:p>0.0165332898895737</text:p>
          </table:table-cell>
          <table:table-cell office:value-type="float" office:value="0.135610980160427" calcext:value-type="float">
            <text:p>0.135610980160427</text:p>
          </table:table-cell>
          <table:table-cell office:value-type="float" office:value="0.0988359241057325" calcext:value-type="float">
            <text:p>0.0988359241057325</text:p>
          </table:table-cell>
          <table:table-cell office:value-type="float" office:value="0.00988359241057325" calcext:value-type="float">
            <text:p>0.0098835924105732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729868513097344" calcext:value-type="float">
            <text:p>-0.0729868513097344</text:p>
          </table:table-cell>
          <table:table-cell office:value-type="float" office:value="0.161465243556974" calcext:value-type="float">
            <text:p>0.161465243556974</text:p>
          </table:table-cell>
          <table:table-cell office:value-type="float" office:value="0.0161465243556974" calcext:value-type="float">
            <text:p>0.0161465243556974</text:p>
          </table:table-cell>
          <table:table-cell office:value-type="float" office:value="0.140211781991257" calcext:value-type="float">
            <text:p>0.140211781991257</text:p>
          </table:table-cell>
          <table:table-cell office:value-type="float" office:value="0.107675397352598" calcext:value-type="float">
            <text:p>0.107675397352598</text:p>
          </table:table-cell>
          <table:table-cell office:value-type="float" office:value="0.0107675397352598" calcext:value-type="float">
            <text:p>0.01076753973525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0778406489297" calcext:value-type="float">
            <text:p>-0.20778406489297</text:p>
          </table:table-cell>
          <table:table-cell office:value-type="float" office:value="0.162318773089925" calcext:value-type="float">
            <text:p>0.162318773089925</text:p>
          </table:table-cell>
          <table:table-cell office:value-type="float" office:value="0.0162318773089925" calcext:value-type="float">
            <text:p>0.0162318773089925</text:p>
          </table:table-cell>
          <table:table-cell office:value-type="float" office:value="0.225311787913739" calcext:value-type="float">
            <text:p>0.225311787913739</text:p>
          </table:table-cell>
          <table:table-cell office:value-type="float" office:value="0.136673045331575" calcext:value-type="float">
            <text:p>0.136673045331575</text:p>
          </table:table-cell>
          <table:table-cell office:value-type="float" office:value="0.0136673045331575" calcext:value-type="float">
            <text:p>0.01366730453315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333413834953996" calcext:value-type="float">
            <text:p>0.0333413834953996</text:p>
          </table:table-cell>
          <table:table-cell office:value-type="float" office:value="0.249127137490306" calcext:value-type="float">
            <text:p>0.249127137490306</text:p>
          </table:table-cell>
          <table:table-cell office:value-type="float" office:value="0.0249127137490306" calcext:value-type="float">
            <text:p>0.0249127137490306</text:p>
          </table:table-cell>
          <table:table-cell office:value-type="float" office:value="0.182494698781332" calcext:value-type="float">
            <text:p>0.182494698781332</text:p>
          </table:table-cell>
          <table:table-cell office:value-type="float" office:value="0.171890910019536" calcext:value-type="float">
            <text:p>0.171890910019536</text:p>
          </table:table-cell>
          <table:table-cell office:value-type="float" office:value="0.0171890910019536" calcext:value-type="float">
            <text:p>0.01718909100195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06396845914433" calcext:value-type="float">
            <text:p>-0.106396845914433</text:p>
          </table:table-cell>
          <table:table-cell office:value-type="float" office:value="0.170618957436076" calcext:value-type="float">
            <text:p>0.170618957436076</text:p>
          </table:table-cell>
          <table:table-cell office:value-type="float" office:value="0.0170618957436076" calcext:value-type="float">
            <text:p>0.0170618957436076</text:p>
          </table:table-cell>
          <table:table-cell office:value-type="float" office:value="0.160547839447818" calcext:value-type="float">
            <text:p>0.160547839447818</text:p>
          </table:table-cell>
          <table:table-cell office:value-type="float" office:value="0.120455366726088" calcext:value-type="float">
            <text:p>0.120455366726088</text:p>
          </table:table-cell>
          <table:table-cell office:value-type="float" office:value="0.0120455366726088" calcext:value-type="float">
            <text:p>0.01204553667260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21795000802373" calcext:value-type="float">
            <text:p>-0.221795000802373</text:p>
          </table:table-cell>
          <table:table-cell office:value-type="float" office:value="0.227535572358216" calcext:value-type="float">
            <text:p>0.227535572358216</text:p>
          </table:table-cell>
          <table:table-cell office:value-type="float" office:value="0.0227535572358216" calcext:value-type="float">
            <text:p>0.0227535572358216</text:p>
          </table:table-cell>
          <table:table-cell office:value-type="float" office:value="0.261892857689737" calcext:value-type="float">
            <text:p>0.261892857689737</text:p>
          </table:table-cell>
          <table:table-cell office:value-type="float" office:value="0.179392537803894" calcext:value-type="float">
            <text:p>0.179392537803894</text:p>
          </table:table-cell>
          <table:table-cell office:value-type="float" office:value="0.0179392537803894" calcext:value-type="float">
            <text:p>0.01793925378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.00947471723154371" calcext:value-type="float">
            <text:p>0.00947471723154371</text:p>
          </table:table-cell>
          <table:table-cell office:value-type="float" office:value="0.147223350586243" calcext:value-type="float">
            <text:p>0.147223350586243</text:p>
          </table:table-cell>
          <table:table-cell office:value-type="float" office:value="0.0147223350586243" calcext:value-type="float">
            <text:p>0.0147223350586243</text:p>
          </table:table-cell>
          <table:table-cell office:value-type="float" office:value="0.112148424494787" calcext:value-type="float">
            <text:p>0.112148424494787</text:p>
          </table:table-cell>
          <table:table-cell office:value-type="float" office:value="0.0951897040428946" calcext:value-type="float">
            <text:p>0.0951897040428946</text:p>
          </table:table-cell>
          <table:table-cell office:value-type="float" office:value="0.00951897040428946" calcext:value-type="float">
            <text:p>0.0095189704042894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956977536128172" calcext:value-type="float">
            <text:p>-0.0956977536128172</text:p>
          </table:table-cell>
          <table:table-cell office:value-type="float" office:value="0.136740655268984" calcext:value-type="float">
            <text:p>0.136740655268984</text:p>
          </table:table-cell>
          <table:table-cell office:value-type="float" office:value="0.0136740655268984" calcext:value-type="float">
            <text:p>0.0136740655268984</text:p>
          </table:table-cell>
          <table:table-cell office:value-type="float" office:value="0.140414841887285" calcext:value-type="float">
            <text:p>0.140414841887285</text:p>
          </table:table-cell>
          <table:table-cell office:value-type="float" office:value="0.0896275061476542" calcext:value-type="float">
            <text:p>0.0896275061476542</text:p>
          </table:table-cell>
          <table:table-cell office:value-type="float" office:value="0.00896275061476542" calcext:value-type="float">
            <text:p>0.008962750614765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18302261939329" calcext:value-type="float">
            <text:p>-0.218302261939329</text:p>
          </table:table-cell>
          <table:table-cell office:value-type="float" office:value="0.16491807960947" calcext:value-type="float">
            <text:p>0.16491807960947</text:p>
          </table:table-cell>
          <table:table-cell office:value-type="float" office:value="0.016491807960947" calcext:value-type="float">
            <text:p>0.016491807960947</text:p>
          </table:table-cell>
          <table:table-cell office:value-type="float" office:value="0.229770356018783" calcext:value-type="float">
            <text:p>0.229770356018783</text:p>
          </table:table-cell>
          <table:table-cell office:value-type="float" office:value="0.148349349884641" calcext:value-type="float">
            <text:p>0.148349349884641</text:p>
          </table:table-cell>
          <table:table-cell office:value-type="float" office:value="0.0148349349884641" calcext:value-type="float">
            <text:p>0.01483493498846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383016322914267" calcext:value-type="float">
            <text:p>-0.0383016322914267</text:p>
          </table:table-cell>
          <table:table-cell office:value-type="float" office:value="0.228919137797057" calcext:value-type="float">
            <text:p>0.228919137797057</text:p>
          </table:table-cell>
          <table:table-cell office:value-type="float" office:value="0.0228919137797057" calcext:value-type="float">
            <text:p>0.0228919137797057</text:p>
          </table:table-cell>
          <table:table-cell office:value-type="float" office:value="0.181003034148667" calcext:value-type="float">
            <text:p>0.181003034148667</text:p>
          </table:table-cell>
          <table:table-cell office:value-type="float" office:value="0.144197005385116" calcext:value-type="float">
            <text:p>0.144197005385116</text:p>
          </table:table-cell>
          <table:table-cell office:value-type="float" office:value="0.0144197005385116" calcext:value-type="float">
            <text:p>0.01441970053851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0411595613697" calcext:value-type="float">
            <text:p>-0.10411595613697</text:p>
          </table:table-cell>
          <table:table-cell office:value-type="float" office:value="0.201102408813432" calcext:value-type="float">
            <text:p>0.201102408813432</text:p>
          </table:table-cell>
          <table:table-cell office:value-type="float" office:value="0.0201102408813432" calcext:value-type="float">
            <text:p>0.0201102408813432</text:p>
          </table:table-cell>
          <table:table-cell office:value-type="float" office:value="0.183674205070688" calcext:value-type="float">
            <text:p>0.183674205070688</text:p>
          </table:table-cell>
          <table:table-cell office:value-type="float" office:value="0.131585804691035" calcext:value-type="float">
            <text:p>0.131585804691035</text:p>
          </table:table-cell>
          <table:table-cell office:value-type="float" office:value="0.0131585804691035" calcext:value-type="float">
            <text:p>0.013158580469103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06834536952366" calcext:value-type="float">
            <text:p>-0.206834536952366</text:p>
          </table:table-cell>
          <table:table-cell office:value-type="float" office:value="0.169130175162747" calcext:value-type="float">
            <text:p>0.169130175162747</text:p>
          </table:table-cell>
          <table:table-cell office:value-type="float" office:value="0.0169130175162747" calcext:value-type="float">
            <text:p>0.0169130175162747</text:p>
          </table:table-cell>
          <table:table-cell office:value-type="float" office:value="0.227039911061253" calcext:value-type="float">
            <text:p>0.227039911061253</text:p>
          </table:table-cell>
          <table:table-cell office:value-type="float" office:value="0.140534227653247" calcext:value-type="float">
            <text:p>0.140534227653247</text:p>
          </table:table-cell>
          <table:table-cell office:value-type="float" office:value="0.0140534227653247" calcext:value-type="float">
            <text:p>0.01405342276532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0394141786346334" calcext:value-type="float">
            <text:p>-0.0394141786346334</text:p>
          </table:table-cell>
          <table:table-cell office:value-type="float" office:value="0.153396981391131" calcext:value-type="float">
            <text:p>0.153396981391131</text:p>
          </table:table-cell>
          <table:table-cell office:value-type="float" office:value="0.0153396981391131" calcext:value-type="float">
            <text:p>0.0153396981391131</text:p>
          </table:table-cell>
          <table:table-cell office:value-type="float" office:value="0.130569360687768" calcext:value-type="float">
            <text:p>0.130569360687768</text:p>
          </table:table-cell>
          <table:table-cell office:value-type="float" office:value="0.0887650803118539" calcext:value-type="float">
            <text:p>0.0887650803118539</text:p>
          </table:table-cell>
          <table:table-cell office:value-type="float" office:value="0.00887650803118539" calcext:value-type="float">
            <text:p>0.008876508031185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116954021363648" calcext:value-type="float">
            <text:p>-0.116954021363648</text:p>
          </table:table-cell>
          <table:table-cell office:value-type="float" office:value="0.141734435316285" calcext:value-type="float">
            <text:p>0.141734435316285</text:p>
          </table:table-cell>
          <table:table-cell office:value-type="float" office:value="0.0141734435316285" calcext:value-type="float">
            <text:p>0.0141734435316285</text:p>
          </table:table-cell>
          <table:table-cell office:value-type="float" office:value="0.159931698215625" calcext:value-type="float">
            <text:p>0.159931698215625</text:p>
          </table:table-cell>
          <table:table-cell office:value-type="float" office:value="0.089825075079328" calcext:value-type="float">
            <text:p>0.089825075079328</text:p>
          </table:table-cell>
          <table:table-cell office:value-type="float" office:value="0.0089825075079328" calcext:value-type="float">
            <text:p>0.00898250750793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0.280691111317817" calcext:value-type="float">
            <text:p>-0.280691111317817</text:p>
          </table:table-cell>
          <table:table-cell office:value-type="float" office:value="0.149571250551698" calcext:value-type="float">
            <text:p>0.149571250551698</text:p>
          </table:table-cell>
          <table:table-cell office:value-type="float" office:value="0.0149571250551698" calcext:value-type="float">
            <text:p>0.0149571250551698</text:p>
          </table:table-cell>
          <table:table-cell office:value-type="float" office:value="0.283310491297626" calcext:value-type="float">
            <text:p>0.283310491297626</text:p>
          </table:table-cell>
          <table:table-cell office:value-type="float" office:value="0.144496719389594" calcext:value-type="float">
            <text:p>0.144496719389594</text:p>
          </table:table-cell>
          <table:table-cell office:value-type="float" office:value="0.0144496719389594" calcext:value-type="float">
            <text:p>0.01444967193895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00194338668018104" calcext:value-type="float">
            <text:p>-0.00194338668018104</text:p>
          </table:table-cell>
          <table:table-cell office:value-type="float" office:value="0.189486648004641" calcext:value-type="float">
            <text:p>0.189486648004641</text:p>
          </table:table-cell>
          <table:table-cell office:value-type="float" office:value="0.0189486648004641" calcext:value-type="float">
            <text:p>0.0189486648004641</text:p>
          </table:table-cell>
          <table:table-cell office:value-type="float" office:value="0.147836688244108" calcext:value-type="float">
            <text:p>0.147836688244108</text:p>
          </table:table-cell>
          <table:table-cell office:value-type="float" office:value="0.117611877686081" calcext:value-type="float">
            <text:p>0.117611877686081</text:p>
          </table:table-cell>
          <table:table-cell office:value-type="float" office:value="0.0117611877686081" calcext:value-type="float">
            <text:p>0.01176118776860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13817042463615" calcext:value-type="float">
            <text:p>-0.13817042463615</text:p>
          </table:table-cell>
          <table:table-cell office:value-type="float" office:value="0.17305737742271" calcext:value-type="float">
            <text:p>0.17305737742271</text:p>
          </table:table-cell>
          <table:table-cell office:value-type="float" office:value="0.017305737742271" calcext:value-type="float">
            <text:p>0.017305737742271</text:p>
          </table:table-cell>
          <table:table-cell office:value-type="float" office:value="0.182406623679431" calcext:value-type="float">
            <text:p>0.182406623679431</text:p>
          </table:table-cell>
          <table:table-cell office:value-type="float" office:value="0.124998008887683" calcext:value-type="float">
            <text:p>0.124998008887683</text:p>
          </table:table-cell>
          <table:table-cell office:value-type="float" office:value="0.0124998008887683" calcext:value-type="float">
            <text:p>0.012499800888768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-0.25899935150659" calcext:value-type="float">
            <text:p>-0.25899935150659</text:p>
          </table:table-cell>
          <table:table-cell office:value-type="float" office:value="0.221091757690605" calcext:value-type="float">
            <text:p>0.221091757690605</text:p>
          </table:table-cell>
          <table:table-cell office:value-type="float" office:value="0.0221091757690605" calcext:value-type="float">
            <text:p>0.0221091757690605</text:p>
          </table:table-cell>
          <table:table-cell office:value-type="float" office:value="0.290753737312453" calcext:value-type="float">
            <text:p>0.290753737312453</text:p>
          </table:table-cell>
          <table:table-cell office:value-type="float" office:value="0.176771489729027" calcext:value-type="float">
            <text:p>0.176771489729027</text:p>
          </table:table-cell>
          <table:table-cell office:value-type="float" office:value="0.0176771489729027" calcext:value-type="float">
            <text:p>0.017677148972902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060644947767623" calcext:value-type="float">
            <text:p>-0.060644947767623</text:p>
          </table:table-cell>
          <table:table-cell office:value-type="float" office:value="0.14661464476042" calcext:value-type="float">
            <text:p>0.14661464476042</text:p>
          </table:table-cell>
          <table:table-cell office:value-type="float" office:value="0.014661464476042" calcext:value-type="float">
            <text:p>0.014661464476042</text:p>
          </table:table-cell>
          <table:table-cell office:value-type="float" office:value="0.120621281277289" calcext:value-type="float">
            <text:p>0.120621281277289</text:p>
          </table:table-cell>
          <table:table-cell office:value-type="float" office:value="0.102539530245828" calcext:value-type="float">
            <text:p>0.102539530245828</text:p>
          </table:table-cell>
          <table:table-cell office:value-type="float" office:value="0.0102539530245828" calcext:value-type="float">
            <text:p>0.01025395302458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193451542046104" calcext:value-type="float">
            <text:p>-0.193451542046104</text:p>
          </table:table-cell>
          <table:table-cell office:value-type="float" office:value="0.139298724682094" calcext:value-type="float">
            <text:p>0.139298724682094</text:p>
          </table:table-cell>
          <table:table-cell office:value-type="float" office:value="0.0139298724682094" calcext:value-type="float">
            <text:p>0.0139298724682094</text:p>
          </table:table-cell>
          <table:table-cell office:value-type="float" office:value="0.20318118406268" calcext:value-type="float">
            <text:p>0.20318118406268</text:p>
          </table:table-cell>
          <table:table-cell office:value-type="float" office:value="0.124523329175985" calcext:value-type="float">
            <text:p>0.124523329175985</text:p>
          </table:table-cell>
          <table:table-cell office:value-type="float" office:value="0.0124523329175985" calcext:value-type="float">
            <text:p>0.01245233291759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0.294899643224405" calcext:value-type="float">
            <text:p>-0.294899643224405</text:p>
          </table:table-cell>
          <table:table-cell office:value-type="float" office:value="0.136475680584603" calcext:value-type="float">
            <text:p>0.136475680584603</text:p>
          </table:table-cell>
          <table:table-cell office:value-type="float" office:value="0.0136475680584603" calcext:value-type="float">
            <text:p>0.0136475680584603</text:p>
          </table:table-cell>
          <table:table-cell office:value-type="float" office:value="0.297458894762662" calcext:value-type="float">
            <text:p>0.297458894762662</text:p>
          </table:table-cell>
          <table:table-cell office:value-type="float" office:value="0.130745186587247" calcext:value-type="float">
            <text:p>0.130745186587247</text:p>
          </table:table-cell>
          <table:table-cell office:value-type="float" office:value="0.0130745186587247" calcext:value-type="float">
            <text:p>0.013074518658724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0533542841607447" calcext:value-type="float">
            <text:p>-0.0533542841607447</text:p>
          </table:table-cell>
          <table:table-cell office:value-type="float" office:value="0.214882382737022" calcext:value-type="float">
            <text:p>0.214882382737022</text:p>
          </table:table-cell>
          <table:table-cell office:value-type="float" office:value="0.0214882382737022" calcext:value-type="float">
            <text:p>0.0214882382737022</text:p>
          </table:table-cell>
          <table:table-cell office:value-type="float" office:value="0.174839509201052" calcext:value-type="float">
            <text:p>0.174839509201052</text:p>
          </table:table-cell>
          <table:table-cell office:value-type="float" office:value="0.13480445878515" calcext:value-type="float">
            <text:p>0.13480445878515</text:p>
          </table:table-cell>
          <table:table-cell office:value-type="float" office:value="0.013480445878515" calcext:value-type="float">
            <text:p>0.0134804458785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163526904599775" calcext:value-type="float">
            <text:p>-0.163526904599775</text:p>
          </table:table-cell>
          <table:table-cell office:value-type="float" office:value="0.181371930495251" calcext:value-type="float">
            <text:p>0.181371930495251</text:p>
          </table:table-cell>
          <table:table-cell office:value-type="float" office:value="0.0181371930495251" calcext:value-type="float">
            <text:p>0.0181371930495251</text:p>
          </table:table-cell>
          <table:table-cell office:value-type="float" office:value="0.204529438943169" calcext:value-type="float">
            <text:p>0.204529438943169</text:p>
          </table:table-cell>
          <table:table-cell office:value-type="float" office:value="0.132861196398799" calcext:value-type="float">
            <text:p>0.132861196398799</text:p>
          </table:table-cell>
          <table:table-cell office:value-type="float" office:value="0.0132861196398799" calcext:value-type="float">
            <text:p>0.01328611963987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Ensemble Method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-0.265392473684478" calcext:value-type="float">
            <text:p>-0.265392473684478</text:p>
          </table:table-cell>
          <table:table-cell office:value-type="float" office:value="0.192592472426521" calcext:value-type="float">
            <text:p>0.192592472426521</text:p>
          </table:table-cell>
          <table:table-cell office:value-type="float" office:value="0.0192592472426522" calcext:value-type="float">
            <text:p>0.0192592472426522</text:p>
          </table:table-cell>
          <table:table-cell office:value-type="float" office:value="0.284796827541301" calcext:value-type="float">
            <text:p>0.284796827541301</text:p>
          </table:table-cell>
          <table:table-cell office:value-type="float" office:value="0.162197267167327" calcext:value-type="float">
            <text:p>0.162197267167327</text:p>
          </table:table-cell>
          <table:table-cell office:value-type="float" office:value="0.0162197267167327" calcext:value-type="float">
            <text:p>0.016219726716732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16:48:06.856592900</meta:creation-date>
    <dc:date>2026-04-03T17:04:18.924104200</dc:date>
    <meta:editing-duration>PT5M54S</meta:editing-duration>
    <meta:editing-cycles>2</meta:editing-cycles>
    <meta:generator>LibreOffice/25.8.5.2$Windows_X86_64 LibreOffice_project/9c8b85f387cc00a89945a79c9e6239f32e450ac2</meta:generator>
    <meta:document-statistic meta:table-count="1" meta:cell-count="8655" meta:object-count="0"/>
  </office:meta>
</office:document-meta>
</file>