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ethod_key</text:p>
          </table:table-cell>
          <table:table-cell table:style-name="ce1" office:value-type="string" calcext:value-type="string">
            <text:p>beta_tru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_error</text:p>
          </table:table-cell>
          <table:table-cell table:style-name="ce1" office:value-type="string" calcext:value-type="string">
            <text:p>y_error</text:p>
          </table:table-cell>
          <table:table-cell table:style-name="ce1" office:value-type="string" calcext:value-type="string">
            <text:p>error_ratio</text:p>
          </table:table-cell>
          <table:table-cell table:style-name="ce1" office:value-type="string" calcext:value-type="string">
            <text:p>mean_bias</text:p>
          </table:table-cell>
          <table:table-cell table:style-name="ce1" office:value-type="string" calcext:value-type="string">
            <text:p>sd_bias</text:p>
          </table:table-cell>
          <table:table-cell table:style-name="ce1" office:value-type="string" calcext:value-type="string">
            <text:p>bias_s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d_rmse</text:p>
          </table:table-cell>
          <table:table-cell table:style-name="ce1" office:value-type="string" calcext:value-type="string">
            <text:p>rmse_se</text:p>
          </table:table-cell>
          <table:table-cell table:style-name="ce1" office:value-type="string" calcext:value-type="string">
            <text:p>n_sim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338589308654217" calcext:value-type="float">
            <text:p>-0.0338589308654217</text:p>
          </table:table-cell>
          <table:table-cell office:value-type="float" office:value="0.106200902980958" calcext:value-type="float">
            <text:p>0.106200902980958</text:p>
          </table:table-cell>
          <table:table-cell office:value-type="float" office:value="0.00613151199242376" calcext:value-type="float">
            <text:p>0.00613151199242376</text:p>
          </table:table-cell>
          <table:table-cell office:value-type="float" office:value="0.0892642244571701" calcext:value-type="float">
            <text:p>0.0892642244571701</text:p>
          </table:table-cell>
          <table:table-cell office:value-type="float" office:value="0.06658935545767" calcext:value-type="float">
            <text:p>0.06658935545767</text:p>
          </table:table-cell>
          <table:table-cell office:value-type="float" office:value="0.00384453822986494" calcext:value-type="float">
            <text:p>0.0038445382298649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507628836481234" calcext:value-type="float">
            <text:p>-0.0507628836481234</text:p>
          </table:table-cell>
          <table:table-cell office:value-type="float" office:value="0.112244337959067" calcext:value-type="float">
            <text:p>0.112244337959067</text:p>
          </table:table-cell>
          <table:table-cell office:value-type="float" office:value="0.00648042987356787" calcext:value-type="float">
            <text:p>0.00648042987356787</text:p>
          </table:table-cell>
          <table:table-cell office:value-type="float" office:value="0.0990156556942596" calcext:value-type="float">
            <text:p>0.0990156556942596</text:p>
          </table:table-cell>
          <table:table-cell office:value-type="float" office:value="0.0731258528205604" calcext:value-type="float">
            <text:p>0.0731258528205604</text:p>
          </table:table-cell>
          <table:table-cell office:value-type="float" office:value="0.00422192308106715" calcext:value-type="float">
            <text:p>0.0042219230810671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78097401915766" calcext:value-type="float">
            <text:p>-0.078097401915766</text:p>
          </table:table-cell>
          <table:table-cell office:value-type="float" office:value="0.116917863923768" calcext:value-type="float">
            <text:p>0.116917863923768</text:p>
          </table:table-cell>
          <table:table-cell office:value-type="float" office:value="0.00675025602094634" calcext:value-type="float">
            <text:p>0.00675025602094634</text:p>
          </table:table-cell>
          <table:table-cell office:value-type="float" office:value="0.114638610013461" calcext:value-type="float">
            <text:p>0.114638610013461</text:p>
          </table:table-cell>
          <table:table-cell office:value-type="float" office:value="0.0812614647120423" calcext:value-type="float">
            <text:p>0.0812614647120423</text:p>
          </table:table-cell>
          <table:table-cell office:value-type="float" office:value="0.00469163285262409" calcext:value-type="float">
            <text:p>0.0046916328526240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0680429825933419" calcext:value-type="float">
            <text:p>-0.0680429825933419</text:p>
          </table:table-cell>
          <table:table-cell office:value-type="float" office:value="0.091199287418976" calcext:value-type="float">
            <text:p>0.091199287418976</text:p>
          </table:table-cell>
          <table:table-cell office:value-type="float" office:value="0.00526539331412479" calcext:value-type="float">
            <text:p>0.00526539331412479</text:p>
          </table:table-cell>
          <table:table-cell office:value-type="float" office:value="0.0918886893405369" calcext:value-type="float">
            <text:p>0.0918886893405369</text:p>
          </table:table-cell>
          <table:table-cell office:value-type="float" office:value="0.06701396482868" calcext:value-type="float">
            <text:p>0.06701396482868</text:p>
          </table:table-cell>
          <table:table-cell office:value-type="float" office:value="0.00386905306333025" calcext:value-type="float">
            <text:p>0.0038690530633302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13495443274563" calcext:value-type="float">
            <text:p>-0.113495443274563</text:p>
          </table:table-cell>
          <table:table-cell office:value-type="float" office:value="0.102688881188645" calcext:value-type="float">
            <text:p>0.102688881188645</text:p>
          </table:table-cell>
          <table:table-cell office:value-type="float" office:value="0.00592874531970456" calcext:value-type="float">
            <text:p>0.00592874531970456</text:p>
          </table:table-cell>
          <table:table-cell office:value-type="float" office:value="0.130519919963446" calcext:value-type="float">
            <text:p>0.130519919963446</text:p>
          </table:table-cell>
          <table:table-cell office:value-type="float" office:value="0.0798553611090771" calcext:value-type="float">
            <text:p>0.0798553611090771</text:p>
          </table:table-cell>
          <table:table-cell office:value-type="float" office:value="0.00461045142325604" calcext:value-type="float">
            <text:p>0.0046104514232560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60617827657868" calcext:value-type="float">
            <text:p>-0.160617827657868</text:p>
          </table:table-cell>
          <table:table-cell office:value-type="float" office:value="0.114262023294546" calcext:value-type="float">
            <text:p>0.114262023294546</text:p>
          </table:table-cell>
          <table:table-cell office:value-type="float" office:value="0.00659692099072571" calcext:value-type="float">
            <text:p>0.00659692099072571</text:p>
          </table:table-cell>
          <table:table-cell office:value-type="float" office:value="0.16971817577924" calcext:value-type="float">
            <text:p>0.16971817577924</text:p>
          </table:table-cell>
          <table:table-cell office:value-type="float" office:value="0.100197720782486" calcext:value-type="float">
            <text:p>0.100197720782486</text:p>
          </table:table-cell>
          <table:table-cell office:value-type="float" office:value="0.00578491810659552" calcext:value-type="float">
            <text:p>0.0057849181065955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09860820176148" calcext:value-type="float">
            <text:p>-0.109860820176148</text:p>
          </table:table-cell>
          <table:table-cell office:value-type="float" office:value="0.0790533411727679" calcext:value-type="float">
            <text:p>0.0790533411727679</text:p>
          </table:table-cell>
          <table:table-cell office:value-type="float" office:value="0.00456414678064369" calcext:value-type="float">
            <text:p>0.00456414678064369</text:p>
          </table:table-cell>
          <table:table-cell office:value-type="float" office:value="0.116435377320041" calcext:value-type="float">
            <text:p>0.116435377320041</text:p>
          </table:table-cell>
          <table:table-cell office:value-type="float" office:value="0.0689685258509393" calcext:value-type="float">
            <text:p>0.0689685258509393</text:p>
          </table:table-cell>
          <table:table-cell office:value-type="float" office:value="0.00398189969656515" calcext:value-type="float">
            <text:p>0.0039818996965651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8885094328449" calcext:value-type="float">
            <text:p>-0.18885094328449</text:p>
          </table:table-cell>
          <table:table-cell office:value-type="float" office:value="0.0951122410725496" calcext:value-type="float">
            <text:p>0.0951122410725496</text:p>
          </table:table-cell>
          <table:table-cell office:value-type="float" office:value="0.00549130779864651" calcext:value-type="float">
            <text:p>0.00549130779864651</text:p>
          </table:table-cell>
          <table:table-cell office:value-type="float" office:value="0.192653837147665" calcext:value-type="float">
            <text:p>0.192653837147665</text:p>
          </table:table-cell>
          <table:table-cell office:value-type="float" office:value="0.0871244165859613" calcext:value-type="float">
            <text:p>0.0871244165859613</text:p>
          </table:table-cell>
          <table:table-cell office:value-type="float" office:value="0.00503013053688939" calcext:value-type="float">
            <text:p>0.0050301305368893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61488154334643" calcext:value-type="float">
            <text:p>-0.261488154334643</text:p>
          </table:table-cell>
          <table:table-cell office:value-type="float" office:value="0.113746985328174" calcext:value-type="float">
            <text:p>0.113746985328174</text:p>
          </table:table-cell>
          <table:table-cell office:value-type="float" office:value="0.00656718525987294" calcext:value-type="float">
            <text:p>0.00656718525987294</text:p>
          </table:table-cell>
          <table:table-cell office:value-type="float" office:value="0.261572539574061" calcext:value-type="float">
            <text:p>0.261572539574061</text:p>
          </table:table-cell>
          <table:table-cell office:value-type="float" office:value="0.113552148586542" calcext:value-type="float">
            <text:p>0.113552148586542</text:p>
          </table:table-cell>
          <table:table-cell office:value-type="float" office:value="0.00655593635535002" calcext:value-type="float">
            <text:p>0.0065559363553500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324003938380618" calcext:value-type="float">
            <text:p>-0.0324003938380618</text:p>
          </table:table-cell>
          <table:table-cell office:value-type="float" office:value="0.0751030680511577" calcext:value-type="float">
            <text:p>0.0751030680511577</text:p>
          </table:table-cell>
          <table:table-cell office:value-type="float" office:value="0.00433607765563027" calcext:value-type="float">
            <text:p>0.00433607765563027</text:p>
          </table:table-cell>
          <table:table-cell office:value-type="float" office:value="0.0637057672314484" calcext:value-type="float">
            <text:p>0.0637057672314484</text:p>
          </table:table-cell>
          <table:table-cell office:value-type="float" office:value="0.051203215078317" calcext:value-type="float">
            <text:p>0.051203215078317</text:p>
          </table:table-cell>
          <table:table-cell office:value-type="float" office:value="0.00295621900088406" calcext:value-type="float">
            <text:p>0.0029562190008840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540793799979972" calcext:value-type="float">
            <text:p>-0.0540793799979972</text:p>
          </table:table-cell>
          <table:table-cell office:value-type="float" office:value="0.0756818118521741" calcext:value-type="float">
            <text:p>0.0756818118521741</text:p>
          </table:table-cell>
          <table:table-cell office:value-type="float" office:value="0.00436949144456113" calcext:value-type="float">
            <text:p>0.00436949144456113</text:p>
          </table:table-cell>
          <table:table-cell office:value-type="float" office:value="0.0768856126563408" calcext:value-type="float">
            <text:p>0.0768856126563408</text:p>
          </table:table-cell>
          <table:table-cell office:value-type="float" office:value="0.0522582930690014" calcext:value-type="float">
            <text:p>0.0522582930690014</text:p>
          </table:table-cell>
          <table:table-cell office:value-type="float" office:value="0.00301713395707783" calcext:value-type="float">
            <text:p>0.0030171339570778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808351014243397" calcext:value-type="float">
            <text:p>-0.0808351014243397</text:p>
          </table:table-cell>
          <table:table-cell office:value-type="float" office:value="0.0851917665086101" calcext:value-type="float">
            <text:p>0.0851917665086101</text:p>
          </table:table-cell>
          <table:table-cell office:value-type="float" office:value="0.00491854893264858" calcext:value-type="float">
            <text:p>0.00491854893264858</text:p>
          </table:table-cell>
          <table:table-cell office:value-type="float" office:value="0.0956076809335289" calcext:value-type="float">
            <text:p>0.0956076809335289</text:p>
          </table:table-cell>
          <table:table-cell office:value-type="float" office:value="0.0681351936085708" calcext:value-type="float">
            <text:p>0.0681351936085708</text:p>
          </table:table-cell>
          <table:table-cell office:value-type="float" office:value="0.00393378723711956" calcext:value-type="float">
            <text:p>0.0039337872371195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0698047318939271" calcext:value-type="float">
            <text:p>-0.0698047318939271</text:p>
          </table:table-cell>
          <table:table-cell office:value-type="float" office:value="0.0636194074582539" calcext:value-type="float">
            <text:p>0.0636194074582539</text:p>
          </table:table-cell>
          <table:table-cell office:value-type="float" office:value="0.00367306820217073" calcext:value-type="float">
            <text:p>0.00367306820217073</text:p>
          </table:table-cell>
          <table:table-cell office:value-type="float" office:value="0.0774252958770545" calcext:value-type="float">
            <text:p>0.0774252958770545</text:p>
          </table:table-cell>
          <table:table-cell office:value-type="float" office:value="0.0540527587722538" calcext:value-type="float">
            <text:p>0.0540527587722538</text:p>
          </table:table-cell>
          <table:table-cell office:value-type="float" office:value="0.00312073748276026" calcext:value-type="float">
            <text:p>0.0031207374827602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15776934863798" calcext:value-type="float">
            <text:p>-0.115776934863798</text:p>
          </table:table-cell>
          <table:table-cell office:value-type="float" office:value="0.0687048521432494" calcext:value-type="float">
            <text:p>0.0687048521432494</text:p>
          </table:table-cell>
          <table:table-cell office:value-type="float" office:value="0.00396667648795385" calcext:value-type="float">
            <text:p>0.00396667648795385</text:p>
          </table:table-cell>
          <table:table-cell office:value-type="float" office:value="0.118987532385898" calcext:value-type="float">
            <text:p>0.118987532385898</text:p>
          </table:table-cell>
          <table:table-cell office:value-type="float" office:value="0.0629611121325951" calcext:value-type="float">
            <text:p>0.0629611121325951</text:p>
          </table:table-cell>
          <table:table-cell office:value-type="float" office:value="0.0036350615038232" calcext:value-type="float">
            <text:p>0.003635061503823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68014204266113" calcext:value-type="float">
            <text:p>-0.168014204266113</text:p>
          </table:table-cell>
          <table:table-cell office:value-type="float" office:value="0.081687561971943" calcext:value-type="float">
            <text:p>0.081687561971943</text:p>
          </table:table-cell>
          <table:table-cell office:value-type="float" office:value="0.00471623358939455" calcext:value-type="float">
            <text:p>0.00471623358939455</text:p>
          </table:table-cell>
          <table:table-cell office:value-type="float" office:value="0.169260002569004" calcext:value-type="float">
            <text:p>0.169260002569004</text:p>
          </table:table-cell>
          <table:table-cell office:value-type="float" office:value="0.0790650167694607" calcext:value-type="float">
            <text:p>0.0790650167694607</text:p>
          </table:table-cell>
          <table:table-cell office:value-type="float" office:value="0.00456482087153304" calcext:value-type="float">
            <text:p>0.0045648208715330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14521385079964" calcext:value-type="float">
            <text:p>-0.114521385079964</text:p>
          </table:table-cell>
          <table:table-cell office:value-type="float" office:value="0.0549457141809276" calcext:value-type="float">
            <text:p>0.0549457141809276</text:p>
          </table:table-cell>
          <table:table-cell office:value-type="float" office:value="0.00317229228731748" calcext:value-type="float">
            <text:p>0.00317229228731748</text:p>
          </table:table-cell>
          <table:table-cell office:value-type="float" office:value="0.114740712096949" calcext:value-type="float">
            <text:p>0.114740712096949</text:p>
          </table:table-cell>
          <table:table-cell office:value-type="float" office:value="0.0544846764068425" calcext:value-type="float">
            <text:p>0.0544846764068425</text:p>
          </table:table-cell>
          <table:table-cell office:value-type="float" office:value="0.00314567425902001" calcext:value-type="float">
            <text:p>0.0031456742590200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89662593676501" calcext:value-type="float">
            <text:p>-0.189662593676501</text:p>
          </table:table-cell>
          <table:table-cell office:value-type="float" office:value="0.0638331064882672" calcext:value-type="float">
            <text:p>0.0638331064882672</text:p>
          </table:table-cell>
          <table:table-cell office:value-type="float" office:value="0.00368540612142111" calcext:value-type="float">
            <text:p>0.00368540612142111</text:p>
          </table:table-cell>
          <table:table-cell office:value-type="float" office:value="0.189662593676501" calcext:value-type="float">
            <text:p>0.189662593676501</text:p>
          </table:table-cell>
          <table:table-cell office:value-type="float" office:value="0.0638331064882672" calcext:value-type="float">
            <text:p>0.0638331064882672</text:p>
          </table:table-cell>
          <table:table-cell office:value-type="float" office:value="0.00368540612142111" calcext:value-type="float">
            <text:p>0.0036854061214211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LS</text:p>
          </table:table-cell>
          <table:table-cell office:value-type="string" calcext:value-type="string">
            <text:p>ols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71772564192067" calcext:value-type="float">
            <text:p>-0.271772564192067</text:p>
          </table:table-cell>
          <table:table-cell office:value-type="float" office:value="0.081756758082377" calcext:value-type="float">
            <text:p>0.081756758082377</text:p>
          </table:table-cell>
          <table:table-cell office:value-type="float" office:value="0.00472022862869314" calcext:value-type="float">
            <text:p>0.00472022862869314</text:p>
          </table:table-cell>
          <table:table-cell office:value-type="float" office:value="0.271772564192067" calcext:value-type="float">
            <text:p>0.271772564192067</text:p>
          </table:table-cell>
          <table:table-cell office:value-type="float" office:value="0.081756758082377" calcext:value-type="float">
            <text:p>0.081756758082377</text:p>
          </table:table-cell>
          <table:table-cell office:value-type="float" office:value="0.00472022862869314" calcext:value-type="float">
            <text:p>0.0047202286286931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183173737074992" calcext:value-type="float">
            <text:p>0.0183173737074992</text:p>
          </table:table-cell>
          <table:table-cell office:value-type="float" office:value="0.117181349037337" calcext:value-type="float">
            <text:p>0.117181349037337</text:p>
          </table:table-cell>
          <table:table-cell office:value-type="float" office:value="0.006765468341071" calcext:value-type="float">
            <text:p>0.006765468341071</text:p>
          </table:table-cell>
          <table:table-cell office:value-type="float" office:value="0.0941058922309294" calcext:value-type="float">
            <text:p>0.0941058922309294</text:p>
          </table:table-cell>
          <table:table-cell office:value-type="float" office:value="0.0719901346871311" calcext:value-type="float">
            <text:p>0.0719901346871311</text:p>
          </table:table-cell>
          <table:table-cell office:value-type="float" office:value="0.00415635236406126" calcext:value-type="float">
            <text:p>0.0041563523640612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336911880357692" calcext:value-type="float">
            <text:p>0.0336911880357692</text:p>
          </table:table-cell>
          <table:table-cell office:value-type="float" office:value="0.121541528551132" calcext:value-type="float">
            <text:p>0.121541528551132</text:p>
          </table:table-cell>
          <table:table-cell office:value-type="float" office:value="0.00701720342267149" calcext:value-type="float">
            <text:p>0.00701720342267149</text:p>
          </table:table-cell>
          <table:table-cell office:value-type="float" office:value="0.0992729370394849" calcext:value-type="float">
            <text:p>0.0992729370394849</text:p>
          </table:table-cell>
          <table:table-cell office:value-type="float" office:value="0.0776090158376217" calcext:value-type="float">
            <text:p>0.0776090158376217</text:p>
          </table:table-cell>
          <table:table-cell office:value-type="float" office:value="0.00448075861853928" calcext:value-type="float">
            <text:p>0.0044807586185392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344674546036354" calcext:value-type="float">
            <text:p>0.0344674546036354</text:p>
          </table:table-cell>
          <table:table-cell office:value-type="float" office:value="0.126056965592587" calcext:value-type="float">
            <text:p>0.126056965592587</text:p>
          </table:table-cell>
          <table:table-cell office:value-type="float" office:value="0.00727790230181076" calcext:value-type="float">
            <text:p>0.00727790230181076</text:p>
          </table:table-cell>
          <table:table-cell office:value-type="float" office:value="0.104751158343361" calcext:value-type="float">
            <text:p>0.104751158343361</text:p>
          </table:table-cell>
          <table:table-cell office:value-type="float" office:value="0.0779283885642528" calcext:value-type="float">
            <text:p>0.0779283885642528</text:p>
          </table:table-cell>
          <table:table-cell office:value-type="float" office:value="0.00449919761150851" calcext:value-type="float">
            <text:p>0.0044991976115085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668278880372772" calcext:value-type="float">
            <text:p>0.0668278880372772</text:p>
          </table:table-cell>
          <table:table-cell office:value-type="float" office:value="0.117238550389229" calcext:value-type="float">
            <text:p>0.117238550389229</text:p>
          </table:table-cell>
          <table:table-cell office:value-type="float" office:value="0.00676877086266229" calcext:value-type="float">
            <text:p>0.00676877086266229</text:p>
          </table:table-cell>
          <table:table-cell office:value-type="float" office:value="0.10774826854142" calcext:value-type="float">
            <text:p>0.10774826854142</text:p>
          </table:table-cell>
          <table:table-cell office:value-type="float" office:value="0.0811003261021294" calcext:value-type="float">
            <text:p>0.0811003261021294</text:p>
          </table:table-cell>
          <table:table-cell office:value-type="float" office:value="0.00468232951064309" calcext:value-type="float">
            <text:p>0.0046823295106430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780087252946278" calcext:value-type="float">
            <text:p>0.0780087252946278</text:p>
          </table:table-cell>
          <table:table-cell office:value-type="float" office:value="0.122902303219225" calcext:value-type="float">
            <text:p>0.122902303219225</text:p>
          </table:table-cell>
          <table:table-cell office:value-type="float" office:value="0.00709576778476448" calcext:value-type="float">
            <text:p>0.00709576778476448</text:p>
          </table:table-cell>
          <table:table-cell office:value-type="float" office:value="0.108240568594378" calcext:value-type="float">
            <text:p>0.108240568594378</text:p>
          </table:table-cell>
          <table:table-cell office:value-type="float" office:value="0.0972393183441432" calcext:value-type="float">
            <text:p>0.0972393183441432</text:p>
          </table:table-cell>
          <table:table-cell office:value-type="float" office:value="0.00561411466218068" calcext:value-type="float">
            <text:p>0.0056141146621806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759728521154013" calcext:value-type="float">
            <text:p>0.0759728521154013</text:p>
          </table:table-cell>
          <table:table-cell office:value-type="float" office:value="0.137347745978596" calcext:value-type="float">
            <text:p>0.137347745978596</text:p>
          </table:table-cell>
          <table:table-cell office:value-type="float" office:value="0.00792977581133308" calcext:value-type="float">
            <text:p>0.00792977581133308</text:p>
          </table:table-cell>
          <table:table-cell office:value-type="float" office:value="0.121798171759208" calcext:value-type="float">
            <text:p>0.121798171759208</text:p>
          </table:table-cell>
          <table:table-cell office:value-type="float" office:value="0.0988492396002344" calcext:value-type="float">
            <text:p>0.0988492396002344</text:p>
          </table:table-cell>
          <table:table-cell office:value-type="float" office:value="0.00570706350923851" calcext:value-type="float">
            <text:p>0.0057070635092385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52615826252056" calcext:value-type="float">
            <text:p>0.152615826252056</text:p>
          </table:table-cell>
          <table:table-cell office:value-type="float" office:value="0.125313012107546" calcext:value-type="float">
            <text:p>0.125313012107546</text:p>
          </table:table-cell>
          <table:table-cell office:value-type="float" office:value="0.00723495012732543" calcext:value-type="float">
            <text:p>0.00723495012732543</text:p>
          </table:table-cell>
          <table:table-cell office:value-type="float" office:value="0.162558847828418" calcext:value-type="float">
            <text:p>0.162558847828418</text:p>
          </table:table-cell>
          <table:table-cell office:value-type="float" office:value="0.112067307991602" calcext:value-type="float">
            <text:p>0.112067307991602</text:p>
          </table:table-cell>
          <table:table-cell office:value-type="float" office:value="0.00647020904363079" calcext:value-type="float">
            <text:p>0.0064702090436307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23967837154001" calcext:value-type="float">
            <text:p>0.123967837154001</text:p>
          </table:table-cell>
          <table:table-cell office:value-type="float" office:value="0.134828661737254" calcext:value-type="float">
            <text:p>0.134828661737254</text:p>
          </table:table-cell>
          <table:table-cell office:value-type="float" office:value="0.00778433641484803" calcext:value-type="float">
            <text:p>0.00778433641484803</text:p>
          </table:table-cell>
          <table:table-cell office:value-type="float" office:value="0.140343076593441" calcext:value-type="float">
            <text:p>0.140343076593441</text:p>
          </table:table-cell>
          <table:table-cell office:value-type="float" office:value="0.117627114619377" calcext:value-type="float">
            <text:p>0.117627114619377</text:p>
          </table:table-cell>
          <table:table-cell office:value-type="float" office:value="0.00679120462894961" calcext:value-type="float">
            <text:p>0.0067912046289496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06898765742752" calcext:value-type="float">
            <text:p>0.106898765742752</text:p>
          </table:table-cell>
          <table:table-cell office:value-type="float" office:value="0.158067311654881" calcext:value-type="float">
            <text:p>0.158067311654881</text:p>
          </table:table-cell>
          <table:table-cell office:value-type="float" office:value="0.00912602049340259" calcext:value-type="float">
            <text:p>0.00912602049340259</text:p>
          </table:table-cell>
          <table:table-cell office:value-type="float" office:value="0.144178661341474" calcext:value-type="float">
            <text:p>0.144178661341474</text:p>
          </table:table-cell>
          <table:table-cell office:value-type="float" office:value="0.124875257469014" calcext:value-type="float">
            <text:p>0.124875257469014</text:p>
          </table:table-cell>
          <table:table-cell office:value-type="float" office:value="0.00720967635148591" calcext:value-type="float">
            <text:p>0.0072096763514859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21594056637108" calcext:value-type="float">
            <text:p>0.021594056637108</text:p>
          </table:table-cell>
          <table:table-cell office:value-type="float" office:value="0.0821880346054593" calcext:value-type="float">
            <text:p>0.0821880346054593</text:p>
          </table:table-cell>
          <table:table-cell office:value-type="float" office:value="0.00474512839036282" calcext:value-type="float">
            <text:p>0.00474512839036282</text:p>
          </table:table-cell>
          <table:table-cell office:value-type="float" office:value="0.0676941774684709" calcext:value-type="float">
            <text:p>0.0676941774684709</text:p>
          </table:table-cell>
          <table:table-cell office:value-type="float" office:value="0.0512338569839558" calcext:value-type="float">
            <text:p>0.0512338569839558</text:p>
          </table:table-cell>
          <table:table-cell office:value-type="float" office:value="0.00295798811213097" calcext:value-type="float">
            <text:p>0.0029579881121309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311692141717251" calcext:value-type="float">
            <text:p>0.0311692141717251</text:p>
          </table:table-cell>
          <table:table-cell office:value-type="float" office:value="0.0829974368960013" calcext:value-type="float">
            <text:p>0.0829974368960013</text:p>
          </table:table-cell>
          <table:table-cell office:value-type="float" office:value="0.00479185925339553" calcext:value-type="float">
            <text:p>0.00479185925339553</text:p>
          </table:table-cell>
          <table:table-cell office:value-type="float" office:value="0.0692065249475537" calcext:value-type="float">
            <text:p>0.0692065249475537</text:p>
          </table:table-cell>
          <table:table-cell office:value-type="float" office:value="0.0552972154793267" calcext:value-type="float">
            <text:p>0.0552972154793267</text:p>
          </table:table-cell>
          <table:table-cell office:value-type="float" office:value="0.0031925862242426" calcext:value-type="float">
            <text:p>0.003192586224242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298178859801035" calcext:value-type="float">
            <text:p>0.0298178859801035</text:p>
          </table:table-cell>
          <table:table-cell office:value-type="float" office:value="0.0908963333124973" calcext:value-type="float">
            <text:p>0.0908963333124973</text:p>
          </table:table-cell>
          <table:table-cell office:value-type="float" office:value="0.00524790225063203" calcext:value-type="float">
            <text:p>0.00524790225063203</text:p>
          </table:table-cell>
          <table:table-cell office:value-type="float" office:value="0.0770861279291374" calcext:value-type="float">
            <text:p>0.0770861279291374</text:p>
          </table:table-cell>
          <table:table-cell office:value-type="float" office:value="0.0564984813792968" calcext:value-type="float">
            <text:p>0.0564984813792968</text:p>
          </table:table-cell>
          <table:table-cell office:value-type="float" office:value="0.00326194134331421" calcext:value-type="float">
            <text:p>0.0032619413433142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684896187877083" calcext:value-type="float">
            <text:p>0.0684896187877083</text:p>
          </table:table-cell>
          <table:table-cell office:value-type="float" office:value="0.0808411792224788" calcext:value-type="float">
            <text:p>0.0808411792224788</text:p>
          </table:table-cell>
          <table:table-cell office:value-type="float" office:value="0.00466736765857049" calcext:value-type="float">
            <text:p>0.00466736765857049</text:p>
          </table:table-cell>
          <table:table-cell office:value-type="float" office:value="0.0876168831970592" calcext:value-type="float">
            <text:p>0.0876168831970592</text:p>
          </table:table-cell>
          <table:table-cell office:value-type="float" office:value="0.0594930219713492" calcext:value-type="float">
            <text:p>0.0594930219713492</text:p>
          </table:table-cell>
          <table:table-cell office:value-type="float" office:value="0.00343483122500628" calcext:value-type="float">
            <text:p>0.0034348312250062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761085911577518" calcext:value-type="float">
            <text:p>0.0761085911577518</text:p>
          </table:table-cell>
          <table:table-cell office:value-type="float" office:value="0.0872919998271953" calcext:value-type="float">
            <text:p>0.0872919998271953</text:p>
          </table:table-cell>
          <table:table-cell office:value-type="float" office:value="0.0050398059598332" calcext:value-type="float">
            <text:p>0.0050398059598332</text:p>
          </table:table-cell>
          <table:table-cell office:value-type="float" office:value="0.0923140265575365" calcext:value-type="float">
            <text:p>0.0923140265575365</text:p>
          </table:table-cell>
          <table:table-cell office:value-type="float" office:value="0.0698670385953023" calcext:value-type="float">
            <text:p>0.0698670385953023</text:p>
          </table:table-cell>
          <table:table-cell office:value-type="float" office:value="0.00403377535404798" calcext:value-type="float">
            <text:p>0.0040337753540479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633115905006726" calcext:value-type="float">
            <text:p>0.0633115905006726</text:p>
          </table:table-cell>
          <table:table-cell office:value-type="float" office:value="0.0936685187023627" calcext:value-type="float">
            <text:p>0.0936685187023627</text:p>
          </table:table-cell>
          <table:table-cell office:value-type="float" office:value="0.00540795444874026" calcext:value-type="float">
            <text:p>0.00540795444874026</text:p>
          </table:table-cell>
          <table:table-cell office:value-type="float" office:value="0.0903880590228353" calcext:value-type="float">
            <text:p>0.0903880590228353</text:p>
          </table:table-cell>
          <table:table-cell office:value-type="float" office:value="0.0678102435685589" calcext:value-type="float">
            <text:p>0.0678102435685589</text:p>
          </table:table-cell>
          <table:table-cell office:value-type="float" office:value="0.00391502623781216" calcext:value-type="float">
            <text:p>0.0039150262378121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51062933025141" calcext:value-type="float">
            <text:p>0.151062933025141</text:p>
          </table:table-cell>
          <table:table-cell office:value-type="float" office:value="0.0864521072711835" calcext:value-type="float">
            <text:p>0.0864521072711835</text:p>
          </table:table-cell>
          <table:table-cell office:value-type="float" office:value="0.00499131474050282" calcext:value-type="float">
            <text:p>0.00499131474050282</text:p>
          </table:table-cell>
          <table:table-cell office:value-type="float" office:value="0.152224610233108" calcext:value-type="float">
            <text:p>0.152224610233108</text:p>
          </table:table-cell>
          <table:table-cell office:value-type="float" office:value="0.084382855426676" calcext:value-type="float">
            <text:p>0.084382855426676</text:p>
          </table:table-cell>
          <table:table-cell office:value-type="float" office:value="0.00487184642955806" calcext:value-type="float">
            <text:p>0.0048718464295580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19341863016748" calcext:value-type="float">
            <text:p>0.119341863016748</text:p>
          </table:table-cell>
          <table:table-cell office:value-type="float" office:value="0.099182325123906" calcext:value-type="float">
            <text:p>0.099182325123906</text:p>
          </table:table-cell>
          <table:table-cell office:value-type="float" office:value="0.00572629421091401" calcext:value-type="float">
            <text:p>0.00572629421091401</text:p>
          </table:table-cell>
          <table:table-cell office:value-type="float" office:value="0.127148235412106" calcext:value-type="float">
            <text:p>0.127148235412106</text:p>
          </table:table-cell>
          <table:table-cell office:value-type="float" office:value="0.0889185283679054" calcext:value-type="float">
            <text:p>0.0889185283679054</text:p>
          </table:table-cell>
          <table:table-cell office:value-type="float" office:value="0.00513371362891556" calcext:value-type="float">
            <text:p>0.0051337136289155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ODR</text:p>
          </table:table-cell>
          <table:table-cell office:value-type="string" calcext:value-type="string">
            <text:p>odr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868742814278114" calcext:value-type="float">
            <text:p>0.0868742814278114</text:p>
          </table:table-cell>
          <table:table-cell office:value-type="float" office:value="0.102702304722703" calcext:value-type="float">
            <text:p>0.102702304722703</text:p>
          </table:table-cell>
          <table:table-cell office:value-type="float" office:value="0.00592952032780478" calcext:value-type="float">
            <text:p>0.00592952032780478</text:p>
          </table:table-cell>
          <table:table-cell office:value-type="float" office:value="0.107085748080731" calcext:value-type="float">
            <text:p>0.107085748080731</text:p>
          </table:table-cell>
          <table:table-cell office:value-type="float" office:value="0.0813291807066038" calcext:value-type="float">
            <text:p>0.0813291807066038</text:p>
          </table:table-cell>
          <table:table-cell office:value-type="float" office:value="0.00469554243739294" calcext:value-type="float">
            <text:p>0.0046955424373929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36846873549122" calcext:value-type="float">
            <text:p>-0.236846873549122</text:p>
          </table:table-cell>
          <table:table-cell office:value-type="float" office:value="0.119144647405528" calcext:value-type="float">
            <text:p>0.119144647405528</text:p>
          </table:table-cell>
          <table:table-cell office:value-type="float" office:value="0.00687881942520847" calcext:value-type="float">
            <text:p>0.00687881942520847</text:p>
          </table:table-cell>
          <table:table-cell office:value-type="float" office:value="0.238895638906558" calcext:value-type="float">
            <text:p>0.238895638906558</text:p>
          </table:table-cell>
          <table:table-cell office:value-type="float" office:value="0.114967397167613" calcext:value-type="float">
            <text:p>0.114967397167613</text:p>
          </table:table-cell>
          <table:table-cell office:value-type="float" office:value="0.00663764577027519" calcext:value-type="float">
            <text:p>0.0066376457702751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16900491165745" calcext:value-type="float">
            <text:p>-0.216900491165745</text:p>
          </table:table-cell>
          <table:table-cell office:value-type="float" office:value="0.123944485848269" calcext:value-type="float">
            <text:p>0.123944485848269</text:p>
          </table:table-cell>
          <table:table-cell office:value-type="float" office:value="0.0071559382269068" calcext:value-type="float">
            <text:p>0.0071559382269068</text:p>
          </table:table-cell>
          <table:table-cell office:value-type="float" office:value="0.219628930066825" calcext:value-type="float">
            <text:p>0.219628930066825</text:p>
          </table:table-cell>
          <table:table-cell office:value-type="float" office:value="0.119026082408744" calcext:value-type="float">
            <text:p>0.119026082408744</text:p>
          </table:table-cell>
          <table:table-cell office:value-type="float" office:value="0.0068719740719275" calcext:value-type="float">
            <text:p>0.006871974071927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10404198303481" calcext:value-type="float">
            <text:p>-0.210404198303481</text:p>
          </table:table-cell>
          <table:table-cell office:value-type="float" office:value="0.129357494241055" calcext:value-type="float">
            <text:p>0.129357494241055</text:p>
          </table:table-cell>
          <table:table-cell office:value-type="float" office:value="0.00746845841217687" calcext:value-type="float">
            <text:p>0.00746845841217687</text:p>
          </table:table-cell>
          <table:table-cell office:value-type="float" office:value="0.215572434413783" calcext:value-type="float">
            <text:p>0.215572434413783</text:p>
          </table:table-cell>
          <table:table-cell office:value-type="float" office:value="0.120517428054198" calcext:value-type="float">
            <text:p>0.120517428054198</text:p>
          </table:table-cell>
          <table:table-cell office:value-type="float" office:value="0.00695807695291327" calcext:value-type="float">
            <text:p>0.0069580769529132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18667115955273" calcext:value-type="float">
            <text:p>-0.118667115955273</text:p>
          </table:table-cell>
          <table:table-cell office:value-type="float" office:value="0.106030370154564" calcext:value-type="float">
            <text:p>0.106030370154564</text:p>
          </table:table-cell>
          <table:table-cell office:value-type="float" office:value="0.00612166627510132" calcext:value-type="float">
            <text:p>0.00612166627510132</text:p>
          </table:table-cell>
          <table:table-cell office:value-type="float" office:value="0.132168012030064" calcext:value-type="float">
            <text:p>0.132168012030064</text:p>
          </table:table-cell>
          <table:table-cell office:value-type="float" office:value="0.088569827349286" calcext:value-type="float">
            <text:p>0.088569827349286</text:p>
          </table:table-cell>
          <table:table-cell office:value-type="float" office:value="0.0051135813662189" calcext:value-type="float">
            <text:p>0.005113581366218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0029750941575" calcext:value-type="float">
            <text:p>-0.10029750941575</text:p>
          </table:table-cell>
          <table:table-cell office:value-type="float" office:value="0.122038677798173" calcext:value-type="float">
            <text:p>0.122038677798173</text:p>
          </table:table-cell>
          <table:table-cell office:value-type="float" office:value="0.00704590634783209" calcext:value-type="float">
            <text:p>0.00704590634783209</text:p>
          </table:table-cell>
          <table:table-cell office:value-type="float" office:value="0.131006518300644" calcext:value-type="float">
            <text:p>0.131006518300644</text:p>
          </table:table-cell>
          <table:table-cell office:value-type="float" office:value="0.0881281180489261" calcext:value-type="float">
            <text:p>0.0881281180489261</text:p>
          </table:table-cell>
          <table:table-cell office:value-type="float" office:value="0.00508807926787226" calcext:value-type="float">
            <text:p>0.0050880792678722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0839163069385057" calcext:value-type="float">
            <text:p>-0.0839163069385057</text:p>
          </table:table-cell>
          <table:table-cell office:value-type="float" office:value="0.137970291935716" calcext:value-type="float">
            <text:p>0.137970291935716</text:p>
          </table:table-cell>
          <table:table-cell office:value-type="float" office:value="0.00796571851892566" calcext:value-type="float">
            <text:p>0.00796571851892566</text:p>
          </table:table-cell>
          <table:table-cell office:value-type="float" office:value="0.131784413546079" calcext:value-type="float">
            <text:p>0.131784413546079</text:p>
          </table:table-cell>
          <table:table-cell office:value-type="float" office:value="0.0931454989881772" calcext:value-type="float">
            <text:p>0.0931454989881772</text:p>
          </table:table-cell>
          <table:table-cell office:value-type="float" office:value="0.00537775789146261" calcext:value-type="float">
            <text:p>0.0053777578914626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0264062509414126" calcext:value-type="float">
            <text:p>-0.0264062509414126</text:p>
          </table:table-cell>
          <table:table-cell office:value-type="float" office:value="0.111174813205138" calcext:value-type="float">
            <text:p>0.111174813205138</text:p>
          </table:table-cell>
          <table:table-cell office:value-type="float" office:value="0.00641868083310928" calcext:value-type="float">
            <text:p>0.00641868083310928</text:p>
          </table:table-cell>
          <table:table-cell office:value-type="float" office:value="0.0890315356166787" calcext:value-type="float">
            <text:p>0.0890315356166787</text:p>
          </table:table-cell>
          <table:table-cell office:value-type="float" office:value="0.0714586349138866" calcext:value-type="float">
            <text:p>0.0714586349138866</text:p>
          </table:table-cell>
          <table:table-cell office:value-type="float" office:value="0.00412566621034556" calcext:value-type="float">
            <text:p>0.0041256662103455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00905307610755742" calcext:value-type="float">
            <text:p>-0.00905307610755742</text:p>
          </table:table-cell>
          <table:table-cell office:value-type="float" office:value="0.1458581902668" calcext:value-type="float">
            <text:p>0.1458581902668</text:p>
          </table:table-cell>
          <table:table-cell office:value-type="float" office:value="0.00842112654140485" calcext:value-type="float">
            <text:p>0.00842112654140485</text:p>
          </table:table-cell>
          <table:table-cell office:value-type="float" office:value="0.111012636127824" calcext:value-type="float">
            <text:p>0.111012636127824</text:p>
          </table:table-cell>
          <table:table-cell office:value-type="float" office:value="0.0948252173322794" calcext:value-type="float">
            <text:p>0.0948252173322794</text:p>
          </table:table-cell>
          <table:table-cell office:value-type="float" office:value="0.00547473647527563" calcext:value-type="float">
            <text:p>0.0054747364752756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204568942161093" calcext:value-type="float">
            <text:p>0.0204568942161093</text:p>
          </table:table-cell>
          <table:table-cell office:value-type="float" office:value="0.182504718967022" calcext:value-type="float">
            <text:p>0.182504718967022</text:p>
          </table:table-cell>
          <table:table-cell office:value-type="float" office:value="0.0105369148623987" calcext:value-type="float">
            <text:p>0.0105369148623987</text:p>
          </table:table-cell>
          <table:table-cell office:value-type="float" office:value="0.143734641876241" calcext:value-type="float">
            <text:p>0.143734641876241</text:p>
          </table:table-cell>
          <table:table-cell office:value-type="float" office:value="0.114013654859436" calcext:value-type="float">
            <text:p>0.114013654859436</text:p>
          </table:table-cell>
          <table:table-cell office:value-type="float" office:value="0.00658258143243886" calcext:value-type="float">
            <text:p>0.0065825814324388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36691382536138" calcext:value-type="float">
            <text:p>-0.236691382536138</text:p>
          </table:table-cell>
          <table:table-cell office:value-type="float" office:value="0.0856778089045779" calcext:value-type="float">
            <text:p>0.0856778089045779</text:p>
          </table:table-cell>
          <table:table-cell office:value-type="float" office:value="0.00494661060346354" calcext:value-type="float">
            <text:p>0.00494661060346354</text:p>
          </table:table-cell>
          <table:table-cell office:value-type="float" office:value="0.237103887829464" calcext:value-type="float">
            <text:p>0.237103887829464</text:p>
          </table:table-cell>
          <table:table-cell office:value-type="float" office:value="0.0845256779091523" calcext:value-type="float">
            <text:p>0.0845256779091523</text:p>
          </table:table-cell>
          <table:table-cell office:value-type="float" office:value="0.00488009228942847" calcext:value-type="float">
            <text:p>0.0048800922894284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29537726624033" calcext:value-type="float">
            <text:p>-0.229537726624033</text:p>
          </table:table-cell>
          <table:table-cell office:value-type="float" office:value="0.0821948526689541" calcext:value-type="float">
            <text:p>0.0821948526689541</text:p>
          </table:table-cell>
          <table:table-cell office:value-type="float" office:value="0.00474552203144223" calcext:value-type="float">
            <text:p>0.00474552203144223</text:p>
          </table:table-cell>
          <table:table-cell office:value-type="float" office:value="0.22965166847342" calcext:value-type="float">
            <text:p>0.22965166847342</text:p>
          </table:table-cell>
          <table:table-cell office:value-type="float" office:value="0.0818748919396192" calcext:value-type="float">
            <text:p>0.0818748919396192</text:p>
          </table:table-cell>
          <table:table-cell office:value-type="float" office:value="0.00472704909012107" calcext:value-type="float">
            <text:p>0.0047270490901210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25902281414439" calcext:value-type="float">
            <text:p>-0.225902281414439</text:p>
          </table:table-cell>
          <table:table-cell office:value-type="float" office:value="0.0938051847763946" calcext:value-type="float">
            <text:p>0.0938051847763946</text:p>
          </table:table-cell>
          <table:table-cell office:value-type="float" office:value="0.0054158448682034" calcext:value-type="float">
            <text:p>0.0054158448682034</text:p>
          </table:table-cell>
          <table:table-cell office:value-type="float" office:value="0.226142690820716" calcext:value-type="float">
            <text:p>0.226142690820716</text:p>
          </table:table-cell>
          <table:table-cell office:value-type="float" office:value="0.0932221720575206" calcext:value-type="float">
            <text:p>0.0932221720575206</text:p>
          </table:table-cell>
          <table:table-cell office:value-type="float" office:value="0.00538218461318511" calcext:value-type="float">
            <text:p>0.0053821846131851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27137577003911" calcext:value-type="float">
            <text:p>-0.127137577003911</text:p>
          </table:table-cell>
          <table:table-cell office:value-type="float" office:value="0.0736041078460618" calcext:value-type="float">
            <text:p>0.0736041078460618</text:p>
          </table:table-cell>
          <table:table-cell office:value-type="float" office:value="0.0042495351478386" calcext:value-type="float">
            <text:p>0.0042495351478386</text:p>
          </table:table-cell>
          <table:table-cell office:value-type="float" office:value="0.128629439987159" calcext:value-type="float">
            <text:p>0.128629439987159</text:p>
          </table:table-cell>
          <table:table-cell office:value-type="float" office:value="0.0709557551941666" calcext:value-type="float">
            <text:p>0.0709557551941666</text:p>
          </table:table-cell>
          <table:table-cell office:value-type="float" office:value="0.00409663243619053" calcext:value-type="float">
            <text:p>0.0040966324361905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17521042399543" calcext:value-type="float">
            <text:p>-0.117521042399543</text:p>
          </table:table-cell>
          <table:table-cell office:value-type="float" office:value="0.0789630979391972" calcext:value-type="float">
            <text:p>0.0789630979391972</text:p>
          </table:table-cell>
          <table:table-cell office:value-type="float" office:value="0.00455893658512423" calcext:value-type="float">
            <text:p>0.00455893658512423</text:p>
          </table:table-cell>
          <table:table-cell office:value-type="float" office:value="0.123715218734814" calcext:value-type="float">
            <text:p>0.123715218734814</text:p>
          </table:table-cell>
          <table:table-cell office:value-type="float" office:value="0.0688179727349257" calcext:value-type="float">
            <text:p>0.0688179727349257</text:p>
          </table:table-cell>
          <table:table-cell office:value-type="float" office:value="0.00397320750835937" calcext:value-type="float">
            <text:p>0.0039732075083593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15783033810421" calcext:value-type="float">
            <text:p>-0.115783033810421</text:p>
          </table:table-cell>
          <table:table-cell office:value-type="float" office:value="0.0954939967476786" calcext:value-type="float">
            <text:p>0.0954939967476786</text:p>
          </table:table-cell>
          <table:table-cell office:value-type="float" office:value="0.00551334847282655" calcext:value-type="float">
            <text:p>0.00551334847282655</text:p>
          </table:table-cell>
          <table:table-cell office:value-type="float" office:value="0.125679895611643" calcext:value-type="float">
            <text:p>0.125679895611643</text:p>
          </table:table-cell>
          <table:table-cell office:value-type="float" office:value="0.0819840580852252" calcext:value-type="float">
            <text:p>0.0819840580852252</text:p>
          </table:table-cell>
          <table:table-cell office:value-type="float" office:value="0.00473335180047627" calcext:value-type="float">
            <text:p>0.0047333518004762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0463653850834774" calcext:value-type="float">
            <text:p>-0.0463653850834774</text:p>
          </table:table-cell>
          <table:table-cell office:value-type="float" office:value="0.0719352504068823" calcext:value-type="float">
            <text:p>0.0719352504068823</text:p>
          </table:table-cell>
          <table:table-cell office:value-type="float" office:value="0.00415318361866366" calcext:value-type="float">
            <text:p>0.00415318361866366</text:p>
          </table:table-cell>
          <table:table-cell office:value-type="float" office:value="0.069591705927872" calcext:value-type="float">
            <text:p>0.069591705927872</text:p>
          </table:table-cell>
          <table:table-cell office:value-type="float" office:value="0.0497233959412605" calcext:value-type="float">
            <text:p>0.0497233959412605</text:p>
          </table:table-cell>
          <table:table-cell office:value-type="float" office:value="0.00287078160317091" calcext:value-type="float">
            <text:p>0.0028707816031709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0325599615189598" calcext:value-type="float">
            <text:p>-0.0325599615189598</text:p>
          </table:table-cell>
          <table:table-cell office:value-type="float" office:value="0.0930992040272264" calcext:value-type="float">
            <text:p>0.0930992040272264</text:p>
          </table:table-cell>
          <table:table-cell office:value-type="float" office:value="0.00537508505064591" calcext:value-type="float">
            <text:p>0.00537508505064591</text:p>
          </table:table-cell>
          <table:table-cell office:value-type="float" office:value="0.0810107662872244" calcext:value-type="float">
            <text:p>0.0810107662872244</text:p>
          </table:table-cell>
          <table:table-cell office:value-type="float" office:value="0.0560933624288074" calcext:value-type="float">
            <text:p>0.0560933624288074</text:p>
          </table:table-cell>
          <table:table-cell office:value-type="float" office:value="0.00323855178980232" calcext:value-type="float">
            <text:p>0.0032385517898023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deming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0324301873848284" calcext:value-type="float">
            <text:p>-0.0324301873848284</text:p>
          </table:table-cell>
          <table:table-cell office:value-type="float" office:value="0.120243061873329" calcext:value-type="float">
            <text:p>0.120243061873329</text:p>
          </table:table-cell>
          <table:table-cell office:value-type="float" office:value="0.00694223641407515" calcext:value-type="float">
            <text:p>0.00694223641407515</text:p>
          </table:table-cell>
          <table:table-cell office:value-type="float" office:value="0.100730868385125" calcext:value-type="float">
            <text:p>0.100730868385125</text:p>
          </table:table-cell>
          <table:table-cell office:value-type="float" office:value="0.0730272901555505" calcext:value-type="float">
            <text:p>0.0730272901555505</text:p>
          </table:table-cell>
          <table:table-cell office:value-type="float" office:value="0.0042162325629496" calcext:value-type="float">
            <text:p>0.004216232562949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300622459333094" calcext:value-type="float">
            <text:p>-0.0300622459333094</text:p>
          </table:table-cell>
          <table:table-cell office:value-type="float" office:value="0.11798296927713" calcext:value-type="float">
            <text:p>0.11798296927713</text:p>
          </table:table-cell>
          <table:table-cell office:value-type="float" office:value="0.00681174990719422" calcext:value-type="float">
            <text:p>0.00681174990719422</text:p>
          </table:table-cell>
          <table:table-cell office:value-type="float" office:value="0.0973005718095086" calcext:value-type="float">
            <text:p>0.0973005718095086</text:p>
          </table:table-cell>
          <table:table-cell office:value-type="float" office:value="0.072990940419744" calcext:value-type="float">
            <text:p>0.072990940419744</text:p>
          </table:table-cell>
          <table:table-cell office:value-type="float" office:value="0.00421413390997431" calcext:value-type="float">
            <text:p>0.0042141339099743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464598313882952" calcext:value-type="float">
            <text:p>-0.0464598313882952</text:p>
          </table:table-cell>
          <table:table-cell office:value-type="float" office:value="0.11699690992234" calcext:value-type="float">
            <text:p>0.11699690992234</text:p>
          </table:table-cell>
          <table:table-cell office:value-type="float" office:value="0.00675481974380172" calcext:value-type="float">
            <text:p>0.00675481974380172</text:p>
          </table:table-cell>
          <table:table-cell office:value-type="float" office:value="0.100930093466023" calcext:value-type="float">
            <text:p>0.100930093466023</text:p>
          </table:table-cell>
          <table:table-cell office:value-type="float" office:value="0.0750537032290986" calcext:value-type="float">
            <text:p>0.0750537032290986</text:p>
          </table:table-cell>
          <table:table-cell office:value-type="float" office:value="0.00433322757629983" calcext:value-type="float">
            <text:p>0.0043332275762998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749438493171659" calcext:value-type="float">
            <text:p>-0.0749438493171659</text:p>
          </table:table-cell>
          <table:table-cell office:value-type="float" office:value="0.125527407097002" calcext:value-type="float">
            <text:p>0.125527407097002</text:p>
          </table:table-cell>
          <table:table-cell office:value-type="float" office:value="0.00724732822781297" calcext:value-type="float">
            <text:p>0.00724732822781297</text:p>
          </table:table-cell>
          <table:table-cell office:value-type="float" office:value="0.119182460193052" calcext:value-type="float">
            <text:p>0.119182460193052</text:p>
          </table:table-cell>
          <table:table-cell office:value-type="float" office:value="0.0845016548027812" calcext:value-type="float">
            <text:p>0.0845016548027812</text:p>
          </table:table-cell>
          <table:table-cell office:value-type="float" office:value="0.00487870531473546" calcext:value-type="float">
            <text:p>0.0048787053147354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0593516431821286" calcext:value-type="float">
            <text:p>-0.0593516431821286</text:p>
          </table:table-cell>
          <table:table-cell office:value-type="float" office:value="0.102468114801388" calcext:value-type="float">
            <text:p>0.102468114801388</text:p>
          </table:table-cell>
          <table:table-cell office:value-type="float" office:value="0.0059159993663935" calcext:value-type="float">
            <text:p>0.0059159993663935</text:p>
          </table:table-cell>
          <table:table-cell office:value-type="float" office:value="0.0950988877473923" calcext:value-type="float">
            <text:p>0.0950988877473923</text:p>
          </table:table-cell>
          <table:table-cell office:value-type="float" office:value="0.070427751352789" calcext:value-type="float">
            <text:p>0.070427751352789</text:p>
          </table:table-cell>
          <table:table-cell office:value-type="float" office:value="0.00406614812019528" calcext:value-type="float">
            <text:p>0.0040661481201952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00433976118727" calcext:value-type="float">
            <text:p>-0.100433976118727</text:p>
          </table:table-cell>
          <table:table-cell office:value-type="float" office:value="0.106688578840466" calcext:value-type="float">
            <text:p>0.106688578840466</text:p>
          </table:table-cell>
          <table:table-cell office:value-type="float" office:value="0.00615966797130019" calcext:value-type="float">
            <text:p>0.00615966797130019</text:p>
          </table:table-cell>
          <table:table-cell office:value-type="float" office:value="0.121783689855875" calcext:value-type="float">
            <text:p>0.121783689855875</text:p>
          </table:table-cell>
          <table:table-cell office:value-type="float" office:value="0.0813775284093854" calcext:value-type="float">
            <text:p>0.0813775284093854</text:p>
          </table:table-cell>
          <table:table-cell office:value-type="float" office:value="0.00469833379331451" calcext:value-type="float">
            <text:p>0.0046983337933145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46397950890204" calcext:value-type="float">
            <text:p>-0.146397950890204</text:p>
          </table:table-cell>
          <table:table-cell office:value-type="float" office:value="0.1253079807054" calcext:value-type="float">
            <text:p>0.1253079807054</text:p>
          </table:table-cell>
          <table:table-cell office:value-type="float" office:value="0.00723465963918708" calcext:value-type="float">
            <text:p>0.00723465963918708</text:p>
          </table:table-cell>
          <table:table-cell office:value-type="float" office:value="0.161747446351956" calcext:value-type="float">
            <text:p>0.161747446351956</text:p>
          </table:table-cell>
          <table:table-cell office:value-type="float" office:value="0.104672798125394" calcext:value-type="float">
            <text:p>0.104672798125394</text:p>
          </table:table-cell>
          <table:table-cell office:value-type="float" office:value="0.00604328681745278" calcext:value-type="float">
            <text:p>0.0060432868174527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096972731350838" calcext:value-type="float">
            <text:p>-0.096972731350838</text:p>
          </table:table-cell>
          <table:table-cell office:value-type="float" office:value="0.0876768192489429" calcext:value-type="float">
            <text:p>0.0876768192489429</text:p>
          </table:table-cell>
          <table:table-cell office:value-type="float" office:value="0.00506202351950673" calcext:value-type="float">
            <text:p>0.00506202351950673</text:p>
          </table:table-cell>
          <table:table-cell office:value-type="float" office:value="0.109915326181248" calcext:value-type="float">
            <text:p>0.109915326181248</text:p>
          </table:table-cell>
          <table:table-cell office:value-type="float" office:value="0.0707149271182252" calcext:value-type="float">
            <text:p>0.0707149271182252</text:p>
          </table:table-cell>
          <table:table-cell office:value-type="float" office:value="0.00408272822074321" calcext:value-type="float">
            <text:p>0.0040827282207432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70240931466214" calcext:value-type="float">
            <text:p>-0.170240931466214</text:p>
          </table:table-cell>
          <table:table-cell office:value-type="float" office:value="0.0990198772235008" calcext:value-type="float">
            <text:p>0.0990198772235008</text:p>
          </table:table-cell>
          <table:table-cell office:value-type="float" office:value="0.00571691527701119" calcext:value-type="float">
            <text:p>0.00571691527701119</text:p>
          </table:table-cell>
          <table:table-cell office:value-type="float" office:value="0.176326405716647" calcext:value-type="float">
            <text:p>0.176326405716647</text:p>
          </table:table-cell>
          <table:table-cell office:value-type="float" office:value="0.087686121354517" calcext:value-type="float">
            <text:p>0.087686121354517</text:p>
          </table:table-cell>
          <table:table-cell office:value-type="float" office:value="0.00506256057682246" calcext:value-type="float">
            <text:p>0.0050625605768224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35265637344542" calcext:value-type="float">
            <text:p>-0.235265637344542</text:p>
          </table:table-cell>
          <table:table-cell office:value-type="float" office:value="0.126196399954375" calcext:value-type="float">
            <text:p>0.126196399954375</text:p>
          </table:table-cell>
          <table:table-cell office:value-type="float" office:value="0.00728595254844199" calcext:value-type="float">
            <text:p>0.00728595254844199</text:p>
          </table:table-cell>
          <table:table-cell office:value-type="float" office:value="0.23922527794729" calcext:value-type="float">
            <text:p>0.23922527794729</text:p>
          </table:table-cell>
          <table:table-cell office:value-type="float" office:value="0.118492338193024" calcext:value-type="float">
            <text:p>0.118492338193024</text:p>
          </table:table-cell>
          <table:table-cell office:value-type="float" office:value="0.00684115833526504" calcext:value-type="float">
            <text:p>0.0068411583352650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320663600881176" calcext:value-type="float">
            <text:p>-0.0320663600881176</text:p>
          </table:table-cell>
          <table:table-cell office:value-type="float" office:value="0.0764471337437057" calcext:value-type="float">
            <text:p>0.0764471337437057</text:p>
          </table:table-cell>
          <table:table-cell office:value-type="float" office:value="0.00441367732457038" calcext:value-type="float">
            <text:p>0.00441367732457038</text:p>
          </table:table-cell>
          <table:table-cell office:value-type="float" office:value="0.0657040694148462" calcext:value-type="float">
            <text:p>0.0657040694148462</text:p>
          </table:table-cell>
          <table:table-cell office:value-type="float" office:value="0.0504419639535456" calcext:value-type="float">
            <text:p>0.0504419639535456</text:p>
          </table:table-cell>
          <table:table-cell office:value-type="float" office:value="0.00291226814670329" calcext:value-type="float">
            <text:p>0.0029122681467032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524308474876627" calcext:value-type="float">
            <text:p>-0.0524308474876627</text:p>
          </table:table-cell>
          <table:table-cell office:value-type="float" office:value="0.081189141502122" calcext:value-type="float">
            <text:p>0.081189141502122</text:p>
          </table:table-cell>
          <table:table-cell office:value-type="float" office:value="0.00468745727015248" calcext:value-type="float">
            <text:p>0.00468745727015248</text:p>
          </table:table-cell>
          <table:table-cell office:value-type="float" office:value="0.0788884904925602" calcext:value-type="float">
            <text:p>0.0788884904925602</text:p>
          </table:table-cell>
          <table:table-cell office:value-type="float" office:value="0.0557284170463644" calcext:value-type="float">
            <text:p>0.0557284170463644</text:p>
          </table:table-cell>
          <table:table-cell office:value-type="float" office:value="0.00321748165832302" calcext:value-type="float">
            <text:p>0.0032174816583230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765087480402288" calcext:value-type="float">
            <text:p>-0.0765087480402288</text:p>
          </table:table-cell>
          <table:table-cell office:value-type="float" office:value="0.0892874666763595" calcext:value-type="float">
            <text:p>0.0892874666763595</text:p>
          </table:table-cell>
          <table:table-cell office:value-type="float" office:value="0.00515501429208559" calcext:value-type="float">
            <text:p>0.00515501429208559</text:p>
          </table:table-cell>
          <table:table-cell office:value-type="float" office:value="0.0946510321220288" calcext:value-type="float">
            <text:p>0.0946510321220288</text:p>
          </table:table-cell>
          <table:table-cell office:value-type="float" office:value="0.0696895757480373" calcext:value-type="float">
            <text:p>0.0696895757480373</text:p>
          </table:table-cell>
          <table:table-cell office:value-type="float" office:value="0.00402352953178402" calcext:value-type="float">
            <text:p>0.0040235295317840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0666132330813812" calcext:value-type="float">
            <text:p>-0.0666132330813812</text:p>
          </table:table-cell>
          <table:table-cell office:value-type="float" office:value="0.0665896385357885" calcext:value-type="float">
            <text:p>0.0665896385357885</text:p>
          </table:table-cell>
          <table:table-cell office:value-type="float" office:value="0.00384455457338774" calcext:value-type="float">
            <text:p>0.00384455457338774</text:p>
          </table:table-cell>
          <table:table-cell office:value-type="float" office:value="0.0764278692683392" calcext:value-type="float">
            <text:p>0.0764278692683392</text:p>
          </table:table-cell>
          <table:table-cell office:value-type="float" office:value="0.0550053476978966" calcext:value-type="float">
            <text:p>0.0550053476978966</text:p>
          </table:table-cell>
          <table:table-cell office:value-type="float" office:value="0.00317573523002496" calcext:value-type="float">
            <text:p>0.0031757352300249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06457324529889" calcext:value-type="float">
            <text:p>-0.106457324529889</text:p>
          </table:table-cell>
          <table:table-cell office:value-type="float" office:value="0.0749962238294135" calcext:value-type="float">
            <text:p>0.0749962238294135</text:p>
          </table:table-cell>
          <table:table-cell office:value-type="float" office:value="0.00432990900161173" calcext:value-type="float">
            <text:p>0.00432990900161173</text:p>
          </table:table-cell>
          <table:table-cell office:value-type="float" office:value="0.111080741518764" calcext:value-type="float">
            <text:p>0.111080741518764</text:p>
          </table:table-cell>
          <table:table-cell office:value-type="float" office:value="0.0679360038699587" calcext:value-type="float">
            <text:p>0.0679360038699587</text:p>
          </table:table-cell>
          <table:table-cell office:value-type="float" office:value="0.00392228701219881" calcext:value-type="float">
            <text:p>0.0039222870121988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54455313692382" calcext:value-type="float">
            <text:p>-0.154455313692382</text:p>
          </table:table-cell>
          <table:table-cell office:value-type="float" office:value="0.0858311559766039" calcext:value-type="float">
            <text:p>0.0858311559766039</text:p>
          </table:table-cell>
          <table:table-cell office:value-type="float" office:value="0.0049554641007949" calcext:value-type="float">
            <text:p>0.0049554641007949</text:p>
          </table:table-cell>
          <table:table-cell office:value-type="float" office:value="0.156736647015441" calcext:value-type="float">
            <text:p>0.156736647015441</text:p>
          </table:table-cell>
          <table:table-cell office:value-type="float" office:value="0.0815762244159506" calcext:value-type="float">
            <text:p>0.0815762244159506</text:p>
          </table:table-cell>
          <table:table-cell office:value-type="float" office:value="0.00470980551260224" calcext:value-type="float">
            <text:p>0.0047098055126022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07868174721415" calcext:value-type="float">
            <text:p>-0.107868174721415</text:p>
          </table:table-cell>
          <table:table-cell office:value-type="float" office:value="0.0591663590398356" calcext:value-type="float">
            <text:p>0.0591663590398356</text:p>
          </table:table-cell>
          <table:table-cell office:value-type="float" office:value="0.00341597133186191" calcext:value-type="float">
            <text:p>0.00341597133186191</text:p>
          </table:table-cell>
          <table:table-cell office:value-type="float" office:value="0.108867964725085" calcext:value-type="float">
            <text:p>0.108867964725085</text:p>
          </table:table-cell>
          <table:table-cell office:value-type="float" office:value="0.0572995872460394" calcext:value-type="float">
            <text:p>0.0572995872460394</text:p>
          </table:table-cell>
          <table:table-cell office:value-type="float" office:value="0.00330819321209553" calcext:value-type="float">
            <text:p>0.0033081932120955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73383544311925" calcext:value-type="float">
            <text:p>-0.173383544311925</text:p>
          </table:table-cell>
          <table:table-cell office:value-type="float" office:value="0.0705521104479727" calcext:value-type="float">
            <text:p>0.0705521104479727</text:p>
          </table:table-cell>
          <table:table-cell office:value-type="float" office:value="0.00407332799590332" calcext:value-type="float">
            <text:p>0.00407332799590332</text:p>
          </table:table-cell>
          <table:table-cell office:value-type="float" office:value="0.173522201467462" calcext:value-type="float">
            <text:p>0.173522201467462</text:p>
          </table:table-cell>
          <table:table-cell office:value-type="float" office:value="0.0702092476239751" calcext:value-type="float">
            <text:p>0.0702092476239751</text:p>
          </table:table-cell>
          <table:table-cell office:value-type="float" office:value="0.00405353280153031" calcext:value-type="float">
            <text:p>0.0040535328015303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heil-Sen</text:p>
          </table:table-cell>
          <table:table-cell office:value-type="string" calcext:value-type="string">
            <text:p>theilsen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48579616483333" calcext:value-type="float">
            <text:p>-0.248579616483333</text:p>
          </table:table-cell>
          <table:table-cell office:value-type="float" office:value="0.0863841142822518" calcext:value-type="float">
            <text:p>0.0863841142822518</text:p>
          </table:table-cell>
          <table:table-cell office:value-type="float" office:value="0.00498738916345655" calcext:value-type="float">
            <text:p>0.00498738916345655</text:p>
          </table:table-cell>
          <table:table-cell office:value-type="float" office:value="0.248579616483333" calcext:value-type="float">
            <text:p>0.248579616483333</text:p>
          </table:table-cell>
          <table:table-cell office:value-type="float" office:value="0.0863841142822518" calcext:value-type="float">
            <text:p>0.0863841142822518</text:p>
          </table:table-cell>
          <table:table-cell office:value-type="float" office:value="0.00498738916345655" calcext:value-type="float">
            <text:p>0.0049873891634565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333442286524298" calcext:value-type="float">
            <text:p>-0.0333442286524298</text:p>
          </table:table-cell>
          <table:table-cell office:value-type="float" office:value="0.114582521602365" calcext:value-type="float">
            <text:p>0.114582521602365</text:p>
          </table:table-cell>
          <table:table-cell office:value-type="float" office:value="0.00661542496915516" calcext:value-type="float">
            <text:p>0.00661542496915516</text:p>
          </table:table-cell>
          <table:table-cell office:value-type="float" office:value="0.0946668089936232" calcext:value-type="float">
            <text:p>0.0946668089936232</text:p>
          </table:table-cell>
          <table:table-cell office:value-type="float" office:value="0.0724771208412865" calcext:value-type="float">
            <text:p>0.0724771208412865</text:p>
          </table:table-cell>
          <table:table-cell office:value-type="float" office:value="0.00418446852278058" calcext:value-type="float">
            <text:p>0.0041844685227805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505025491628644" calcext:value-type="float">
            <text:p>-0.0505025491628644</text:p>
          </table:table-cell>
          <table:table-cell office:value-type="float" office:value="0.114408067089001" calcext:value-type="float">
            <text:p>0.114408067089001</text:p>
          </table:table-cell>
          <table:table-cell office:value-type="float" office:value="0.00660535283312994" calcext:value-type="float">
            <text:p>0.00660535283312994</text:p>
          </table:table-cell>
          <table:table-cell office:value-type="float" office:value="0.100798666951371" calcext:value-type="float">
            <text:p>0.100798666951371</text:p>
          </table:table-cell>
          <table:table-cell office:value-type="float" office:value="0.0738504636299588" calcext:value-type="float">
            <text:p>0.0738504636299588</text:p>
          </table:table-cell>
          <table:table-cell office:value-type="float" office:value="0.00426375850565354" calcext:value-type="float">
            <text:p>0.0042637585056535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796549934125207" calcext:value-type="float">
            <text:p>-0.0796549934125207</text:p>
          </table:table-cell>
          <table:table-cell office:value-type="float" office:value="0.123367351129935" calcext:value-type="float">
            <text:p>0.123367351129935</text:p>
          </table:table-cell>
          <table:table-cell office:value-type="float" office:value="0.0071226173384079" calcext:value-type="float">
            <text:p>0.0071226173384079</text:p>
          </table:table-cell>
          <table:table-cell office:value-type="float" office:value="0.120336375863392" calcext:value-type="float">
            <text:p>0.120336375863392</text:p>
          </table:table-cell>
          <table:table-cell office:value-type="float" office:value="0.0840021874218327" calcext:value-type="float">
            <text:p>0.0840021874218327</text:p>
          </table:table-cell>
          <table:table-cell office:value-type="float" office:value="0.00484986855205125" calcext:value-type="float">
            <text:p>0.0048498685520512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0668174038647204" calcext:value-type="float">
            <text:p>-0.0668174038647204</text:p>
          </table:table-cell>
          <table:table-cell office:value-type="float" office:value="0.0982810398787634" calcext:value-type="float">
            <text:p>0.0982810398787634</text:p>
          </table:table-cell>
          <table:table-cell office:value-type="float" office:value="0.00567425848302404" calcext:value-type="float">
            <text:p>0.00567425848302404</text:p>
          </table:table-cell>
          <table:table-cell office:value-type="float" office:value="0.0951924156950892" calcext:value-type="float">
            <text:p>0.0951924156950892</text:p>
          </table:table-cell>
          <table:table-cell office:value-type="float" office:value="0.0710405346890285" calcext:value-type="float">
            <text:p>0.0710405346890285</text:p>
          </table:table-cell>
          <table:table-cell office:value-type="float" office:value="0.00410152718260855" calcext:value-type="float">
            <text:p>0.0041015271826085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11422379478986" calcext:value-type="float">
            <text:p>-0.111422379478986</text:p>
          </table:table-cell>
          <table:table-cell office:value-type="float" office:value="0.104391767646371" calcext:value-type="float">
            <text:p>0.104391767646371</text:p>
          </table:table-cell>
          <table:table-cell office:value-type="float" office:value="0.00602706151518132" calcext:value-type="float">
            <text:p>0.00602706151518132</text:p>
          </table:table-cell>
          <table:table-cell office:value-type="float" office:value="0.129452590446831" calcext:value-type="float">
            <text:p>0.129452590446831</text:p>
          </table:table-cell>
          <table:table-cell office:value-type="float" office:value="0.0808708195542431" calcext:value-type="float">
            <text:p>0.0808708195542431</text:p>
          </table:table-cell>
          <table:table-cell office:value-type="float" office:value="0.00466907894392279" calcext:value-type="float">
            <text:p>0.0046690789439227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6009932842123" calcext:value-type="float">
            <text:p>-0.16009932842123</text:p>
          </table:table-cell>
          <table:table-cell office:value-type="float" office:value="0.121794643303647" calcext:value-type="float">
            <text:p>0.121794643303647</text:p>
          </table:table-cell>
          <table:table-cell office:value-type="float" office:value="0.00703181700972148" calcext:value-type="float">
            <text:p>0.00703181700972148</text:p>
          </table:table-cell>
          <table:table-cell office:value-type="float" office:value="0.172101748410794" calcext:value-type="float">
            <text:p>0.172101748410794</text:p>
          </table:table-cell>
          <table:table-cell office:value-type="float" office:value="0.10408353913537" calcext:value-type="float">
            <text:p>0.10408353913537</text:p>
          </table:table-cell>
          <table:table-cell office:value-type="float" office:value="0.0060092659338015" calcext:value-type="float">
            <text:p>0.006009265933801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07754916905202" calcext:value-type="float">
            <text:p>-0.107754916905202</text:p>
          </table:table-cell>
          <table:table-cell office:value-type="float" office:value="0.0851543489737003" calcext:value-type="float">
            <text:p>0.0851543489737003</text:p>
          </table:table-cell>
          <table:table-cell office:value-type="float" office:value="0.00491638863026332" calcext:value-type="float">
            <text:p>0.00491638863026332</text:p>
          </table:table-cell>
          <table:table-cell office:value-type="float" office:value="0.117546506408953" calcext:value-type="float">
            <text:p>0.117546506408953</text:p>
          </table:table-cell>
          <table:table-cell office:value-type="float" office:value="0.0709776441811989" calcext:value-type="float">
            <text:p>0.0709776441811989</text:p>
          </table:table-cell>
          <table:table-cell office:value-type="float" office:value="0.00409789619744607" calcext:value-type="float">
            <text:p>0.0040978961974460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84809109553184" calcext:value-type="float">
            <text:p>-0.184809109553184</text:p>
          </table:table-cell>
          <table:table-cell office:value-type="float" office:value="0.096987397361596" calcext:value-type="float">
            <text:p>0.096987397361596</text:p>
          </table:table-cell>
          <table:table-cell office:value-type="float" office:value="0.00559956999747187" calcext:value-type="float">
            <text:p>0.00559956999747187</text:p>
          </table:table-cell>
          <table:table-cell office:value-type="float" office:value="0.189492351967287" calcext:value-type="float">
            <text:p>0.189492351967287</text:p>
          </table:table-cell>
          <table:table-cell office:value-type="float" office:value="0.0874514040833718" calcext:value-type="float">
            <text:p>0.0874514040833718</text:p>
          </table:table-cell>
          <table:table-cell office:value-type="float" office:value="0.00504900916885455" calcext:value-type="float">
            <text:p>0.0050490091688545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56596454124482" calcext:value-type="float">
            <text:p>-0.256596454124482</text:p>
          </table:table-cell>
          <table:table-cell office:value-type="float" office:value="0.122029427681702" calcext:value-type="float">
            <text:p>0.122029427681702</text:p>
          </table:table-cell>
          <table:table-cell office:value-type="float" office:value="0.00704537229210869" calcext:value-type="float">
            <text:p>0.00704537229210869</text:p>
          </table:table-cell>
          <table:table-cell office:value-type="float" office:value="0.257930504038763" calcext:value-type="float">
            <text:p>0.257930504038763</text:p>
          </table:table-cell>
          <table:table-cell office:value-type="float" office:value="0.119174162082994" calcext:value-type="float">
            <text:p>0.119174162082994</text:p>
          </table:table-cell>
          <table:table-cell office:value-type="float" office:value="0.00688052345590647" calcext:value-type="float">
            <text:p>0.0068805234559064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355276775668338" calcext:value-type="float">
            <text:p>-0.0355276775668338</text:p>
          </table:table-cell>
          <table:table-cell office:value-type="float" office:value="0.0769092348430889" calcext:value-type="float">
            <text:p>0.0769092348430889</text:p>
          </table:table-cell>
          <table:table-cell office:value-type="float" office:value="0.00444035674398255" calcext:value-type="float">
            <text:p>0.00444035674398255</text:p>
          </table:table-cell>
          <table:table-cell office:value-type="float" office:value="0.0663405772247671" calcext:value-type="float">
            <text:p>0.0663405772247671</text:p>
          </table:table-cell>
          <table:table-cell office:value-type="float" office:value="0.0525896971252508" calcext:value-type="float">
            <text:p>0.0525896971252508</text:p>
          </table:table-cell>
          <table:table-cell office:value-type="float" office:value="0.00303626757918644" calcext:value-type="float">
            <text:p>0.0030362675791864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565546063356835" calcext:value-type="float">
            <text:p>-0.0565546063356835</text:p>
          </table:table-cell>
          <table:table-cell office:value-type="float" office:value="0.0784401571267011" calcext:value-type="float">
            <text:p>0.0784401571267011</text:p>
          </table:table-cell>
          <table:table-cell office:value-type="float" office:value="0.00452874458323774" calcext:value-type="float">
            <text:p>0.00452874458323774</text:p>
          </table:table-cell>
          <table:table-cell office:value-type="float" office:value="0.0792199039799876" calcext:value-type="float">
            <text:p>0.0792199039799876</text:p>
          </table:table-cell>
          <table:table-cell office:value-type="float" office:value="0.0553642154729039" calcext:value-type="float">
            <text:p>0.0553642154729039</text:p>
          </table:table-cell>
          <table:table-cell office:value-type="float" office:value="0.00319645447067535" calcext:value-type="float">
            <text:p>0.0031964544706753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842272280392338" calcext:value-type="float">
            <text:p>-0.0842272280392338</text:p>
          </table:table-cell>
          <table:table-cell office:value-type="float" office:value="0.0884152040918253" calcext:value-type="float">
            <text:p>0.0884152040918253</text:p>
          </table:table-cell>
          <table:table-cell office:value-type="float" office:value="0.0051046541882871" calcext:value-type="float">
            <text:p>0.0051046541882871</text:p>
          </table:table-cell>
          <table:table-cell office:value-type="float" office:value="0.0992009572544006" calcext:value-type="float">
            <text:p>0.0992009572544006</text:p>
          </table:table-cell>
          <table:table-cell office:value-type="float" office:value="0.0711439271554817" calcext:value-type="float">
            <text:p>0.0711439271554817</text:p>
          </table:table-cell>
          <table:table-cell office:value-type="float" office:value="0.00410749654944245" calcext:value-type="float">
            <text:p>0.0041074965494424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0729623354535301" calcext:value-type="float">
            <text:p>-0.0729623354535301</text:p>
          </table:table-cell>
          <table:table-cell office:value-type="float" office:value="0.066409761911884" calcext:value-type="float">
            <text:p>0.066409761911884</text:p>
          </table:table-cell>
          <table:table-cell office:value-type="float" office:value="0.00383416939166452" calcext:value-type="float">
            <text:p>0.00383416939166452</text:p>
          </table:table-cell>
          <table:table-cell office:value-type="float" office:value="0.0805815257753408" calcext:value-type="float">
            <text:p>0.0805815257753408</text:p>
          </table:table-cell>
          <table:table-cell office:value-type="float" office:value="0.0568899282292903" calcext:value-type="float">
            <text:p>0.0568899282292903</text:p>
          </table:table-cell>
          <table:table-cell office:value-type="float" office:value="0.00328454153773592" calcext:value-type="float">
            <text:p>0.0032845415377359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16893549167914" calcext:value-type="float">
            <text:p>-0.116893549167914</text:p>
          </table:table-cell>
          <table:table-cell office:value-type="float" office:value="0.0724965864416732" calcext:value-type="float">
            <text:p>0.0724965864416732</text:p>
          </table:table-cell>
          <table:table-cell office:value-type="float" office:value="0.0041855923697429" calcext:value-type="float">
            <text:p>0.0041855923697429</text:p>
          </table:table-cell>
          <table:table-cell office:value-type="float" office:value="0.12037332202944" calcext:value-type="float">
            <text:p>0.12037332202944</text:p>
          </table:table-cell>
          <table:table-cell office:value-type="float" office:value="0.0665384017383749" calcext:value-type="float">
            <text:p>0.0665384017383749</text:p>
          </table:table-cell>
          <table:table-cell office:value-type="float" office:value="0.00384159641550982" calcext:value-type="float">
            <text:p>0.0038415964155098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70447389640565" calcext:value-type="float">
            <text:p>-0.170447389640565</text:p>
          </table:table-cell>
          <table:table-cell office:value-type="float" office:value="0.0857296796375942" calcext:value-type="float">
            <text:p>0.0857296796375942</text:p>
          </table:table-cell>
          <table:table-cell office:value-type="float" office:value="0.00494960536163054" calcext:value-type="float">
            <text:p>0.00494960536163054</text:p>
          </table:table-cell>
          <table:table-cell office:value-type="float" office:value="0.171704596157095" calcext:value-type="float">
            <text:p>0.171704596157095</text:p>
          </table:table-cell>
          <table:table-cell office:value-type="float" office:value="0.0831744168403324" calcext:value-type="float">
            <text:p>0.0831744168403324</text:p>
          </table:table-cell>
          <table:table-cell office:value-type="float" office:value="0.0048020771952456" calcext:value-type="float">
            <text:p>0.004802077195245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16219984961211" calcext:value-type="float">
            <text:p>-0.116219984961211</text:p>
          </table:table-cell>
          <table:table-cell office:value-type="float" office:value="0.0582149551063142" calcext:value-type="float">
            <text:p>0.0582149551063142</text:p>
          </table:table-cell>
          <table:table-cell office:value-type="float" office:value="0.00336104200014925" calcext:value-type="float">
            <text:p>0.00336104200014925</text:p>
          </table:table-cell>
          <table:table-cell office:value-type="float" office:value="0.116677974220613" calcext:value-type="float">
            <text:p>0.116677974220613</text:p>
          </table:table-cell>
          <table:table-cell office:value-type="float" office:value="0.0572883888396926" calcext:value-type="float">
            <text:p>0.0572883888396926</text:p>
          </table:table-cell>
          <table:table-cell office:value-type="float" office:value="0.00330754667180365" calcext:value-type="float">
            <text:p>0.0033075466718036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88281752992594" calcext:value-type="float">
            <text:p>-0.188281752992594</text:p>
          </table:table-cell>
          <table:table-cell office:value-type="float" office:value="0.0666519403389625" calcext:value-type="float">
            <text:p>0.0666519403389625</text:p>
          </table:table-cell>
          <table:table-cell office:value-type="float" office:value="0.00384815156967109" calcext:value-type="float">
            <text:p>0.00384815156967109</text:p>
          </table:table-cell>
          <table:table-cell office:value-type="float" office:value="0.188281752992594" calcext:value-type="float">
            <text:p>0.188281752992594</text:p>
          </table:table-cell>
          <table:table-cell office:value-type="float" office:value="0.0666519403389625" calcext:value-type="float">
            <text:p>0.0666519403389625</text:p>
          </table:table-cell>
          <table:table-cell office:value-type="float" office:value="0.00384815156967109" calcext:value-type="float">
            <text:p>0.0038481515696710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huber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71094021814223" calcext:value-type="float">
            <text:p>-0.271094021814223</text:p>
          </table:table-cell>
          <table:table-cell office:value-type="float" office:value="0.0850839234049837" calcext:value-type="float">
            <text:p>0.0850839234049837</text:p>
          </table:table-cell>
          <table:table-cell office:value-type="float" office:value="0.00491232260815768" calcext:value-type="float">
            <text:p>0.00491232260815768</text:p>
          </table:table-cell>
          <table:table-cell office:value-type="float" office:value="0.271094021814223" calcext:value-type="float">
            <text:p>0.271094021814223</text:p>
          </table:table-cell>
          <table:table-cell office:value-type="float" office:value="0.0850839234049837" calcext:value-type="float">
            <text:p>0.0850839234049837</text:p>
          </table:table-cell>
          <table:table-cell office:value-type="float" office:value="0.00491232260815768" calcext:value-type="float">
            <text:p>0.0049123226081576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335846533822598" calcext:value-type="float">
            <text:p>-0.0335846533822598</text:p>
          </table:table-cell>
          <table:table-cell office:value-type="float" office:value="0.142322340800333" calcext:value-type="float">
            <text:p>0.142322340800333</text:p>
          </table:table-cell>
          <table:table-cell office:value-type="float" office:value="0.00821698417727697" calcext:value-type="float">
            <text:p>0.00821698417727697</text:p>
          </table:table-cell>
          <table:table-cell office:value-type="float" office:value="0.117726738990077" calcext:value-type="float">
            <text:p>0.117726738990077</text:p>
          </table:table-cell>
          <table:table-cell office:value-type="float" office:value="0.0864951546083415" calcext:value-type="float">
            <text:p>0.0864951546083415</text:p>
          </table:table-cell>
          <table:table-cell office:value-type="float" office:value="0.00499380007967243" calcext:value-type="float">
            <text:p>0.0049938000796724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497220759623321" calcext:value-type="float">
            <text:p>-0.0497220759623321</text:p>
          </table:table-cell>
          <table:table-cell office:value-type="float" office:value="0.137146680179902" calcext:value-type="float">
            <text:p>0.137146680179902</text:p>
          </table:table-cell>
          <table:table-cell office:value-type="float" office:value="0.00791816727203299" calcext:value-type="float">
            <text:p>0.00791816727203299</text:p>
          </table:table-cell>
          <table:table-cell office:value-type="float" office:value="0.113378630065377" calcext:value-type="float">
            <text:p>0.113378630065377</text:p>
          </table:table-cell>
          <table:table-cell office:value-type="float" office:value="0.0916081826276306" calcext:value-type="float">
            <text:p>0.0916081826276306</text:p>
          </table:table-cell>
          <table:table-cell office:value-type="float" office:value="0.00528900089000349" calcext:value-type="float">
            <text:p>0.0052890008900034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851885512137738" calcext:value-type="float">
            <text:p>-0.0851885512137738</text:p>
          </table:table-cell>
          <table:table-cell office:value-type="float" office:value="0.142456460508593" calcext:value-type="float">
            <text:p>0.142456460508593</text:p>
          </table:table-cell>
          <table:table-cell office:value-type="float" office:value="0.00822472758224377" calcext:value-type="float">
            <text:p>0.00822472758224377</text:p>
          </table:table-cell>
          <table:table-cell office:value-type="float" office:value="0.131830441960777" calcext:value-type="float">
            <text:p>0.131830441960777</text:p>
          </table:table-cell>
          <table:table-cell office:value-type="float" office:value="0.100686709842754" calcext:value-type="float">
            <text:p>0.100686709842754</text:p>
          </table:table-cell>
          <table:table-cell office:value-type="float" office:value="0.00581314990315318" calcext:value-type="float">
            <text:p>0.0058131499031531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06294618880477" calcext:value-type="float">
            <text:p>-0.06294618880477</text:p>
          </table:table-cell>
          <table:table-cell office:value-type="float" office:value="0.119320558084557" calcext:value-type="float">
            <text:p>0.119320558084557</text:p>
          </table:table-cell>
          <table:table-cell office:value-type="float" office:value="0.00688897563299752" calcext:value-type="float">
            <text:p>0.00688897563299752</text:p>
          </table:table-cell>
          <table:table-cell office:value-type="float" office:value="0.108636874305907" calcext:value-type="float">
            <text:p>0.108636874305907</text:p>
          </table:table-cell>
          <table:table-cell office:value-type="float" office:value="0.0798212247179777" calcext:value-type="float">
            <text:p>0.0798212247179777</text:p>
          </table:table-cell>
          <table:table-cell office:value-type="float" office:value="0.004608480557797" calcext:value-type="float">
            <text:p>0.00460848055779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08810969719249" calcext:value-type="float">
            <text:p>-0.108810969719249</text:p>
          </table:table-cell>
          <table:table-cell office:value-type="float" office:value="0.120079717768413" calcext:value-type="float">
            <text:p>0.120079717768413</text:p>
          </table:table-cell>
          <table:table-cell office:value-type="float" office:value="0.00693280573778077" calcext:value-type="float">
            <text:p>0.00693280573778077</text:p>
          </table:table-cell>
          <table:table-cell office:value-type="float" office:value="0.133485877606895" calcext:value-type="float">
            <text:p>0.133485877606895</text:p>
          </table:table-cell>
          <table:table-cell office:value-type="float" office:value="0.0917632319459241" calcext:value-type="float">
            <text:p>0.0917632319459241</text:p>
          </table:table-cell>
          <table:table-cell office:value-type="float" office:value="0.00529795266656893" calcext:value-type="float">
            <text:p>0.0052979526665689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5997192321992" calcext:value-type="float">
            <text:p>-0.15997192321992</text:p>
          </table:table-cell>
          <table:table-cell office:value-type="float" office:value="0.149364561304721" calcext:value-type="float">
            <text:p>0.149364561304721</text:p>
          </table:table-cell>
          <table:table-cell office:value-type="float" office:value="0.00862356696766708" calcext:value-type="float">
            <text:p>0.00862356696766708</text:p>
          </table:table-cell>
          <table:table-cell office:value-type="float" office:value="0.179213392101946" calcext:value-type="float">
            <text:p>0.179213392101946</text:p>
          </table:table-cell>
          <table:table-cell office:value-type="float" office:value="0.125544896271278" calcext:value-type="float">
            <text:p>0.125544896271278</text:p>
          </table:table-cell>
          <table:table-cell office:value-type="float" office:value="0.00724833796576061" calcext:value-type="float">
            <text:p>0.0072483379657606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02134873552983" calcext:value-type="float">
            <text:p>-0.102134873552983</text:p>
          </table:table-cell>
          <table:table-cell office:value-type="float" office:value="0.103274316421887" calcext:value-type="float">
            <text:p>0.103274316421887</text:p>
          </table:table-cell>
          <table:table-cell office:value-type="float" office:value="0.00596254543865513" calcext:value-type="float">
            <text:p>0.00596254543865513</text:p>
          </table:table-cell>
          <table:table-cell office:value-type="float" office:value="0.121769810293744" calcext:value-type="float">
            <text:p>0.121769810293744</text:p>
          </table:table-cell>
          <table:table-cell office:value-type="float" office:value="0.0790855650736577" calcext:value-type="float">
            <text:p>0.0790855650736577</text:p>
          </table:table-cell>
          <table:table-cell office:value-type="float" office:value="0.00456600722842899" calcext:value-type="float">
            <text:p>0.0045660072284289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81154364580725" calcext:value-type="float">
            <text:p>-0.181154364580725</text:p>
          </table:table-cell>
          <table:table-cell office:value-type="float" office:value="0.113918651865145" calcext:value-type="float">
            <text:p>0.113918651865145</text:p>
          </table:table-cell>
          <table:table-cell office:value-type="float" office:value="0.00657709643200608" calcext:value-type="float">
            <text:p>0.00657709643200608</text:p>
          </table:table-cell>
          <table:table-cell office:value-type="float" office:value="0.190662269944499" calcext:value-type="float">
            <text:p>0.190662269944499</text:p>
          </table:table-cell>
          <table:table-cell office:value-type="float" office:value="0.0971104446825452" calcext:value-type="float">
            <text:p>0.0971104446825452</text:p>
          </table:table-cell>
          <table:table-cell office:value-type="float" office:value="0.00560667413785917" calcext:value-type="float">
            <text:p>0.0056066741378591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50313236781308" calcext:value-type="float">
            <text:p>-0.250313236781308</text:p>
          </table:table-cell>
          <table:table-cell office:value-type="float" office:value="0.13929853564575" calcext:value-type="float">
            <text:p>0.13929853564575</text:p>
          </table:table-cell>
          <table:table-cell office:value-type="float" office:value="0.00804240470527943" calcext:value-type="float">
            <text:p>0.00804240470527943</text:p>
          </table:table-cell>
          <table:table-cell office:value-type="float" office:value="0.256846746697484" calcext:value-type="float">
            <text:p>0.256846746697484</text:p>
          </table:table-cell>
          <table:table-cell office:value-type="float" office:value="0.126804831121609" calcext:value-type="float">
            <text:p>0.126804831121609</text:p>
          </table:table-cell>
          <table:table-cell office:value-type="float" office:value="0.00732108033826059" calcext:value-type="float">
            <text:p>0.0073210803382605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360459295498597" calcext:value-type="float">
            <text:p>-0.0360459295498597</text:p>
          </table:table-cell>
          <table:table-cell office:value-type="float" office:value="0.0879343591724791" calcext:value-type="float">
            <text:p>0.0879343591724791</text:p>
          </table:table-cell>
          <table:table-cell office:value-type="float" office:value="0.00507689259392481" calcext:value-type="float">
            <text:p>0.00507689259392481</text:p>
          </table:table-cell>
          <table:table-cell office:value-type="float" office:value="0.0761531105718444" calcext:value-type="float">
            <text:p>0.0761531105718444</text:p>
          </table:table-cell>
          <table:table-cell office:value-type="float" office:value="0.0567222547679781" calcext:value-type="float">
            <text:p>0.0567222547679781</text:p>
          </table:table-cell>
          <table:table-cell office:value-type="float" office:value="0.00327486090593347" calcext:value-type="float">
            <text:p>0.0032748609059334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59768664916195" calcext:value-type="float">
            <text:p>-0.059768664916195</text:p>
          </table:table-cell>
          <table:table-cell office:value-type="float" office:value="0.0917279482173937" calcext:value-type="float">
            <text:p>0.0917279482173937</text:p>
          </table:table-cell>
          <table:table-cell office:value-type="float" office:value="0.00529591555955243" calcext:value-type="float">
            <text:p>0.00529591555955243</text:p>
          </table:table-cell>
          <table:table-cell office:value-type="float" office:value="0.0899665039236679" calcext:value-type="float">
            <text:p>0.0899665039236679</text:p>
          </table:table-cell>
          <table:table-cell office:value-type="float" office:value="0.0622672890942466" calcext:value-type="float">
            <text:p>0.0622672890942466</text:p>
          </table:table-cell>
          <table:table-cell office:value-type="float" office:value="0.00359500361202715" calcext:value-type="float">
            <text:p>0.0035950036120271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0893997494680482" calcext:value-type="float">
            <text:p>-0.0893997494680482</text:p>
          </table:table-cell>
          <table:table-cell office:value-type="float" office:value="0.101059021335409" calcext:value-type="float">
            <text:p>0.101059021335409</text:p>
          </table:table-cell>
          <table:table-cell office:value-type="float" office:value="0.00583464531720383" calcext:value-type="float">
            <text:p>0.00583464531720383</text:p>
          </table:table-cell>
          <table:table-cell office:value-type="float" office:value="0.108967008706426" calcext:value-type="float">
            <text:p>0.108967008706426</text:p>
          </table:table-cell>
          <table:table-cell office:value-type="float" office:value="0.0794886811265635" calcext:value-type="float">
            <text:p>0.0794886811265635</text:p>
          </table:table-cell>
          <table:table-cell office:value-type="float" office:value="0.00458928114459498" calcext:value-type="float">
            <text:p>0.0045892811445949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0751633923784388" calcext:value-type="float">
            <text:p>-0.0751633923784388</text:p>
          </table:table-cell>
          <table:table-cell office:value-type="float" office:value="0.0758882977217489" calcext:value-type="float">
            <text:p>0.0758882977217489</text:p>
          </table:table-cell>
          <table:table-cell office:value-type="float" office:value="0.00438141291179942" calcext:value-type="float">
            <text:p>0.00438141291179942</text:p>
          </table:table-cell>
          <table:table-cell office:value-type="float" office:value="0.0865764137625275" calcext:value-type="float">
            <text:p>0.0865764137625275</text:p>
          </table:table-cell>
          <table:table-cell office:value-type="float" office:value="0.0625053609943394" calcext:value-type="float">
            <text:p>0.0625053609943394</text:p>
          </table:table-cell>
          <table:table-cell office:value-type="float" office:value="0.00360874869958766" calcext:value-type="float">
            <text:p>0.0036087486995876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13081466306521" calcext:value-type="float">
            <text:p>-0.113081466306521</text:p>
          </table:table-cell>
          <table:table-cell office:value-type="float" office:value="0.0885210091862225" calcext:value-type="float">
            <text:p>0.0885210091862225</text:p>
          </table:table-cell>
          <table:table-cell office:value-type="float" office:value="0.00511076284826029" calcext:value-type="float">
            <text:p>0.00511076284826029</text:p>
          </table:table-cell>
          <table:table-cell office:value-type="float" office:value="0.121064589168665" calcext:value-type="float">
            <text:p>0.121064589168665</text:p>
          </table:table-cell>
          <table:table-cell office:value-type="float" office:value="0.0772042795305898" calcext:value-type="float">
            <text:p>0.0772042795305898</text:p>
          </table:table-cell>
          <table:table-cell office:value-type="float" office:value="0.00445739115695771" calcext:value-type="float">
            <text:p>0.0044573911569577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68433553395455" calcext:value-type="float">
            <text:p>-0.168433553395455</text:p>
          </table:table-cell>
          <table:table-cell office:value-type="float" office:value="0.0962474001188877" calcext:value-type="float">
            <text:p>0.0962474001188877</text:p>
          </table:table-cell>
          <table:table-cell office:value-type="float" office:value="0.00555684623674414" calcext:value-type="float">
            <text:p>0.00555684623674414</text:p>
          </table:table-cell>
          <table:table-cell office:value-type="float" office:value="0.172031573073182" calcext:value-type="float">
            <text:p>0.172031573073182</text:p>
          </table:table-cell>
          <table:table-cell office:value-type="float" office:value="0.0896351762106471" calcext:value-type="float">
            <text:p>0.0896351762106471</text:p>
          </table:table-cell>
          <table:table-cell office:value-type="float" office:value="0.00517508931140767" calcext:value-type="float">
            <text:p>0.0051750893114076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16428068556733" calcext:value-type="float">
            <text:p>-0.116428068556733</text:p>
          </table:table-cell>
          <table:table-cell office:value-type="float" office:value="0.0677876741059909" calcext:value-type="float">
            <text:p>0.0677876741059909</text:p>
          </table:table-cell>
          <table:table-cell office:value-type="float" office:value="0.00391372318928325" calcext:value-type="float">
            <text:p>0.00391372318928325</text:p>
          </table:table-cell>
          <table:table-cell office:value-type="float" office:value="0.11773815436026" calcext:value-type="float">
            <text:p>0.11773815436026</text:p>
          </table:table-cell>
          <table:table-cell office:value-type="float" office:value="0.0654779726590076" calcext:value-type="float">
            <text:p>0.0654779726590076</text:p>
          </table:table-cell>
          <table:table-cell office:value-type="float" office:value="0.0037803725140669" calcext:value-type="float">
            <text:p>0.003780372514066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83766788704165" calcext:value-type="float">
            <text:p>-0.183766788704165</text:p>
          </table:table-cell>
          <table:table-cell office:value-type="float" office:value="0.0811242753934998" calcext:value-type="float">
            <text:p>0.0811242753934998</text:p>
          </table:table-cell>
          <table:table-cell office:value-type="float" office:value="0.00468371222362504" calcext:value-type="float">
            <text:p>0.00468371222362504</text:p>
          </table:table-cell>
          <table:table-cell office:value-type="float" office:value="0.184363642230529" calcext:value-type="float">
            <text:p>0.184363642230529</text:p>
          </table:table-cell>
          <table:table-cell office:value-type="float" office:value="0.0797539545285224" calcext:value-type="float">
            <text:p>0.0797539545285224</text:p>
          </table:table-cell>
          <table:table-cell office:value-type="float" office:value="0.00460459671159796" calcext:value-type="float">
            <text:p>0.0046045967115979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Quantile</text:p>
          </table:table-cell>
          <table:table-cell office:value-type="string" calcext:value-type="string">
            <text:p>quantile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68335308035002" calcext:value-type="float">
            <text:p>-0.268335308035002</text:p>
          </table:table-cell>
          <table:table-cell office:value-type="float" office:value="0.0953056010590242" calcext:value-type="float">
            <text:p>0.0953056010590242</text:p>
          </table:table-cell>
          <table:table-cell office:value-type="float" office:value="0.00550247144267067" calcext:value-type="float">
            <text:p>0.00550247144267067</text:p>
          </table:table-cell>
          <table:table-cell office:value-type="float" office:value="0.268335308035002" calcext:value-type="float">
            <text:p>0.268335308035002</text:p>
          </table:table-cell>
          <table:table-cell office:value-type="float" office:value="0.0953056010590242" calcext:value-type="float">
            <text:p>0.0953056010590242</text:p>
          </table:table-cell>
          <table:table-cell office:value-type="float" office:value="0.00550247144267067" calcext:value-type="float">
            <text:p>0.0055024714426706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14627834292818" calcext:value-type="float">
            <text:p>-0.14627834292818</text:p>
          </table:table-cell>
          <table:table-cell office:value-type="float" office:value="0.090100772405317" calcext:value-type="float">
            <text:p>0.090100772405317</text:p>
          </table:table-cell>
          <table:table-cell office:value-type="float" office:value="0.0052019705202403" calcext:value-type="float">
            <text:p>0.0052019705202403</text:p>
          </table:table-cell>
          <table:table-cell office:value-type="float" office:value="0.151038171626058" calcext:value-type="float">
            <text:p>0.151038171626058</text:p>
          </table:table-cell>
          <table:table-cell office:value-type="float" office:value="0.0818427790381158" calcext:value-type="float">
            <text:p>0.0818427790381158</text:p>
          </table:table-cell>
          <table:table-cell office:value-type="float" office:value="0.00472519505088832" calcext:value-type="float">
            <text:p>0.0047251950508883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39245398959173" calcext:value-type="float">
            <text:p>-0.239245398959173</text:p>
          </table:table-cell>
          <table:table-cell office:value-type="float" office:value="0.101790463442592" calcext:value-type="float">
            <text:p>0.101790463442592</text:p>
          </table:table-cell>
          <table:table-cell office:value-type="float" office:value="0.00587687514695173" calcext:value-type="float">
            <text:p>0.00587687514695173</text:p>
          </table:table-cell>
          <table:table-cell office:value-type="float" office:value="0.239698793322188" calcext:value-type="float">
            <text:p>0.239698793322188</text:p>
          </table:table-cell>
          <table:table-cell office:value-type="float" office:value="0.100714555029058" calcext:value-type="float">
            <text:p>0.100714555029058</text:p>
          </table:table-cell>
          <table:table-cell office:value-type="float" office:value="0.005814757545734" calcext:value-type="float">
            <text:p>0.00581475754573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341348422739651" calcext:value-type="float">
            <text:p>-0.341348422739651</text:p>
          </table:table-cell>
          <table:table-cell office:value-type="float" office:value="0.125635306892047" calcext:value-type="float">
            <text:p>0.125635306892047</text:p>
          </table:table-cell>
          <table:table-cell office:value-type="float" office:value="0.00725355782538444" calcext:value-type="float">
            <text:p>0.00725355782538444</text:p>
          </table:table-cell>
          <table:table-cell office:value-type="float" office:value="0.341404179419482" calcext:value-type="float">
            <text:p>0.341404179419482</text:p>
          </table:table-cell>
          <table:table-cell office:value-type="float" office:value="0.125483206054954" calcext:value-type="float">
            <text:p>0.125483206054954</text:p>
          </table:table-cell>
          <table:table-cell office:value-type="float" office:value="0.00724477627946047" calcext:value-type="float">
            <text:p>0.0072447762794604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59994140250333" calcext:value-type="float">
            <text:p>-0.159994140250333</text:p>
          </table:table-cell>
          <table:table-cell office:value-type="float" office:value="0.0789092617775465" calcext:value-type="float">
            <text:p>0.0789092617775465</text:p>
          </table:table-cell>
          <table:table-cell office:value-type="float" office:value="0.00455582835288211" calcext:value-type="float">
            <text:p>0.00455582835288211</text:p>
          </table:table-cell>
          <table:table-cell office:value-type="float" office:value="0.161571207419636" calcext:value-type="float">
            <text:p>0.161571207419636</text:p>
          </table:table-cell>
          <table:table-cell office:value-type="float" office:value="0.0756164357412763" calcext:value-type="float">
            <text:p>0.0756164357412763</text:p>
          </table:table-cell>
          <table:table-cell office:value-type="float" office:value="0.00436571695303859" calcext:value-type="float">
            <text:p>0.0043657169530385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265913941021949" calcext:value-type="float">
            <text:p>-0.265913941021949</text:p>
          </table:table-cell>
          <table:table-cell office:value-type="float" office:value="0.0939079846428906" calcext:value-type="float">
            <text:p>0.0939079846428906</text:p>
          </table:table-cell>
          <table:table-cell office:value-type="float" office:value="0.00542178002126281" calcext:value-type="float">
            <text:p>0.00542178002126281</text:p>
          </table:table-cell>
          <table:table-cell office:value-type="float" office:value="0.265934591375061" calcext:value-type="float">
            <text:p>0.265934591375061</text:p>
          </table:table-cell>
          <table:table-cell office:value-type="float" office:value="0.0938492940182304" calcext:value-type="float">
            <text:p>0.0938492940182304</text:p>
          </table:table-cell>
          <table:table-cell office:value-type="float" office:value="0.00541839151646817" calcext:value-type="float">
            <text:p>0.0054183915164681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375153265038971" calcext:value-type="float">
            <text:p>-0.375153265038971</text:p>
          </table:table-cell>
          <table:table-cell office:value-type="float" office:value="0.120899790261693" calcext:value-type="float">
            <text:p>0.120899790261693</text:p>
          </table:table-cell>
          <table:table-cell office:value-type="float" office:value="0.00698015264525575" calcext:value-type="float">
            <text:p>0.00698015264525575</text:p>
          </table:table-cell>
          <table:table-cell office:value-type="float" office:value="0.375153265038971" calcext:value-type="float">
            <text:p>0.375153265038971</text:p>
          </table:table-cell>
          <table:table-cell office:value-type="float" office:value="0.120899790261693" calcext:value-type="float">
            <text:p>0.120899790261693</text:p>
          </table:table-cell>
          <table:table-cell office:value-type="float" office:value="0.00698015264525575" calcext:value-type="float">
            <text:p>0.0069801526452557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77362874272024" calcext:value-type="float">
            <text:p>-0.177362874272024</text:p>
          </table:table-cell>
          <table:table-cell office:value-type="float" office:value="0.070299017809506" calcext:value-type="float">
            <text:p>0.070299017809506</text:p>
          </table:table-cell>
          <table:table-cell office:value-type="float" office:value="0.00405871568560846" calcext:value-type="float">
            <text:p>0.00405871568560846</text:p>
          </table:table-cell>
          <table:table-cell office:value-type="float" office:value="0.177817789844704" calcext:value-type="float">
            <text:p>0.177817789844704</text:p>
          </table:table-cell>
          <table:table-cell office:value-type="float" office:value="0.0691363457071263" calcext:value-type="float">
            <text:p>0.0691363457071263</text:p>
          </table:table-cell>
          <table:table-cell office:value-type="float" office:value="0.00399158878047964" calcext:value-type="float">
            <text:p>0.0039915887804796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98835173118644" calcext:value-type="float">
            <text:p>-0.298835173118644</text:p>
          </table:table-cell>
          <table:table-cell office:value-type="float" office:value="0.0888081187382287" calcext:value-type="float">
            <text:p>0.0888081187382287</text:p>
          </table:table-cell>
          <table:table-cell office:value-type="float" office:value="0.00512733912597406" calcext:value-type="float">
            <text:p>0.00512733912597406</text:p>
          </table:table-cell>
          <table:table-cell office:value-type="float" office:value="0.298835173118644" calcext:value-type="float">
            <text:p>0.298835173118644</text:p>
          </table:table-cell>
          <table:table-cell office:value-type="float" office:value="0.0888081187382287" calcext:value-type="float">
            <text:p>0.0888081187382287</text:p>
          </table:table-cell>
          <table:table-cell office:value-type="float" office:value="0.00512733912597406" calcext:value-type="float">
            <text:p>0.0051273391259740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417883244105536" calcext:value-type="float">
            <text:p>-0.417883244105536</text:p>
          </table:table-cell>
          <table:table-cell office:value-type="float" office:value="0.118452286348395" calcext:value-type="float">
            <text:p>0.118452286348395</text:p>
          </table:table-cell>
          <table:table-cell office:value-type="float" office:value="0.00683884594093723" calcext:value-type="float">
            <text:p>0.00683884594093723</text:p>
          </table:table-cell>
          <table:table-cell office:value-type="float" office:value="0.417883244105536" calcext:value-type="float">
            <text:p>0.417883244105536</text:p>
          </table:table-cell>
          <table:table-cell office:value-type="float" office:value="0.118452286348395" calcext:value-type="float">
            <text:p>0.118452286348395</text:p>
          </table:table-cell>
          <table:table-cell office:value-type="float" office:value="0.00683884594093723" calcext:value-type="float">
            <text:p>0.0068388459409372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134032921811494" calcext:value-type="float">
            <text:p>-0.134032921811494</text:p>
          </table:table-cell>
          <table:table-cell office:value-type="float" office:value="0.0678225553471982" calcext:value-type="float">
            <text:p>0.0678225553471982</text:p>
          </table:table-cell>
          <table:table-cell office:value-type="float" office:value="0.00391573705868332" calcext:value-type="float">
            <text:p>0.00391573705868332</text:p>
          </table:table-cell>
          <table:table-cell office:value-type="float" office:value="0.135455459980003" calcext:value-type="float">
            <text:p>0.135455459980003</text:p>
          </table:table-cell>
          <table:table-cell office:value-type="float" office:value="0.0649250288611286" calcext:value-type="float">
            <text:p>0.0649250288611286</text:p>
          </table:table-cell>
          <table:table-cell office:value-type="float" office:value="0.00374844828901168" calcext:value-type="float">
            <text:p>0.0037484482890116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24133952857686" calcext:value-type="float">
            <text:p>-0.224133952857686</text:p>
          </table:table-cell>
          <table:table-cell office:value-type="float" office:value="0.0729184545725866" calcext:value-type="float">
            <text:p>0.0729184545725866</text:p>
          </table:table-cell>
          <table:table-cell office:value-type="float" office:value="0.00420994893763744" calcext:value-type="float">
            <text:p>0.00420994893763744</text:p>
          </table:table-cell>
          <table:table-cell office:value-type="float" office:value="0.224133952857686" calcext:value-type="float">
            <text:p>0.224133952857686</text:p>
          </table:table-cell>
          <table:table-cell office:value-type="float" office:value="0.0729184545725866" calcext:value-type="float">
            <text:p>0.0729184545725866</text:p>
          </table:table-cell>
          <table:table-cell office:value-type="float" office:value="0.00420994893763744" calcext:value-type="float">
            <text:p>0.0042099489376374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312185290214712" calcext:value-type="float">
            <text:p>-0.312185290214712</text:p>
          </table:table-cell>
          <table:table-cell office:value-type="float" office:value="0.0948478778094466" calcext:value-type="float">
            <text:p>0.0948478778094466</text:p>
          </table:table-cell>
          <table:table-cell office:value-type="float" office:value="0.00547604477853487" calcext:value-type="float">
            <text:p>0.00547604477853487</text:p>
          </table:table-cell>
          <table:table-cell office:value-type="float" office:value="0.312185290214712" calcext:value-type="float">
            <text:p>0.312185290214712</text:p>
          </table:table-cell>
          <table:table-cell office:value-type="float" office:value="0.0948478778094466" calcext:value-type="float">
            <text:p>0.0948478778094466</text:p>
          </table:table-cell>
          <table:table-cell office:value-type="float" office:value="0.00547604477853487" calcext:value-type="float">
            <text:p>0.0054760447785348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49963232144909" calcext:value-type="float">
            <text:p>-0.149963232144909</text:p>
          </table:table-cell>
          <table:table-cell office:value-type="float" office:value="0.0593419172805614" calcext:value-type="float">
            <text:p>0.0593419172805614</text:p>
          </table:table-cell>
          <table:table-cell office:value-type="float" office:value="0.00342610719161606" calcext:value-type="float">
            <text:p>0.00342610719161606</text:p>
          </table:table-cell>
          <table:table-cell office:value-type="float" office:value="0.150317295466087" calcext:value-type="float">
            <text:p>0.150317295466087</text:p>
          </table:table-cell>
          <table:table-cell office:value-type="float" office:value="0.05843619807939" calcext:value-type="float">
            <text:p>0.05843619807939</text:p>
          </table:table-cell>
          <table:table-cell office:value-type="float" office:value="0.00337381546915541" calcext:value-type="float">
            <text:p>0.0033738154691554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250225494083761" calcext:value-type="float">
            <text:p>-0.250225494083761</text:p>
          </table:table-cell>
          <table:table-cell office:value-type="float" office:value="0.0669038116374076" calcext:value-type="float">
            <text:p>0.0669038116374076</text:p>
          </table:table-cell>
          <table:table-cell office:value-type="float" office:value="0.00386269336586693" calcext:value-type="float">
            <text:p>0.00386269336586693</text:p>
          </table:table-cell>
          <table:table-cell office:value-type="float" office:value="0.250225494083761" calcext:value-type="float">
            <text:p>0.250225494083761</text:p>
          </table:table-cell>
          <table:table-cell office:value-type="float" office:value="0.0669038116374076" calcext:value-type="float">
            <text:p>0.0669038116374076</text:p>
          </table:table-cell>
          <table:table-cell office:value-type="float" office:value="0.00386269336586693" calcext:value-type="float">
            <text:p>0.0038626933658669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349063707176073" calcext:value-type="float">
            <text:p>-0.349063707176073</text:p>
          </table:table-cell>
          <table:table-cell office:value-type="float" office:value="0.0897549425266051" calcext:value-type="float">
            <text:p>0.0897549425266051</text:p>
          </table:table-cell>
          <table:table-cell office:value-type="float" office:value="0.00518200402288349" calcext:value-type="float">
            <text:p>0.00518200402288349</text:p>
          </table:table-cell>
          <table:table-cell office:value-type="float" office:value="0.349063707176073" calcext:value-type="float">
            <text:p>0.349063707176073</text:p>
          </table:table-cell>
          <table:table-cell office:value-type="float" office:value="0.0897549425266051" calcext:value-type="float">
            <text:p>0.0897549425266051</text:p>
          </table:table-cell>
          <table:table-cell office:value-type="float" office:value="0.00518200402288349" calcext:value-type="float">
            <text:p>0.0051820040228834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69588623736624" calcext:value-type="float">
            <text:p>-0.169588623736624</text:p>
          </table:table-cell>
          <table:table-cell office:value-type="float" office:value="0.0527402450739094" calcext:value-type="float">
            <text:p>0.0527402450739094</text:p>
          </table:table-cell>
          <table:table-cell office:value-type="float" office:value="0.00304495946905484" calcext:value-type="float">
            <text:p>0.00304495946905484</text:p>
          </table:table-cell>
          <table:table-cell office:value-type="float" office:value="0.169588623736624" calcext:value-type="float">
            <text:p>0.169588623736624</text:p>
          </table:table-cell>
          <table:table-cell office:value-type="float" office:value="0.0527402450739094" calcext:value-type="float">
            <text:p>0.0527402450739094</text:p>
          </table:table-cell>
          <table:table-cell office:value-type="float" office:value="0.00304495946905484" calcext:value-type="float">
            <text:p>0.0030449594690548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82466019581203" calcext:value-type="float">
            <text:p>-0.282466019581203</text:p>
          </table:table-cell>
          <table:table-cell office:value-type="float" office:value="0.0631446025380896" calcext:value-type="float">
            <text:p>0.0631446025380896</text:p>
          </table:table-cell>
          <table:table-cell office:value-type="float" office:value="0.0036456553273238" calcext:value-type="float">
            <text:p>0.0036456553273238</text:p>
          </table:table-cell>
          <table:table-cell office:value-type="float" office:value="0.282466019581203" calcext:value-type="float">
            <text:p>0.282466019581203</text:p>
          </table:table-cell>
          <table:table-cell office:value-type="float" office:value="0.0631446025380896" calcext:value-type="float">
            <text:p>0.0631446025380896</text:p>
          </table:table-cell>
          <table:table-cell office:value-type="float" office:value="0.0036456553273238" calcext:value-type="float">
            <text:p>0.003645655327323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ridge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394627935931906" calcext:value-type="float">
            <text:p>-0.394627935931906</text:p>
          </table:table-cell>
          <table:table-cell office:value-type="float" office:value="0.0868619994926034" calcext:value-type="float">
            <text:p>0.0868619994926034</text:p>
          </table:table-cell>
          <table:table-cell office:value-type="float" office:value="0.00501497987894037" calcext:value-type="float">
            <text:p>0.00501497987894037</text:p>
          </table:table-cell>
          <table:table-cell office:value-type="float" office:value="0.394627935931906" calcext:value-type="float">
            <text:p>0.394627935931906</text:p>
          </table:table-cell>
          <table:table-cell office:value-type="float" office:value="0.0868619994926034" calcext:value-type="float">
            <text:p>0.0868619994926034</text:p>
          </table:table-cell>
          <table:table-cell office:value-type="float" office:value="0.00501497987894037" calcext:value-type="float">
            <text:p>0.0050149798789403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143674963565074" calcext:value-type="float">
            <text:p>-0.143674963565074</text:p>
          </table:table-cell>
          <table:table-cell office:value-type="float" office:value="0.0926035716387981" calcext:value-type="float">
            <text:p>0.0926035716387981</text:p>
          </table:table-cell>
          <table:table-cell office:value-type="float" office:value="0.00534646970135808" calcext:value-type="float">
            <text:p>0.00534646970135808</text:p>
          </table:table-cell>
          <table:table-cell office:value-type="float" office:value="0.14935729622691" calcext:value-type="float">
            <text:p>0.14935729622691</text:p>
          </table:table-cell>
          <table:table-cell office:value-type="float" office:value="0.0830947999604982" calcext:value-type="float">
            <text:p>0.0830947999604982</text:p>
          </table:table-cell>
          <table:table-cell office:value-type="float" office:value="0.00479748051254517" calcext:value-type="float">
            <text:p>0.0047974805125451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28113326708038" calcext:value-type="float">
            <text:p>-0.228113326708038</text:p>
          </table:table-cell>
          <table:table-cell office:value-type="float" office:value="0.104617976315997" calcext:value-type="float">
            <text:p>0.104617976315997</text:p>
          </table:table-cell>
          <table:table-cell office:value-type="float" office:value="0.0060401216788115" calcext:value-type="float">
            <text:p>0.0060401216788115</text:p>
          </table:table-cell>
          <table:table-cell office:value-type="float" office:value="0.228930854775864" calcext:value-type="float">
            <text:p>0.228930854775864</text:p>
          </table:table-cell>
          <table:table-cell office:value-type="float" office:value="0.102810626241588" calcext:value-type="float">
            <text:p>0.102810626241588</text:p>
          </table:table-cell>
          <table:table-cell office:value-type="float" office:value="0.00593577427361347" calcext:value-type="float">
            <text:p>0.0059357742736134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321941434482419" calcext:value-type="float">
            <text:p>-0.321941434482419</text:p>
          </table:table-cell>
          <table:table-cell office:value-type="float" office:value="0.129125176527937" calcext:value-type="float">
            <text:p>0.129125176527937</text:p>
          </table:table-cell>
          <table:table-cell office:value-type="float" office:value="0.00745504554275623" calcext:value-type="float">
            <text:p>0.00745504554275623</text:p>
          </table:table-cell>
          <table:table-cell office:value-type="float" office:value="0.322293567219224" calcext:value-type="float">
            <text:p>0.322293567219224</text:p>
          </table:table-cell>
          <table:table-cell office:value-type="float" office:value="0.128240774571014" calcext:value-type="float">
            <text:p>0.128240774571014</text:p>
          </table:table-cell>
          <table:table-cell office:value-type="float" office:value="0.00740398457196612" calcext:value-type="float">
            <text:p>0.0074039845719661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57771755257287" calcext:value-type="float">
            <text:p>-0.157771755257287</text:p>
          </table:table-cell>
          <table:table-cell office:value-type="float" office:value="0.0811011857158117" calcext:value-type="float">
            <text:p>0.0811011857158117</text:p>
          </table:table-cell>
          <table:table-cell office:value-type="float" office:value="0.00468237914046217" calcext:value-type="float">
            <text:p>0.00468237914046217</text:p>
          </table:table-cell>
          <table:table-cell office:value-type="float" office:value="0.15971700251074" calcext:value-type="float">
            <text:p>0.15971700251074</text:p>
          </table:table-cell>
          <table:table-cell office:value-type="float" office:value="0.0771864149850168" calcext:value-type="float">
            <text:p>0.0771864149850168</text:p>
          </table:table-cell>
          <table:table-cell office:value-type="float" office:value="0.00445635974693816" calcext:value-type="float">
            <text:p>0.0044563597469381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255522661605892" calcext:value-type="float">
            <text:p>-0.255522661605892</text:p>
          </table:table-cell>
          <table:table-cell office:value-type="float" office:value="0.0965165397718597" calcext:value-type="float">
            <text:p>0.0965165397718597</text:p>
          </table:table-cell>
          <table:table-cell office:value-type="float" office:value="0.00557238502185344" calcext:value-type="float">
            <text:p>0.00557238502185344</text:p>
          </table:table-cell>
          <table:table-cell office:value-type="float" office:value="0.255662404098442" calcext:value-type="float">
            <text:p>0.255662404098442</text:p>
          </table:table-cell>
          <table:table-cell office:value-type="float" office:value="0.0961445227960369" calcext:value-type="float">
            <text:p>0.0961445227960369</text:p>
          </table:table-cell>
          <table:table-cell office:value-type="float" office:value="0.00555090661174" calcext:value-type="float">
            <text:p>0.0055509066117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356685300178943" calcext:value-type="float">
            <text:p>-0.356685300178943</text:p>
          </table:table-cell>
          <table:table-cell office:value-type="float" office:value="0.124258117768962" calcext:value-type="float">
            <text:p>0.124258117768962</text:p>
          </table:table-cell>
          <table:table-cell office:value-type="float" office:value="0.00717404577429063" calcext:value-type="float">
            <text:p>0.00717404577429063</text:p>
          </table:table-cell>
          <table:table-cell office:value-type="float" office:value="0.356685300178943" calcext:value-type="float">
            <text:p>0.356685300178943</text:p>
          </table:table-cell>
          <table:table-cell office:value-type="float" office:value="0.124258117768962" calcext:value-type="float">
            <text:p>0.124258117768962</text:p>
          </table:table-cell>
          <table:table-cell office:value-type="float" office:value="0.00717404577429063" calcext:value-type="float">
            <text:p>0.0071740457742906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75622954112913" calcext:value-type="float">
            <text:p>-0.175622954112913</text:p>
          </table:table-cell>
          <table:table-cell office:value-type="float" office:value="0.0722517683042145" calcext:value-type="float">
            <text:p>0.0722517683042145</text:p>
          </table:table-cell>
          <table:table-cell office:value-type="float" office:value="0.00417145778798647" calcext:value-type="float">
            <text:p>0.00417145778798647</text:p>
          </table:table-cell>
          <table:table-cell office:value-type="float" office:value="0.176179395118168" calcext:value-type="float">
            <text:p>0.176179395118168</text:p>
          </table:table-cell>
          <table:table-cell office:value-type="float" office:value="0.0708795179420494" calcext:value-type="float">
            <text:p>0.0708795179420494</text:p>
          </table:table-cell>
          <table:table-cell office:value-type="float" office:value="0.00409223087638731" calcext:value-type="float">
            <text:p>0.0040922308763873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89358372371939" calcext:value-type="float">
            <text:p>-0.289358372371939</text:p>
          </table:table-cell>
          <table:table-cell office:value-type="float" office:value="0.0912750109254018" calcext:value-type="float">
            <text:p>0.0912750109254018</text:p>
          </table:table-cell>
          <table:table-cell office:value-type="float" office:value="0.00526976521280668" calcext:value-type="float">
            <text:p>0.00526976521280668</text:p>
          </table:table-cell>
          <table:table-cell office:value-type="float" office:value="0.289358372371939" calcext:value-type="float">
            <text:p>0.289358372371939</text:p>
          </table:table-cell>
          <table:table-cell office:value-type="float" office:value="0.0912750109254018" calcext:value-type="float">
            <text:p>0.0912750109254018</text:p>
          </table:table-cell>
          <table:table-cell office:value-type="float" office:value="0.00526976521280668" calcext:value-type="float">
            <text:p>0.0052697652128066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400602223108468" calcext:value-type="float">
            <text:p>-0.400602223108468</text:p>
          </table:table-cell>
          <table:table-cell office:value-type="float" office:value="0.12174262763585" calcext:value-type="float">
            <text:p>0.12174262763585</text:p>
          </table:table-cell>
          <table:table-cell office:value-type="float" office:value="0.00702881388374104" calcext:value-type="float">
            <text:p>0.00702881388374104</text:p>
          </table:table-cell>
          <table:table-cell office:value-type="float" office:value="0.400602223108468" calcext:value-type="float">
            <text:p>0.400602223108468</text:p>
          </table:table-cell>
          <table:table-cell office:value-type="float" office:value="0.12174262763585" calcext:value-type="float">
            <text:p>0.12174262763585</text:p>
          </table:table-cell>
          <table:table-cell office:value-type="float" office:value="0.00702881388374104" calcext:value-type="float">
            <text:p>0.0070288138837410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137561156836654" calcext:value-type="float">
            <text:p>-0.137561156836654</text:p>
          </table:table-cell>
          <table:table-cell office:value-type="float" office:value="0.068764535282576" calcext:value-type="float">
            <text:p>0.068764535282576</text:p>
          </table:table-cell>
          <table:table-cell office:value-type="float" office:value="0.00397012229560948" calcext:value-type="float">
            <text:p>0.00397012229560948</text:p>
          </table:table-cell>
          <table:table-cell office:value-type="float" office:value="0.138925674701947" calcext:value-type="float">
            <text:p>0.138925674701947</text:p>
          </table:table-cell>
          <table:table-cell office:value-type="float" office:value="0.0659547444450848" calcext:value-type="float">
            <text:p>0.0659547444450848</text:p>
          </table:table-cell>
          <table:table-cell office:value-type="float" office:value="0.00380789894597027" calcext:value-type="float">
            <text:p>0.0038078989459702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23358035536265" calcext:value-type="float">
            <text:p>-0.223358035536265</text:p>
          </table:table-cell>
          <table:table-cell office:value-type="float" office:value="0.0739312108860948" calcext:value-type="float">
            <text:p>0.0739312108860948</text:p>
          </table:table-cell>
          <table:table-cell office:value-type="float" office:value="0.00426842045066018" calcext:value-type="float">
            <text:p>0.00426842045066018</text:p>
          </table:table-cell>
          <table:table-cell office:value-type="float" office:value="0.223358035536265" calcext:value-type="float">
            <text:p>0.223358035536265</text:p>
          </table:table-cell>
          <table:table-cell office:value-type="float" office:value="0.0739312108860948" calcext:value-type="float">
            <text:p>0.0739312108860948</text:p>
          </table:table-cell>
          <table:table-cell office:value-type="float" office:value="0.00426842045066018" calcext:value-type="float">
            <text:p>0.0042684204506601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307076752578805" calcext:value-type="float">
            <text:p>-0.307076752578805</text:p>
          </table:table-cell>
          <table:table-cell office:value-type="float" office:value="0.0961652094456889" calcext:value-type="float">
            <text:p>0.0961652094456889</text:p>
          </table:table-cell>
          <table:table-cell office:value-type="float" office:value="0.00555210095601452" calcext:value-type="float">
            <text:p>0.00555210095601452</text:p>
          </table:table-cell>
          <table:table-cell office:value-type="float" office:value="0.307076752578805" calcext:value-type="float">
            <text:p>0.307076752578805</text:p>
          </table:table-cell>
          <table:table-cell office:value-type="float" office:value="0.0961652094456889" calcext:value-type="float">
            <text:p>0.0961652094456889</text:p>
          </table:table-cell>
          <table:table-cell office:value-type="float" office:value="0.00555210095601452" calcext:value-type="float">
            <text:p>0.0055521009560145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53712721480255" calcext:value-type="float">
            <text:p>-0.153712721480255</text:p>
          </table:table-cell>
          <table:table-cell office:value-type="float" office:value="0.0601661105761247" calcext:value-type="float">
            <text:p>0.0601661105761247</text:p>
          </table:table-cell>
          <table:table-cell office:value-type="float" office:value="0.00347369201372184" calcext:value-type="float">
            <text:p>0.00347369201372184</text:p>
          </table:table-cell>
          <table:table-cell office:value-type="float" office:value="0.154060591236449" calcext:value-type="float">
            <text:p>0.154060591236449</text:p>
          </table:table-cell>
          <table:table-cell office:value-type="float" office:value="0.0592666664963251" calcext:value-type="float">
            <text:p>0.0592666664963251</text:p>
          </table:table-cell>
          <table:table-cell office:value-type="float" office:value="0.0034217625855625" calcext:value-type="float">
            <text:p>0.003421762585562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249811959279369" calcext:value-type="float">
            <text:p>-0.249811959279369</text:p>
          </table:table-cell>
          <table:table-cell office:value-type="float" office:value="0.0678330312434827" calcext:value-type="float">
            <text:p>0.0678330312434827</text:p>
          </table:table-cell>
          <table:table-cell office:value-type="float" office:value="0.0039163418848373" calcext:value-type="float">
            <text:p>0.0039163418848373</text:p>
          </table:table-cell>
          <table:table-cell office:value-type="float" office:value="0.249811959279369" calcext:value-type="float">
            <text:p>0.249811959279369</text:p>
          </table:table-cell>
          <table:table-cell office:value-type="float" office:value="0.0678330312434827" calcext:value-type="float">
            <text:p>0.0678330312434827</text:p>
          </table:table-cell>
          <table:table-cell office:value-type="float" office:value="0.0039163418848373" calcext:value-type="float">
            <text:p>0.003916341884837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344467369775741" calcext:value-type="float">
            <text:p>-0.344467369775741</text:p>
          </table:table-cell>
          <table:table-cell office:value-type="float" office:value="0.0910015389505857" calcext:value-type="float">
            <text:p>0.0910015389505857</text:p>
          </table:table-cell>
          <table:table-cell office:value-type="float" office:value="0.00525397630097909" calcext:value-type="float">
            <text:p>0.00525397630097909</text:p>
          </table:table-cell>
          <table:table-cell office:value-type="float" office:value="0.344467369775741" calcext:value-type="float">
            <text:p>0.344467369775741</text:p>
          </table:table-cell>
          <table:table-cell office:value-type="float" office:value="0.0910015389505857" calcext:value-type="float">
            <text:p>0.0910015389505857</text:p>
          </table:table-cell>
          <table:table-cell office:value-type="float" office:value="0.00525397630097909" calcext:value-type="float">
            <text:p>0.0052539763009790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73610687955188" calcext:value-type="float">
            <text:p>-0.173610687955188</text:p>
          </table:table-cell>
          <table:table-cell office:value-type="float" office:value="0.0534727484777137" calcext:value-type="float">
            <text:p>0.0534727484777137</text:p>
          </table:table-cell>
          <table:table-cell office:value-type="float" office:value="0.00308725057279171" calcext:value-type="float">
            <text:p>0.00308725057279171</text:p>
          </table:table-cell>
          <table:table-cell office:value-type="float" office:value="0.173610687955188" calcext:value-type="float">
            <text:p>0.173610687955188</text:p>
          </table:table-cell>
          <table:table-cell office:value-type="float" office:value="0.0534727484777137" calcext:value-type="float">
            <text:p>0.0534727484777137</text:p>
          </table:table-cell>
          <table:table-cell office:value-type="float" office:value="0.00308725057279171" calcext:value-type="float">
            <text:p>0.0030872505727917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82500269853164" calcext:value-type="float">
            <text:p>-0.282500269853164</text:p>
          </table:table-cell>
          <table:table-cell office:value-type="float" office:value="0.0640216109066742" calcext:value-type="float">
            <text:p>0.0640216109066742</text:p>
          </table:table-cell>
          <table:table-cell office:value-type="float" office:value="0.00369628942909218" calcext:value-type="float">
            <text:p>0.00369628942909218</text:p>
          </table:table-cell>
          <table:table-cell office:value-type="float" office:value="0.282500269853164" calcext:value-type="float">
            <text:p>0.282500269853164</text:p>
          </table:table-cell>
          <table:table-cell office:value-type="float" office:value="0.0640216109066742" calcext:value-type="float">
            <text:p>0.0640216109066742</text:p>
          </table:table-cell>
          <table:table-cell office:value-type="float" office:value="0.00369628942909218" calcext:value-type="float">
            <text:p>0.0036962894290921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office:value-type="string" calcext:value-type="string">
            <text:p>lasso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390664435042071" calcext:value-type="float">
            <text:p>-0.390664435042071</text:p>
          </table:table-cell>
          <table:table-cell office:value-type="float" office:value="0.0880684161522229" calcext:value-type="float">
            <text:p>0.0880684161522229</text:p>
          </table:table-cell>
          <table:table-cell office:value-type="float" office:value="0.00508463237725899" calcext:value-type="float">
            <text:p>0.00508463237725899</text:p>
          </table:table-cell>
          <table:table-cell office:value-type="float" office:value="0.390664435042071" calcext:value-type="float">
            <text:p>0.390664435042071</text:p>
          </table:table-cell>
          <table:table-cell office:value-type="float" office:value="0.0880684161522229" calcext:value-type="float">
            <text:p>0.0880684161522229</text:p>
          </table:table-cell>
          <table:table-cell office:value-type="float" office:value="0.00508463237725899" calcext:value-type="float">
            <text:p>0.0050846323772589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140970113000074" calcext:value-type="float">
            <text:p>-0.140970113000074</text:p>
          </table:table-cell>
          <table:table-cell office:value-type="float" office:value="0.0921428573520379" calcext:value-type="float">
            <text:p>0.0921428573520379</text:p>
          </table:table-cell>
          <table:table-cell office:value-type="float" office:value="0.00531987034961004" calcext:value-type="float">
            <text:p>0.00531987034961004</text:p>
          </table:table-cell>
          <table:table-cell office:value-type="float" office:value="0.146889515316991" calcext:value-type="float">
            <text:p>0.146889515316991</text:p>
          </table:table-cell>
          <table:table-cell office:value-type="float" office:value="0.0823447044898007" calcext:value-type="float">
            <text:p>0.0823447044898007</text:p>
          </table:table-cell>
          <table:table-cell office:value-type="float" office:value="0.00475417373035266" calcext:value-type="float">
            <text:p>0.0047541737303526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26978434535362" calcext:value-type="float">
            <text:p>-0.226978434535362</text:p>
          </table:table-cell>
          <table:table-cell office:value-type="float" office:value="0.104097488871639" calcext:value-type="float">
            <text:p>0.104097488871639</text:p>
          </table:table-cell>
          <table:table-cell office:value-type="float" office:value="0.0060100713222005" calcext:value-type="float">
            <text:p>0.0060100713222005</text:p>
          </table:table-cell>
          <table:table-cell office:value-type="float" office:value="0.227791895299368" calcext:value-type="float">
            <text:p>0.227791895299368</text:p>
          </table:table-cell>
          <table:table-cell office:value-type="float" office:value="0.102299130588645" calcext:value-type="float">
            <text:p>0.102299130588645</text:p>
          </table:table-cell>
          <table:table-cell office:value-type="float" office:value="0.00590624305832186" calcext:value-type="float">
            <text:p>0.0059062430583218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322329785554646" calcext:value-type="float">
            <text:p>-0.322329785554646</text:p>
          </table:table-cell>
          <table:table-cell office:value-type="float" office:value="0.128482762714365" calcext:value-type="float">
            <text:p>0.128482762714365</text:p>
          </table:table-cell>
          <table:table-cell office:value-type="float" office:value="0.00741795576393655" calcext:value-type="float">
            <text:p>0.00741795576393655</text:p>
          </table:table-cell>
          <table:table-cell office:value-type="float" office:value="0.322640365392263" calcext:value-type="float">
            <text:p>0.322640365392263</text:p>
          </table:table-cell>
          <table:table-cell office:value-type="float" office:value="0.127698220978427" calcext:value-type="float">
            <text:p>0.127698220978427</text:p>
          </table:table-cell>
          <table:table-cell office:value-type="float" office:value="0.00737266022569309" calcext:value-type="float">
            <text:p>0.0073726602256930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54996771400285" calcext:value-type="float">
            <text:p>-0.154996771400285</text:p>
          </table:table-cell>
          <table:table-cell office:value-type="float" office:value="0.0806976972296634" calcext:value-type="float">
            <text:p>0.0806976972296634</text:p>
          </table:table-cell>
          <table:table-cell office:value-type="float" office:value="0.00465908372185291" calcext:value-type="float">
            <text:p>0.00465908372185291</text:p>
          </table:table-cell>
          <table:table-cell office:value-type="float" office:value="0.157038476793439" calcext:value-type="float">
            <text:p>0.157038476793439</text:p>
          </table:table-cell>
          <table:table-cell office:value-type="float" office:value="0.076634871782994" calcext:value-type="float">
            <text:p>0.076634871782994</text:p>
          </table:table-cell>
          <table:table-cell office:value-type="float" office:value="0.00442451638532241" calcext:value-type="float">
            <text:p>0.0044245163853224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254251404582977" calcext:value-type="float">
            <text:p>-0.254251404582977</text:p>
          </table:table-cell>
          <table:table-cell office:value-type="float" office:value="0.09603635798195" calcext:value-type="float">
            <text:p>0.09603635798195</text:p>
          </table:table-cell>
          <table:table-cell office:value-type="float" office:value="0.00554466171328701" calcext:value-type="float">
            <text:p>0.00554466171328701</text:p>
          </table:table-cell>
          <table:table-cell office:value-type="float" office:value="0.254390451839246" calcext:value-type="float">
            <text:p>0.254390451839246</text:p>
          </table:table-cell>
          <table:table-cell office:value-type="float" office:value="0.0956661918368527" calcext:value-type="float">
            <text:p>0.0956661918368527</text:p>
          </table:table-cell>
          <table:table-cell office:value-type="float" office:value="0.00552329016093533" calcext:value-type="float">
            <text:p>0.0055232901609353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356900796197953" calcext:value-type="float">
            <text:p>-0.356900796197953</text:p>
          </table:table-cell>
          <table:table-cell office:value-type="float" office:value="0.123639918178072" calcext:value-type="float">
            <text:p>0.123639918178072</text:p>
          </table:table-cell>
          <table:table-cell office:value-type="float" office:value="0.00713835400426929" calcext:value-type="float">
            <text:p>0.00713835400426929</text:p>
          </table:table-cell>
          <table:table-cell office:value-type="float" office:value="0.356900796197953" calcext:value-type="float">
            <text:p>0.356900796197953</text:p>
          </table:table-cell>
          <table:table-cell office:value-type="float" office:value="0.123639918178072" calcext:value-type="float">
            <text:p>0.123639918178072</text:p>
          </table:table-cell>
          <table:table-cell office:value-type="float" office:value="0.00713835400426929" calcext:value-type="float">
            <text:p>0.0071383540042692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72759158321306" calcext:value-type="float">
            <text:p>-0.172759158321306</text:p>
          </table:table-cell>
          <table:table-cell office:value-type="float" office:value="0.0718923067703627" calcext:value-type="float">
            <text:p>0.0718923067703627</text:p>
          </table:table-cell>
          <table:table-cell office:value-type="float" office:value="0.00415070426665321" calcext:value-type="float">
            <text:p>0.00415070426665321</text:p>
          </table:table-cell>
          <table:table-cell office:value-type="float" office:value="0.173349960296448" calcext:value-type="float">
            <text:p>0.173349960296448</text:p>
          </table:table-cell>
          <table:table-cell office:value-type="float" office:value="0.0704509612123683" calcext:value-type="float">
            <text:p>0.0704509612123683</text:p>
          </table:table-cell>
          <table:table-cell office:value-type="float" office:value="0.00406748814206287" calcext:value-type="float">
            <text:p>0.0040674881420628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87918778479541" calcext:value-type="float">
            <text:p>-0.287918778479541</text:p>
          </table:table-cell>
          <table:table-cell office:value-type="float" office:value="0.0908209063934346" calcext:value-type="float">
            <text:p>0.0908209063934346</text:p>
          </table:table-cell>
          <table:table-cell office:value-type="float" office:value="0.00524354747542953" calcext:value-type="float">
            <text:p>0.00524354747542953</text:p>
          </table:table-cell>
          <table:table-cell office:value-type="float" office:value="0.287918778479541" calcext:value-type="float">
            <text:p>0.287918778479541</text:p>
          </table:table-cell>
          <table:table-cell office:value-type="float" office:value="0.0908209063934346" calcext:value-type="float">
            <text:p>0.0908209063934346</text:p>
          </table:table-cell>
          <table:table-cell office:value-type="float" office:value="0.00524354747542953" calcext:value-type="float">
            <text:p>0.0052435474754295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4005992269736" calcext:value-type="float">
            <text:p>-0.4005992269736</text:p>
          </table:table-cell>
          <table:table-cell office:value-type="float" office:value="0.121136942921244" calcext:value-type="float">
            <text:p>0.121136942921244</text:p>
          </table:table-cell>
          <table:table-cell office:value-type="float" office:value="0.00699384466043885" calcext:value-type="float">
            <text:p>0.00699384466043885</text:p>
          </table:table-cell>
          <table:table-cell office:value-type="float" office:value="0.4005992269736" calcext:value-type="float">
            <text:p>0.4005992269736</text:p>
          </table:table-cell>
          <table:table-cell office:value-type="float" office:value="0.121136942921244" calcext:value-type="float">
            <text:p>0.121136942921244</text:p>
          </table:table-cell>
          <table:table-cell office:value-type="float" office:value="0.00699384466043885" calcext:value-type="float">
            <text:p>0.0069938446604388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134886723220551" calcext:value-type="float">
            <text:p>-0.134886723220551</text:p>
          </table:table-cell>
          <table:table-cell office:value-type="float" office:value="0.0684224231667423" calcext:value-type="float">
            <text:p>0.0684224231667423</text:p>
          </table:table-cell>
          <table:table-cell office:value-type="float" office:value="0.00395037044339251" calcext:value-type="float">
            <text:p>0.00395037044339251</text:p>
          </table:table-cell>
          <table:table-cell office:value-type="float" office:value="0.13633732142814" calcext:value-type="float">
            <text:p>0.13633732142814</text:p>
          </table:table-cell>
          <table:table-cell office:value-type="float" office:value="0.0654742318458108" calcext:value-type="float">
            <text:p>0.0654742318458108</text:p>
          </table:table-cell>
          <table:table-cell office:value-type="float" office:value="0.00378015653811628" calcext:value-type="float">
            <text:p>0.0037801565381162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222246801528622" calcext:value-type="float">
            <text:p>-0.222246801528622</text:p>
          </table:table-cell>
          <table:table-cell office:value-type="float" office:value="0.0735633939165122" calcext:value-type="float">
            <text:p>0.0735633939165122</text:p>
          </table:table-cell>
          <table:table-cell office:value-type="float" office:value="0.00424718452802008" calcext:value-type="float">
            <text:p>0.00424718452802008</text:p>
          </table:table-cell>
          <table:table-cell office:value-type="float" office:value="0.222246801528622" calcext:value-type="float">
            <text:p>0.222246801528622</text:p>
          </table:table-cell>
          <table:table-cell office:value-type="float" office:value="0.0735633939165122" calcext:value-type="float">
            <text:p>0.0735633939165122</text:p>
          </table:table-cell>
          <table:table-cell office:value-type="float" office:value="0.00424718452802008" calcext:value-type="float">
            <text:p>0.0042471845280200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0.307539057292344" calcext:value-type="float">
            <text:p>-0.307539057292344</text:p>
          </table:table-cell>
          <table:table-cell office:value-type="float" office:value="0.0956867755678497" calcext:value-type="float">
            <text:p>0.0956867755678497</text:p>
          </table:table-cell>
          <table:table-cell office:value-type="float" office:value="0.00552447856319853" calcext:value-type="float">
            <text:p>0.00552447856319853</text:p>
          </table:table-cell>
          <table:table-cell office:value-type="float" office:value="0.307539057292344" calcext:value-type="float">
            <text:p>0.307539057292344</text:p>
          </table:table-cell>
          <table:table-cell office:value-type="float" office:value="0.0956867755678497" calcext:value-type="float">
            <text:p>0.0956867755678497</text:p>
          </table:table-cell>
          <table:table-cell office:value-type="float" office:value="0.00552447856319853" calcext:value-type="float">
            <text:p>0.0055244785631985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15095793182115" calcext:value-type="float">
            <text:p>-0.15095793182115</text:p>
          </table:table-cell>
          <table:table-cell office:value-type="float" office:value="0.0598667766926614" calcext:value-type="float">
            <text:p>0.0598667766926614</text:p>
          </table:table-cell>
          <table:table-cell office:value-type="float" office:value="0.00345640996390233" calcext:value-type="float">
            <text:p>0.00345640996390233</text:p>
          </table:table-cell>
          <table:table-cell office:value-type="float" office:value="0.15131733788038" calcext:value-type="float">
            <text:p>0.15131733788038</text:p>
          </table:table-cell>
          <table:table-cell office:value-type="float" office:value="0.0589493684873807" calcext:value-type="float">
            <text:p>0.0589493684873807</text:p>
          </table:table-cell>
          <table:table-cell office:value-type="float" office:value="0.00340344337647477" calcext:value-type="float">
            <text:p>0.0034034433764747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248569113710815" calcext:value-type="float">
            <text:p>-0.248569113710815</text:p>
          </table:table-cell>
          <table:table-cell office:value-type="float" office:value="0.0674955534761022" calcext:value-type="float">
            <text:p>0.0674955534761022</text:p>
          </table:table-cell>
          <table:table-cell office:value-type="float" office:value="0.00389685759685304" calcext:value-type="float">
            <text:p>0.00389685759685304</text:p>
          </table:table-cell>
          <table:table-cell office:value-type="float" office:value="0.248569113710815" calcext:value-type="float">
            <text:p>0.248569113710815</text:p>
          </table:table-cell>
          <table:table-cell office:value-type="float" office:value="0.0674955534761022" calcext:value-type="float">
            <text:p>0.0674955534761022</text:p>
          </table:table-cell>
          <table:table-cell office:value-type="float" office:value="0.00389685759685304" calcext:value-type="float">
            <text:p>0.00389685759685304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34474365151815" calcext:value-type="float">
            <text:p>-0.34474365151815</text:p>
          </table:table-cell>
          <table:table-cell office:value-type="float" office:value="0.0905487949757072" calcext:value-type="float">
            <text:p>0.0905487949757072</text:p>
          </table:table-cell>
          <table:table-cell office:value-type="float" office:value="0.00522783711540208" calcext:value-type="float">
            <text:p>0.00522783711540208</text:p>
          </table:table-cell>
          <table:table-cell office:value-type="float" office:value="0.34474365151815" calcext:value-type="float">
            <text:p>0.34474365151815</text:p>
          </table:table-cell>
          <table:table-cell office:value-type="float" office:value="0.0905487949757072" calcext:value-type="float">
            <text:p>0.0905487949757072</text:p>
          </table:table-cell>
          <table:table-cell office:value-type="float" office:value="0.00522783711540208" calcext:value-type="float">
            <text:p>0.0052278371154020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170756903437998" calcext:value-type="float">
            <text:p>-0.170756903437998</text:p>
          </table:table-cell>
          <table:table-cell office:value-type="float" office:value="0.0532067149031977" calcext:value-type="float">
            <text:p>0.0532067149031977</text:p>
          </table:table-cell>
          <table:table-cell office:value-type="float" office:value="0.00307189111720569" calcext:value-type="float">
            <text:p>0.00307189111720569</text:p>
          </table:table-cell>
          <table:table-cell office:value-type="float" office:value="0.170756903437998" calcext:value-type="float">
            <text:p>0.170756903437998</text:p>
          </table:table-cell>
          <table:table-cell office:value-type="float" office:value="0.0532067149031977" calcext:value-type="float">
            <text:p>0.0532067149031977</text:p>
          </table:table-cell>
          <table:table-cell office:value-type="float" office:value="0.00307189111720569" calcext:value-type="float">
            <text:p>0.0030718911172056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281094795873795" calcext:value-type="float">
            <text:p>-0.281094795873795</text:p>
          </table:table-cell>
          <table:table-cell office:value-type="float" office:value="0.0637030954295266" calcext:value-type="float">
            <text:p>0.0637030954295266</text:p>
          </table:table-cell>
          <table:table-cell office:value-type="float" office:value="0.00367789992944496" calcext:value-type="float">
            <text:p>0.00367789992944496</text:p>
          </table:table-cell>
          <table:table-cell office:value-type="float" office:value="0.281094795873795" calcext:value-type="float">
            <text:p>0.281094795873795</text:p>
          </table:table-cell>
          <table:table-cell office:value-type="float" office:value="0.0637030954295266" calcext:value-type="float">
            <text:p>0.0637030954295266</text:p>
          </table:table-cell>
          <table:table-cell office:value-type="float" office:value="0.00367789992944496" calcext:value-type="float">
            <text:p>0.0036778999294449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office:value-type="string" calcext:value-type="string">
            <text:p>enet</text:p>
          </table:table-cell>
          <table:table-cell office:value-type="float" office:value="1.4" calcext:value-type="float">
            <text:p>1.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-0.390710880638877" calcext:value-type="float">
            <text:p>-0.390710880638877</text:p>
          </table:table-cell>
          <table:table-cell office:value-type="float" office:value="0.0876302648280825" calcext:value-type="float">
            <text:p>0.0876302648280825</text:p>
          </table:table-cell>
          <table:table-cell office:value-type="float" office:value="0.00505933569876516" calcext:value-type="float">
            <text:p>0.00505933569876516</text:p>
          </table:table-cell>
          <table:table-cell office:value-type="float" office:value="0.390710880638877" calcext:value-type="float">
            <text:p>0.390710880638877</text:p>
          </table:table-cell>
          <table:table-cell office:value-type="float" office:value="0.0876302648280825" calcext:value-type="float">
            <text:p>0.0876302648280825</text:p>
          </table:table-cell>
          <table:table-cell office:value-type="float" office:value="0.00505933569876516" calcext:value-type="float">
            <text:p>0.00505933569876516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16:44:57.938219500</meta:creation-date>
    <dc:date>2026-04-03T17:04:14.517931100</dc:date>
    <meta:editing-duration>PT19M16S</meta:editing-duration>
    <meta:editing-cycles>2</meta:editing-cycles>
    <meta:generator>LibreOffice/25.8.5.2$Windows_X86_64 LibreOffice_project/9c8b85f387cc00a89945a79c9e6239f32e450ac2</meta:generator>
    <meta:document-statistic meta:table-count="1" meta:cell-count="2282" meta:object-count="0"/>
  </office:meta>
</office:document-meta>
</file>